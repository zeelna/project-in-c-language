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30000020275B187DB8E2BF7BA.png" manifest:media-type="image/png"/>
  <manifest:file-entry manifest:full-path="Pictures/1000000100000450000001055969AF892D48EEB3.png" manifest:media-type="image/png"/>
  <manifest:file-entry manifest:full-path="Pictures/100000010000044C00000201801AEF0348597B43.png" manifest:media-type="image/png"/>
  <manifest:file-entry manifest:full-path="Pictures/10000001000003700000024BF22471ADED234B71.png" manifest:media-type="image/png"/>
  <manifest:file-entry manifest:full-path="Pictures/10000001000003350000013B95A2A784420AB5B9.png" manifest:media-type="image/png"/>
  <manifest:file-entry manifest:full-path="Pictures/10000001000003BB000001328E2941CBF1C8242D.png" manifest:media-type="image/png"/>
  <manifest:file-entry manifest:full-path="Pictures/10000001000003AB000002E32A1B79DBDE4CE87C.png" manifest:media-type="image/png"/>
  <manifest:file-entry manifest:full-path="Pictures/10000001000002AC00000156A9582BD882B6489E.png" manifest:media-type="image/png"/>
  <manifest:file-entry manifest:full-path="Pictures/10000001000003F0000002F1FD530BF5E8B58D6D.png" manifest:media-type="image/png"/>
  <manifest:file-entry manifest:full-path="Pictures/1000000100000324000002ACD3B183D1211CAE91.png" manifest:media-type="image/png"/>
  <manifest:file-entry manifest:full-path="Pictures/100000010000044D0000010922844BA432BD182B.png" manifest:media-type="image/png"/>
  <manifest:file-entry manifest:full-path="Pictures/10000001000003220000024AD72F9FF65F9DEF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master-page-name="Standard">
      <style:table-properties style:width="5.9007in" fo:margin-left="0.0847in" fo:margin-top="0in" fo:margin-bottom="0in" style:page-number="auto" table:align="left" style:writing-mode="lr-tb"/>
    </style:style>
    <style:style style:name="Table1.A" style:family="table-column">
      <style:table-column-properties style:column-width="4.2313in"/>
    </style:style>
    <style:style style:name="Table1.B" style:family="table-column">
      <style:table-column-properties style:column-width="1.6694in"/>
    </style:style>
    <style:style style:name="Table1.1" style:family="table-row">
      <style:table-row-properties style:min-row-height="0.1931in"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2" style:family="table-row">
      <style:table-row-properties style:min-row-height="0.2569in" fo:keep-together="auto"/>
    </style:style>
    <style:style style:name="Table1.3" style:family="table-row">
      <style:table-row-properties style:min-row-height="0.2785in" fo:keep-together="auto"/>
    </style:style>
    <style:style style:name="Table1.4" style:family="table-row">
      <style:table-row-properties style:min-row-height="1.3993in" fo:keep-together="auto"/>
    </style:style>
    <style:style style:name="Table1.5" style:family="table-row">
      <style:table-row-properties style:min-row-height="0.3153in" fo:keep-together="auto"/>
    </style:style>
    <style:style style:name="Table1.6" style:family="table-row">
      <style:table-row-properties style:min-row-height="0.3451in" fo:keep-together="auto"/>
    </style:style>
    <style:style style:name="Table1.7" style:family="table-row">
      <style:table-row-properties style:min-row-height="1.6688in" fo:keep-together="auto"/>
    </style:style>
    <style:style style:name="Table1.A7" style:family="table-cell">
      <style:table-cell-properties style:vertical-align="middle" fo:background-color="transparent" fo:padding-left="0.075in" fo:padding-right="0.075in" fo:padding-top="0in" fo:padding-bottom="0in" fo:border="none">
        <style:background-image/>
      </style:table-cell-properties>
    </style:style>
    <style:style style:name="Table1.8" style:family="table-row">
      <style:table-row-properties style:min-row-height="1.1833in" fo:keep-together="auto"/>
    </style:style>
    <style:style style:name="Table2" style:family="table">
      <style:table-properties style:width="5.9063in" fo:margin-left="0in" fo:margin-top="0in" fo:margin-bottom="0in" table:align="left" style:writing-mode="lr-tb"/>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fo:keep-together="auto"/>
    </style:style>
    <style:style style:name="Table2.A1" style:family="table-cell">
      <style:table-cell-properties style:vertical-align="middle" fo:background-color="transparent" fo:padding-left="0.075in" fo:padding-right="0.075in" fo:padding-top="0in" fo:padding-bottom="0in" fo:border="none">
        <style:background-image/>
      </style:table-cell-properties>
    </style:style>
    <style:style style:name="Table3" style:family="table">
      <style:table-properties style:width="5.8583in" fo:margin-left="0.0444in" fo:margin-top="0in" fo:margin-bottom="0in" table:align="left" style:writing-mode="lr-tb"/>
    </style:style>
    <style:style style:name="Table3.A" style:family="table-column">
      <style:table-column-properties style:column-width="0.3764in"/>
    </style:style>
    <style:style style:name="Table3.B" style:family="table-column">
      <style:table-column-properties style:column-width="1.3542in"/>
    </style:style>
    <style:style style:name="Table3.C" style:family="table-column">
      <style:table-column-properties style:column-width="0.9778in"/>
    </style:style>
    <style:style style:name="Table3.D" style:family="table-column">
      <style:table-column-properties style:column-width="3.1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background-color="#b2b2b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orphans="0" fo:widows="0"/>
    </style:style>
    <style:style style:name="P5" style:family="paragraph" style:parent-style-name="Standard">
      <style:paragraph-properties fo:orphans="0" fo:widows="0">
        <style:tab-stops>
          <style:tab-stop style:position="3.9634in"/>
        </style:tab-stops>
      </style:paragraph-properties>
    </style:style>
    <style:style style:name="P6" style:family="paragraph" style:parent-style-name="Style_20_Right">
      <style:paragraph-properties fo:orphans="0" fo:widows="0"/>
    </style:style>
    <style:style style:name="P7" style:family="paragraph" style:parent-style-name="Contents_20_Heading">
      <style:paragraph-properties fo:margin-left="0in" fo:margin-right="0in" fo:text-indent="0in" style:auto-text-indent="false"/>
    </style:style>
    <style:style style:name="P8" style:family="paragraph" style:parent-style-name="Standard">
      <style:paragraph-properties fo:orphans="0" fo:widows="0"/>
      <style:text-properties fo:font-size="14pt" style:font-size-asian="14pt"/>
    </style:style>
    <style:style style:name="P9" style:family="paragraph" style:parent-style-name="Style_20_Right">
      <style:paragraph-properties fo:orphans="0" fo:widows="0"/>
      <style:text-properties fo:font-size="14pt" style:font-size-asian="14pt"/>
    </style:style>
    <style:style style:name="P10" style:family="paragraph" style:parent-style-name="Text_20_body">
      <style:paragraph-properties fo:margin-top="0in" fo:margin-bottom="0.0555in" style:contextual-spacing="false" fo:line-height="100%" fo:text-align="center" style:justify-single-word="false" fo:orphans="0" fo:widows="0"/>
      <style:text-properties fo:font-size="14pt" style:font-size-asian="14pt"/>
    </style:style>
    <style:style style:name="P11" style:family="paragraph" style:parent-style-name="Standard">
      <style:text-properties fo:color="#5b9bd5" loext:opacity="100%" fo:language="en" fo:country="US" fo:font-style="italic" style:font-style-asian="italic"/>
    </style:style>
    <style:style style:name="P12" style:family="paragraph" style:parent-style-name="Text_20_body">
      <style:text-properties fo:color="#5b9bd5" loext:opacity="100%" fo:font-style="italic" style:font-style-asian="italic"/>
    </style:style>
    <style:style style:name="P13" style:family="paragraph" style:parent-style-name="Standard">
      <style:text-properties fo:language="en" fo:country="US"/>
    </style:style>
    <style:style style:name="P14" style:family="paragraph" style:parent-style-name="Text_20_body">
      <style:text-properties fo:language="en" fo:country="US" fo:font-weight="bold" style:font-weight-asian="bold" style:font-weight-complex="bold"/>
    </style:style>
    <style:style style:name="P15" style:family="paragraph" style:parent-style-name="Table_5f_head">
      <style:paragraph-properties fo:text-align="start" style:justify-single-word="false" fo:orphans="2" fo:widows="2"/>
      <style:text-properties style:font-name="Times New Roman" fo:language="et" fo:country="EE" style:letter-kerning="false" style:font-name-asian="Times New Roman1" style:font-name-complex="Times New Roman1" style:language-complex="ar" style:country-complex="SA"/>
    </style:style>
    <style:style style:name="P16" style:family="paragraph" style:parent-style-name="Table_5f_text">
      <style:paragraph-properties fo:text-align="start" style:justify-single-word="false" fo:orphans="2" fo:widows="2"/>
      <style:text-properties style:font-name="Times New Roman" fo:language="et" fo:country="EE" officeooo:rsid="0035c318" officeooo:paragraph-rsid="0035c318" style:letter-kerning="false" style:font-name-asian="Times New Roman1" style:font-name-complex="Times New Roman1" style:language-complex="ar" style:country-complex="SA"/>
    </style:style>
    <style:style style:name="P17" style:family="paragraph" style:parent-style-name="Table_5f_text">
      <style:paragraph-properties fo:text-align="start" style:justify-single-word="false" fo:orphans="2" fo:widows="2"/>
      <style:text-properties style:font-name="Times New Roman" fo:language="et" fo:country="EE" officeooo:rsid="0035c318" officeooo:paragraph-rsid="0044b916" style:letter-kerning="false" style:font-name-asian="Times New Roman1" style:font-name-complex="Times New Roman1" style:language-complex="ar" style:country-complex="SA"/>
    </style:style>
    <style:style style:name="P18" style:family="paragraph" style:parent-style-name="Table_5f_text">
      <style:paragraph-properties fo:text-align="start" style:justify-single-word="false" fo:orphans="2" fo:widows="2"/>
      <style:text-properties style:font-name="Times New Roman" fo:language="et" fo:country="EE" officeooo:rsid="0035f1a8" officeooo:paragraph-rsid="0035f1a8" style:letter-kerning="false" style:font-name-asian="Times New Roman1" style:font-name-complex="Times New Roman1" style:language-complex="ar" style:country-complex="SA"/>
    </style:style>
    <style:style style:name="P19" style:family="paragraph" style:parent-style-name="Table_5f_text">
      <style:paragraph-properties fo:text-align="start" style:justify-single-word="false" fo:orphans="2" fo:widows="2"/>
      <style:text-properties style:font-name="Times New Roman" fo:language="et" fo:country="EE" officeooo:rsid="0035f1a8" officeooo:paragraph-rsid="0044b916" style:letter-kerning="false" style:font-name-asian="Times New Roman1" style:font-name-complex="Times New Roman1" style:language-complex="ar" style:country-complex="SA"/>
    </style:style>
    <style:style style:name="P20" style:family="paragraph" style:parent-style-name="Table_5f_text">
      <style:paragraph-properties fo:text-align="start" style:justify-single-word="false" fo:orphans="2" fo:widows="2"/>
      <style:text-properties style:font-name="Times New Roman" fo:language="et" fo:country="EE" officeooo:rsid="0035f1a8" officeooo:paragraph-rsid="0045b168" style:letter-kerning="false" style:font-name-asian="Times New Roman1" style:font-name-complex="Times New Roman1" style:language-complex="ar" style:country-complex="SA"/>
    </style:style>
    <style:style style:name="P21" style:family="paragraph" style:parent-style-name="Table_5f_text">
      <style:paragraph-properties fo:text-align="start" style:justify-single-word="false" fo:orphans="2" fo:widows="2"/>
      <style:text-properties style:font-name="Times New Roman" fo:language="et" fo:country="EE" officeooo:rsid="0037324b" officeooo:paragraph-rsid="0037324b" style:letter-kerning="false" style:font-name-asian="Times New Roman1" style:font-name-complex="Times New Roman1" style:language-complex="ar" style:country-complex="SA"/>
    </style:style>
    <style:style style:name="P22" style:family="paragraph" style:parent-style-name="Table_5f_text">
      <style:paragraph-properties fo:text-align="center" style:justify-single-word="false" fo:orphans="2" fo:widows="2"/>
      <style:text-properties style:font-name="Times New Roman" fo:language="et" fo:country="EE" officeooo:rsid="0037324b" officeooo:paragraph-rsid="0037324b" style:letter-kerning="false" style:font-name-asian="Times New Roman1" style:font-name-complex="Times New Roman1" style:language-complex="ar" style:country-complex="SA"/>
    </style:style>
    <style:style style:name="P23" style:family="paragraph" style:parent-style-name="Table_5f_text">
      <style:paragraph-properties fo:text-align="start" style:justify-single-word="false" fo:orphans="2" fo:widows="2"/>
      <style:text-properties style:font-name="Times New Roman" fo:language="et" fo:country="EE" officeooo:rsid="0038d5aa" officeooo:paragraph-rsid="0038d5aa" style:letter-kerning="false" style:font-name-asian="Times New Roman1" style:font-name-complex="Times New Roman1" style:language-complex="ar" style:country-complex="SA"/>
    </style:style>
    <style:style style:name="P24" style:family="paragraph" style:parent-style-name="Table_5f_text">
      <style:paragraph-properties fo:text-align="start" style:justify-single-word="false" fo:orphans="2" fo:widows="2"/>
      <style:text-properties style:font-name="Times New Roman" fo:language="et" fo:country="EE" officeooo:rsid="0044b916" officeooo:paragraph-rsid="0044b916" style:letter-kerning="false" style:font-name-asian="Times New Roman1" style:font-name-complex="Times New Roman1" style:language-complex="ar" style:country-complex="SA"/>
    </style:style>
    <style:style style:name="P25" style:family="paragraph" style:parent-style-name="Table_5f_text">
      <style:paragraph-properties fo:text-align="start" style:justify-single-word="false" fo:orphans="2" fo:widows="2"/>
      <style:text-properties style:font-name="Times New Roman" fo:language="et" fo:country="EE" officeooo:rsid="0045b168" officeooo:paragraph-rsid="0045b168" style:letter-kerning="false" style:font-name-asian="Times New Roman1" style:font-name-complex="Times New Roman1" style:language-complex="ar" style:country-complex="SA"/>
    </style:style>
    <style:style style:name="P26" style:family="paragraph" style:parent-style-name="Table_5f_text">
      <style:paragraph-properties fo:text-align="start" style:justify-single-word="false" fo:orphans="2" fo:widows="2"/>
      <style:text-properties style:font-name="Times New Roman" fo:language="et" fo:country="EE" officeooo:rsid="0047a012" officeooo:paragraph-rsid="0047a012" style:letter-kerning="false" style:font-name-asian="Times New Roman1" style:font-name-complex="Times New Roman1" style:language-complex="ar" style:country-complex="SA"/>
    </style:style>
    <style:style style:name="P27" style:family="paragraph" style:parent-style-name="caption">
      <style:paragraph-properties fo:keep-with-next="always"/>
    </style:style>
    <style:style style:name="P28" style:family="paragraph" style:parent-style-name="University">
      <style:paragraph-properties fo:orphans="0" fo:widows="0"/>
      <style:text-properties fo:font-style="normal" style:font-style-asian="normal" style:font-style-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normal" officeooo:rsid="0016d83a" officeooo:paragraph-rsid="0016d83a" style:font-style-asian="normal" style:font-style-complex="normal"/>
    </style:style>
    <style:style style:name="P31" style:family="paragraph" style:parent-style-name="Standard">
      <style:text-properties fo:font-style="normal" officeooo:paragraph-rsid="00445dd4" style:font-style-asian="normal" style:font-style-complex="normal"/>
    </style:style>
    <style:style style:name="P32" style:family="paragraph" style:parent-style-name="Text_20_body">
      <style:text-properties fo:font-style="normal" officeooo:rsid="003a1d2e" officeooo:paragraph-rsid="003a1d2e" style:font-style-asian="normal" style:font-style-complex="normal"/>
    </style:style>
    <style:style style:name="P33" style:family="paragraph" style:parent-style-name="Text_20_body">
      <style:text-properties fo:font-style="normal" officeooo:rsid="00491d48" officeooo:paragraph-rsid="00491d48" style:font-style-asian="normal" style:font-style-complex="normal"/>
    </style:style>
    <style:style style:name="P34" style:family="paragraph" style:parent-style-name="Heading_5f_title">
      <style:paragraph-properties fo:orphans="0" fo:widows="0"/>
      <style:text-properties officeooo:rsid="0016d83a" officeooo:paragraph-rsid="0016d83a"/>
    </style:style>
    <style:style style:name="P35" style:family="paragraph" style:parent-style-name="Standard">
      <style:paragraph-properties fo:orphans="0" fo:widows="0"/>
      <style:text-properties officeooo:rsid="0016d83a" officeooo:paragraph-rsid="0016d83a"/>
    </style:style>
    <style:style style:name="P36" style:family="paragraph" style:parent-style-name="Standard">
      <style:paragraph-properties fo:text-align="center" style:justify-single-word="false" fo:orphans="0" fo:widows="0"/>
      <style:text-properties officeooo:rsid="0016d83a" officeooo:paragraph-rsid="0016d83a"/>
    </style:style>
    <style:style style:name="P37" style:family="paragraph" style:parent-style-name="Standard">
      <style:text-properties fo:color="#000000" loext:opacity="100%" fo:font-style="normal" officeooo:rsid="0016d83a" officeooo:paragraph-rsid="0016d83a" style:font-style-asian="normal" style:font-style-complex="normal"/>
    </style:style>
    <style:style style:name="P38" style:family="paragraph" style:parent-style-name="Text_20_body">
      <style:text-properties fo:color="#000000" loext:opacity="100%" fo:font-style="normal" officeooo:rsid="0038d5aa" officeooo:paragraph-rsid="00445dd4" style:font-style-asian="normal" style:font-style-complex="normal"/>
    </style:style>
    <style:style style:name="P39" style:family="paragraph" style:parent-style-name="Text_20_body">
      <style:text-properties officeooo:rsid="00342a52" officeooo:paragraph-rsid="00342a52"/>
    </style:style>
    <style:style style:name="P40" style:family="paragraph" style:parent-style-name="Text_20_body">
      <style:text-properties officeooo:rsid="00449cc6" officeooo:paragraph-rsid="00449cc6"/>
    </style:style>
    <style:style style:name="P41" style:family="paragraph" style:parent-style-name="Heading_5f_center" style:master-page-name="Converted1">
      <style:paragraph-properties fo:margin-left="0in" fo:margin-right="0in" fo:text-indent="0in" style:auto-text-indent="false" style:page-number="auto"/>
      <style:text-properties fo:font-style="normal" style:font-style-asian="normal" style:font-style-complex="normal"/>
    </style:style>
    <style:style style:name="P42" style:family="paragraph" style:parent-style-name="Heading_5f_center" style:master-page-name="Converted2">
      <style:paragraph-properties fo:margin-left="0in" fo:margin-right="0in" fo:text-indent="0in" style:auto-text-indent="false" style:page-number="auto"/>
      <style:text-properties fo:font-style="normal" style:font-style-asian="normal" style:font-style-complex="normal"/>
    </style:style>
    <style:style style:name="P43" style:family="paragraph" style:parent-style-name="Heading_5f_center" style:master-page-name="Converted3">
      <style:paragraph-properties fo:margin-left="0in" fo:margin-right="0in" fo:text-indent="0in" style:auto-text-indent="false" style:page-number="auto"/>
      <style:text-properties fo:font-style="normal" style:font-style-asian="normal" style:font-style-complex="normal"/>
    </style:style>
    <style:style style:name="P44" style:family="paragraph" style:parent-style-name="Heading_5f_center" style:master-page-name="Converted4">
      <style:paragraph-properties fo:margin-left="0in" fo:margin-right="0in" fo:text-indent="0in" style:auto-text-indent="false" style:page-number="auto"/>
      <style:text-properties fo:font-style="normal" style:font-style-asian="normal" style:font-style-complex="normal"/>
    </style:style>
    <style:style style:name="P45" style:family="paragraph" style:parent-style-name="Heading_5f_center" style:master-page-name="Converted5">
      <style:paragraph-properties fo:margin-left="0in" fo:margin-right="0in" fo:text-indent="0in" style:auto-text-indent="false" style:page-number="auto"/>
      <style:text-properties fo:font-style="normal" style:font-style-asian="normal" style:font-style-complex="normal"/>
    </style:style>
    <style:style style:name="P46" style:family="paragraph" style:parent-style-name="Contents_20_1">
      <style:paragraph-properties>
        <style:tab-stops>
          <style:tab-stop style:position="5.9055in" style:type="right" style:leader-style="dotted" style:leader-text="."/>
        </style:tab-stops>
      </style:paragraph-properties>
    </style:style>
    <style:style style:name="P47" style:family="paragraph" style:parent-style-name="Contents_20_2">
      <style:paragraph-properties>
        <style:tab-stops>
          <style:tab-stop style:position="5.9055in" style:type="right" style:leader-style="dotted" style:leader-text="."/>
        </style:tab-stops>
      </style:paragraph-properties>
    </style:style>
    <style:style style:name="P48" style:family="paragraph" style:parent-style-name="Contents_20_3">
      <style:paragraph-properties>
        <style:tab-stops>
          <style:tab-stop style:position="5.9055in" style:type="right" style:leader-style="dotted" style:leader-text="."/>
        </style:tab-stops>
      </style:paragraph-properties>
    </style:style>
    <style:style style:name="P49" style:family="paragraph" style:parent-style-name="Figure_20_Index_20_1">
      <style:paragraph-properties>
        <style:tab-stops>
          <style:tab-stop style:position="5.9055in" style:type="right" style:leader-style="dotted" style:leader-text="."/>
        </style:tab-stops>
      </style:paragraph-properties>
    </style:style>
    <style:style style:name="P50" style:family="paragraph" style:parent-style-name="Heading_20_1" style:list-style-name="WWNum5"/>
    <style:style style:name="P51" style:family="paragraph" style:parent-style-name="Heading_20_1" style:list-style-name="WWNum5" style:master-page-name="Converted6">
      <style:paragraph-properties style:page-number="auto"/>
      <style:text-properties fo:font-style="normal" style:font-style-asian="normal" style:font-style-complex="normal"/>
    </style:style>
    <style:style style:name="P52" style:family="paragraph" style:parent-style-name="Heading_20_1" style:list-style-name="WWNum5" style:master-page-name="Converted8">
      <style:paragraph-properties style:page-number="auto"/>
      <style:text-properties fo:font-style="normal" style:font-style-asian="normal" style:font-style-complex="normal"/>
    </style:style>
    <style:style style:name="P53" style:family="paragraph" style:parent-style-name="Heading_20_1">
      <style:paragraph-properties fo:break-before="page"/>
      <style:text-properties fo:font-style="normal" officeooo:rsid="00205b58" officeooo:paragraph-rsid="0026f138" style:font-style-asian="normal" style:font-style-complex="normal"/>
    </style:style>
    <style:style style:name="P54" style:family="paragraph" style:parent-style-name="Heading_20_2" style:list-style-name="WWNum5"/>
    <style:style style:name="P55" style:family="paragraph" style:parent-style-name="Heading_20_2" style:list-style-name="WWNum5">
      <style:paragraph-properties fo:break-before="page"/>
    </style:style>
    <style:style style:name="P56" style:family="paragraph" style:parent-style-name="Heading_20_2">
      <style:text-properties officeooo:rsid="003a1d2e" officeooo:paragraph-rsid="003a1d2e"/>
    </style:style>
    <style:style style:name="P57" style:family="paragraph" style:parent-style-name="Heading_20_3" style:list-style-name="">
      <style:paragraph-properties fo:line-height="150%" fo:text-align="start" style:justify-single-word="false" fo:orphans="2" fo:widows="2"/>
      <style:text-properties officeooo:paragraph-rsid="00578f5b"/>
    </style:style>
    <style:style style:name="P58" style:family="paragraph" style:parent-style-name="Heading_20_3">
      <style:paragraph-properties fo:break-before="page"/>
    </style:style>
    <style:style style:name="P59" style:family="paragraph" style:parent-style-name="Heading_5f_unnumber" style:master-page-name="Converted11">
      <style:paragraph-properties fo:margin-left="0in" fo:margin-right="0in" fo:text-indent="0in" style:auto-text-indent="false" style:page-number="auto"/>
      <style:text-properties fo:font-style="normal" style:font-style-asian="normal" style:font-style-complex="normal"/>
    </style:style>
    <style:style style:name="P60" style:family="paragraph" style:parent-style-name="Lisa">
      <style:text-properties officeooo:paragraph-rsid="005885d6"/>
    </style:style>
    <style:style style:name="P61" style:family="paragraph" style:parent-style-name="Lisa">
      <style:text-properties officeooo:paragraph-rsid="005d0400"/>
    </style:style>
    <style:style style:name="P62" style:family="paragraph" style:parent-style-name="Standard">
      <style:paragraph-properties fo:text-align="justify" style:justify-single-word="false"/>
      <style:text-properties fo:font-style="normal" officeooo:rsid="00644c3e" officeooo:paragraph-rsid="00644c3e" style:font-style-asian="normal" style:font-style-complex="normal"/>
    </style:style>
    <style:style style:name="P63" style:family="paragraph" style:parent-style-name="Table_5f_text">
      <style:paragraph-properties fo:text-align="start" style:justify-single-word="false" fo:orphans="2" fo:widows="2"/>
      <style:text-properties style:font-name="Times New Roman" fo:language="et" fo:country="EE" officeooo:rsid="0047a012" officeooo:paragraph-rsid="0053c009" style:letter-kerning="false" style:font-name-asian="Times New Roman1" style:font-name-complex="Times New Roman1" style:language-complex="ar" style:country-complex="SA"/>
    </style:style>
    <style:style style:name="P64" style:family="paragraph" style:parent-style-name="Table_5f_text">
      <style:paragraph-properties fo:text-align="start" style:justify-single-word="false" fo:orphans="2" fo:widows="2"/>
      <style:text-properties style:font-name="Times New Roman" fo:language="et" fo:country="EE" officeooo:rsid="0047a012" officeooo:paragraph-rsid="0047a012" style:letter-kerning="false" style:font-name-asian="Times New Roman1" style:font-name-complex="Times New Roman1" style:language-complex="ar" style:country-complex="SA"/>
    </style:style>
    <style:style style:name="P65" style:family="paragraph" style:parent-style-name="Table_5f_text">
      <style:paragraph-properties fo:text-align="start" style:justify-single-word="false" fo:orphans="2" fo:widows="2"/>
      <style:text-properties style:font-name="Times New Roman" fo:language="et" fo:country="EE" officeooo:rsid="0053c009" officeooo:paragraph-rsid="0053c009" style:letter-kerning="false" style:font-name-asian="Times New Roman1" style:font-name-complex="Times New Roman1" style:language-complex="ar" style:country-complex="SA"/>
    </style:style>
    <style:style style:name="P66" style:family="paragraph" style:parent-style-name="Table_5f_text">
      <style:paragraph-properties fo:text-align="start" style:justify-single-word="false" fo:orphans="2" fo:widows="2"/>
      <style:text-properties style:font-name="Times New Roman" fo:language="et" fo:country="EE" officeooo:rsid="00544ab8" officeooo:paragraph-rsid="00544ab8" style:letter-kerning="false" style:font-name-asian="Times New Roman1" style:font-name-complex="Times New Roman1" style:language-complex="ar" style:country-complex="SA"/>
    </style:style>
    <style:style style:name="P67" style:family="paragraph" style:parent-style-name="Table_5f_text">
      <style:paragraph-properties fo:text-align="start" style:justify-single-word="false" fo:orphans="2" fo:widows="2"/>
      <style:text-properties style:font-name="Times New Roman" fo:language="et" fo:country="EE" officeooo:rsid="0035f1a8" officeooo:paragraph-rsid="00544ab8" style:letter-kerning="false" style:font-name-asian="Times New Roman1" style:font-name-complex="Times New Roman1" style:language-complex="ar" style:country-complex="SA"/>
    </style:style>
    <style:style style:name="P68" style:family="paragraph" style:parent-style-name="Table_5f_text">
      <style:paragraph-properties fo:text-align="start" style:justify-single-word="false" fo:orphans="2" fo:widows="2"/>
      <style:text-properties style:font-name="Times New Roman" fo:language="et" fo:country="EE" officeooo:rsid="0035f1a8" officeooo:paragraph-rsid="0045b168" style:letter-kerning="false" style:font-name-asian="Times New Roman1" style:font-name-complex="Times New Roman1" style:language-complex="ar" style:country-complex="SA"/>
    </style:style>
    <style:style style:name="P69" style:family="paragraph" style:parent-style-name="Table_5f_text">
      <style:paragraph-properties fo:text-align="start" style:justify-single-word="false" fo:orphans="2" fo:widows="2"/>
      <style:text-properties style:font-name="Times New Roman" fo:language="et" fo:country="EE" officeooo:rsid="0035c318" officeooo:paragraph-rsid="0035c318" style:letter-kerning="false" style:font-name-asian="Times New Roman1" style:font-name-complex="Times New Roman1" style:language-complex="ar" style:country-complex="SA"/>
    </style:style>
    <style:style style:name="P70" style:family="paragraph" style:parent-style-name="Table_5f_text">
      <style:paragraph-properties fo:text-align="start" style:justify-single-word="false" fo:orphans="2" fo:widows="2"/>
      <style:text-properties style:font-name="Times New Roman" fo:language="et" fo:country="EE" officeooo:rsid="0035c318" officeooo:paragraph-rsid="00544ab8" style:letter-kerning="false" style:font-name-asian="Times New Roman1" style:font-name-complex="Times New Roman1" style:language-complex="ar" style:country-complex="SA"/>
    </style:style>
    <style:style style:name="P71" style:family="paragraph" style:parent-style-name="Table_5f_text">
      <style:paragraph-properties fo:text-align="start" style:justify-single-word="false" fo:orphans="2" fo:widows="2"/>
      <style:text-properties style:font-name="Times New Roman" fo:language="et" fo:country="EE" officeooo:rsid="0045b168" officeooo:paragraph-rsid="0045b168" style:letter-kerning="false" style:font-name-asian="Times New Roman1" style:font-name-complex="Times New Roman1" style:language-complex="ar" style:country-complex="SA"/>
    </style:style>
    <style:style style:name="P72" style:family="paragraph" style:parent-style-name="Table_5f_text">
      <style:paragraph-properties fo:text-align="start" style:justify-single-word="false" fo:orphans="2" fo:widows="2"/>
      <style:text-properties style:font-name="Times New Roman" fo:language="et" fo:country="EE" officeooo:rsid="005606d2" officeooo:paragraph-rsid="005606d2" style:letter-kerning="false" style:font-name-asian="Times New Roman1" style:font-name-complex="Times New Roman1" style:language-complex="ar" style:country-complex="SA"/>
    </style:style>
    <style:style style:name="P73" style:family="paragraph" style:parent-style-name="Table_5f_text">
      <style:paragraph-properties fo:orphans="0" fo:widows="0"/>
      <style:text-properties officeooo:rsid="004de1ca" officeooo:paragraph-rsid="004de1ca"/>
    </style:style>
    <style:style style:name="P74" style:family="paragraph" style:parent-style-name="Table_5f_text">
      <style:paragraph-properties fo:orphans="0" fo:widows="0"/>
      <style:text-properties officeooo:rsid="004de1ca" officeooo:paragraph-rsid="0061b922"/>
    </style:style>
    <style:style style:name="P75" style:family="paragraph" style:parent-style-name="Table_5f_text">
      <style:paragraph-properties fo:orphans="0" fo:widows="0"/>
      <style:text-properties officeooo:rsid="004c1ada" officeooo:paragraph-rsid="004c1ada"/>
    </style:style>
    <style:style style:name="P76" style:family="paragraph" style:parent-style-name="Table_5f_text">
      <style:paragraph-properties fo:orphans="0" fo:widows="0"/>
      <style:text-properties officeooo:rsid="0061b922" officeooo:paragraph-rsid="0061b922"/>
    </style:style>
    <style:style style:name="P77" style:family="paragraph" style:parent-style-name="Text_20_body" style:list-style-name="WWNum5">
      <style:text-properties officeooo:paragraph-rsid="00578f5b"/>
    </style:style>
    <style:style style:name="P78" style:family="paragraph" style:parent-style-name="Text_20_body">
      <style:text-properties fo:font-style="normal" officeooo:rsid="00449cc6" officeooo:paragraph-rsid="0051dba3" style:font-style-asian="normal" style:font-style-complex="normal"/>
    </style:style>
    <style:style style:name="P79" style:family="paragraph" style:parent-style-name="Text_20_body">
      <style:text-properties fo:font-style="normal" officeooo:rsid="00205b58" officeooo:paragraph-rsid="0059eedb" style:font-style-asian="normal" style:font-style-complex="normal"/>
    </style:style>
    <style:style style:name="P80" style:family="paragraph" style:parent-style-name="Text_20_body">
      <style:text-properties fo:font-style="normal" officeooo:rsid="005d0400" officeooo:paragraph-rsid="005effee" style:font-style-asian="normal" style:font-style-complex="normal"/>
    </style:style>
    <style:style style:name="P81" style:family="paragraph" style:parent-style-name="Text_20_body">
      <style:text-properties fo:font-style="normal" officeooo:paragraph-rsid="005effee" style:font-style-asian="normal" style:font-style-complex="normal"/>
    </style:style>
    <style:style style:name="P82" style:family="paragraph" style:parent-style-name="Text_20_body">
      <style:text-properties fo:font-style="normal" officeooo:rsid="005effee" officeooo:paragraph-rsid="005f712d" style:font-style-asian="normal" style:font-style-complex="normal"/>
    </style:style>
    <style:style style:name="P83" style:family="paragraph" style:parent-style-name="Text_20_body" style:list-style-name="L1">
      <style:paragraph-properties fo:margin-top="0in" fo:margin-bottom="0in" style:contextual-spacing="false"/>
      <style:text-properties officeooo:rsid="005142ab" officeooo:paragraph-rsid="005142ab"/>
    </style:style>
    <style:style style:name="P84" style:family="paragraph" style:parent-style-name="Text_20_body" style:list-style-name="L1">
      <style:text-properties officeooo:rsid="005142ab" officeooo:paragraph-rsid="005142ab"/>
    </style:style>
    <style:style style:name="P85" style:family="paragraph" style:parent-style-name="Text_20_body">
      <style:paragraph-properties fo:text-align="justify" style:justify-single-word="false"/>
      <style:text-properties fo:color="#000000" loext:opacity="100%" fo:font-style="normal" officeooo:rsid="002b9639" officeooo:paragraph-rsid="002b9639" style:font-style-asian="normal" style:font-style-complex="normal"/>
    </style:style>
    <style:style style:name="P86" style:family="paragraph" style:parent-style-name="Text_20_body">
      <style:paragraph-properties fo:text-align="justify" style:justify-single-word="false"/>
      <style:text-properties fo:color="#000000" loext:opacity="100%" fo:font-style="normal" officeooo:rsid="002b9639" officeooo:paragraph-rsid="0051dba3" style:font-style-asian="normal" style:font-style-complex="normal"/>
    </style:style>
    <style:style style:name="P87" style:family="paragraph" style:parent-style-name="Text_20_body">
      <style:paragraph-properties fo:text-align="justify" style:justify-single-word="false"/>
      <style:text-properties fo:color="#000000" loext:opacity="100%" fo:font-style="normal" officeooo:rsid="0051dba3" officeooo:paragraph-rsid="0051dba3" style:font-style-asian="normal" style:font-style-complex="normal"/>
    </style:style>
    <style:style style:name="P88" style:family="paragraph" style:parent-style-name="Text_20_body">
      <style:text-properties officeooo:rsid="002b9639" officeooo:paragraph-rsid="002b9639"/>
    </style:style>
    <style:style style:name="P89" style:family="paragraph" style:parent-style-name="Text_20_body">
      <style:text-properties officeooo:rsid="00449cc6" officeooo:paragraph-rsid="0053c009"/>
    </style:style>
    <style:style style:name="P90" style:family="paragraph" style:parent-style-name="Text_20_body">
      <style:text-properties officeooo:paragraph-rsid="0053c009"/>
    </style:style>
    <style:style style:name="P91" style:family="paragraph" style:parent-style-name="Text_20_body" style:list-style-name="L2">
      <style:text-properties officeooo:paragraph-rsid="0053c009"/>
    </style:style>
    <style:style style:name="P92" style:family="paragraph" style:parent-style-name="Text_20_body">
      <style:text-properties officeooo:paragraph-rsid="0059eedb"/>
    </style:style>
    <style:style style:name="P93" style:family="paragraph" style:parent-style-name="Text_20_body">
      <style:text-properties officeooo:rsid="0059eedb" officeooo:paragraph-rsid="0059eedb"/>
    </style:style>
    <style:style style:name="P94" style:family="paragraph" style:parent-style-name="Text_20_body">
      <style:text-properties officeooo:rsid="0059eedb" officeooo:paragraph-rsid="0065f56a"/>
    </style:style>
    <style:style style:name="P95" style:family="paragraph" style:parent-style-name="Text_20_body">
      <style:text-properties officeooo:rsid="00342a52" officeooo:paragraph-rsid="00342a52"/>
    </style:style>
    <style:style style:name="P96" style:family="paragraph" style:parent-style-name="Text_20_body">
      <style:text-properties officeooo:paragraph-rsid="00393179"/>
    </style:style>
    <style:style style:name="P97" style:family="paragraph" style:parent-style-name="Text_20_body">
      <style:text-properties officeooo:paragraph-rsid="0065f56a"/>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officeooo:rsid="004b37bd" style:font-style-asian="italic" style:font-style-complex="italic"/>
    </style:style>
    <style:style style:name="T4" style:family="text">
      <style:text-properties fo:font-style="italic" officeooo:rsid="00568a06" style:font-style-asian="italic" style:font-style-complex="italic"/>
    </style:style>
    <style:style style:name="T5" style:family="text">
      <style:text-properties fo:font-style="italic" officeooo:rsid="00491d48" style:font-style-asian="italic" style:font-style-complex="italic"/>
    </style:style>
    <style:style style:name="T6" style:family="text">
      <style:text-properties fo:font-style="italic" officeooo:rsid="00578f5b" style:font-style-asian="italic" style:font-style-complex="italic"/>
    </style:style>
    <style:style style:name="T7" style:family="text">
      <style:text-properties fo:font-style="italic" officeooo:rsid="0056db97" style:font-style-asian="italic" style:font-style-complex="italic"/>
    </style:style>
    <style:style style:name="T8" style:family="text">
      <style:text-properties fo:font-style="italic" officeooo:rsid="005885d6" style:font-style-asian="italic" style:font-style-complex="italic"/>
    </style:style>
    <style:style style:name="T9" style:family="text">
      <style:text-properties fo:font-style="italic" officeooo:rsid="0059eedb" style:font-style-asian="italic" style:font-style-complex="italic"/>
    </style:style>
    <style:style style:name="T10" style:family="text">
      <style:text-properties fo:font-style="italic" officeooo:rsid="005bcaf1" style:font-style-asian="italic" style:font-style-complex="italic"/>
    </style:style>
    <style:style style:name="T11" style:family="text">
      <style:text-properties fo:font-style="italic" officeooo:rsid="005d0400" style:font-style-asian="italic" style:font-style-complex="italic"/>
    </style:style>
    <style:style style:name="T12" style:family="text">
      <style:text-properties fo:font-style="italic" officeooo:rsid="005effee" style:font-style-asian="italic" style:font-style-complex="italic"/>
    </style:style>
    <style:style style:name="T13" style:family="text">
      <style:text-properties fo:font-style="italic" officeooo:rsid="005f712d" style:font-style-asian="italic" style:font-style-complex="italic"/>
    </style:style>
    <style:style style:name="T14" style:family="text">
      <style:text-properties fo:font-style="italic" officeooo:rsid="0065f56a" style:font-style-asian="italic" style:font-style-complex="italic"/>
    </style:style>
    <style:style style:name="T15" style:family="text">
      <style:text-properties fo:language="en" fo:country="GB"/>
    </style:style>
    <style:style style:name="T16" style:family="text">
      <style:text-properties officeooo:rsid="0016d83a"/>
    </style:style>
    <style:style style:name="T17" style:family="text">
      <style:text-properties fo:font-weight="bold" officeooo:rsid="00498fc7"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officeooo:rsid="001d9fde" style:font-style-asian="normal" style:font-style-complex="normal"/>
    </style:style>
    <style:style style:name="T20" style:family="text">
      <style:text-properties fo:font-style="normal" officeooo:rsid="00393179" style:font-style-asian="normal" style:font-style-complex="normal"/>
    </style:style>
    <style:style style:name="T21" style:family="text">
      <style:text-properties fo:font-style="normal" officeooo:rsid="00205b58" style:font-style-asian="normal" style:font-style-complex="normal"/>
    </style:style>
    <style:style style:name="T22" style:family="text">
      <style:text-properties fo:font-style="normal" officeooo:rsid="00449cc6" style:font-style-asian="normal" style:font-style-complex="normal"/>
    </style:style>
    <style:style style:name="T23" style:family="text">
      <style:text-properties fo:font-style="normal" officeooo:rsid="00491d48" style:font-style-asian="normal" style:font-style-complex="normal"/>
    </style:style>
    <style:style style:name="T24" style:family="text">
      <style:text-properties fo:font-style="normal" officeooo:rsid="003bf4b5" style:font-style-asian="normal" style:font-style-complex="normal"/>
    </style:style>
    <style:style style:name="T25" style:family="text">
      <style:text-properties fo:font-style="normal" officeooo:rsid="004a6ac4" style:font-style-asian="normal" style:font-style-complex="normal"/>
    </style:style>
    <style:style style:name="T26" style:family="text">
      <style:text-properties fo:font-style="normal" officeooo:rsid="004de1ca" style:font-style-asian="normal" style:font-style-complex="normal"/>
    </style:style>
    <style:style style:name="T27" style:family="text">
      <style:text-properties fo:font-style="normal" officeooo:rsid="0051dba3" style:font-style-asian="normal" style:font-style-complex="normal"/>
    </style:style>
    <style:style style:name="T28" style:family="text">
      <style:text-properties fo:font-style="normal" officeooo:rsid="00537212" style:font-style-asian="normal" style:font-style-complex="normal"/>
    </style:style>
    <style:style style:name="T29" style:family="text">
      <style:text-properties fo:font-style="normal" officeooo:rsid="0053c009" style:font-style-asian="normal" style:font-style-complex="normal"/>
    </style:style>
    <style:style style:name="T30" style:family="text">
      <style:text-properties fo:font-style="normal" officeooo:rsid="0056db97" style:font-style-asian="normal" style:font-style-complex="normal"/>
    </style:style>
    <style:style style:name="T31" style:family="text">
      <style:text-properties fo:font-style="normal" officeooo:rsid="005885d6" style:font-style-asian="normal" style:font-style-complex="normal"/>
    </style:style>
    <style:style style:name="T32" style:family="text">
      <style:text-properties fo:font-style="normal" officeooo:rsid="00578f5b" style:font-style-asian="normal" style:font-style-complex="normal"/>
    </style:style>
    <style:style style:name="T33" style:family="text">
      <style:text-properties fo:font-style="normal" officeooo:rsid="005bcaf1" style:font-style-asian="normal" style:font-style-complex="normal"/>
    </style:style>
    <style:style style:name="T34" style:family="text">
      <style:text-properties fo:font-style="normal" officeooo:rsid="005c126e" style:font-style-asian="normal" style:font-style-complex="normal"/>
    </style:style>
    <style:style style:name="T35" style:family="text">
      <style:text-properties fo:font-style="normal" officeooo:rsid="005d0400" style:font-style-asian="normal" style:font-style-complex="normal"/>
    </style:style>
    <style:style style:name="T36" style:family="text">
      <style:text-properties fo:font-style="normal" officeooo:rsid="0038d5aa" style:font-style-asian="normal" style:font-style-complex="normal"/>
    </style:style>
    <style:style style:name="T37" style:family="text">
      <style:text-properties fo:font-style="normal" officeooo:rsid="0051297a" style:font-style-asian="normal" style:font-style-complex="normal"/>
    </style:style>
    <style:style style:name="T38" style:family="text">
      <style:text-properties fo:font-style="normal" officeooo:rsid="00445dd4" style:font-style-asian="normal" style:font-style-complex="normal"/>
    </style:style>
    <style:style style:name="T39" style:family="text">
      <style:text-properties fo:font-style="normal" officeooo:rsid="0065f56a"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44b916" style:font-style-asian="normal" style:font-weight-asian="normal" style:font-style-complex="normal" style:font-weight-complex="normal"/>
    </style:style>
    <style:style style:name="T42" style:family="text">
      <style:text-properties fo:font-style="normal" fo:font-weight="normal" officeooo:rsid="00537212" style:font-style-asian="normal" style:font-weight-asian="normal" style:font-style-complex="normal" style:font-weight-complex="normal"/>
    </style:style>
    <style:style style:name="T43" style:family="text">
      <style:text-properties fo:font-style="normal" fo:font-weight="normal" officeooo:rsid="0053c009" style:font-style-asian="normal" style:font-weight-asian="normal" style:font-style-complex="normal" style:font-weight-complex="normal"/>
    </style:style>
    <style:style style:name="T44" style:family="text">
      <style:text-properties fo:font-style="normal" fo:font-weight="normal" officeooo:rsid="001d9fde" style:font-style-asian="normal" style:font-weight-asian="normal" style:font-style-complex="normal" style:font-weight-complex="normal"/>
    </style:style>
    <style:style style:name="T45" style:family="text">
      <style:text-properties officeooo:rsid="003b9ab9"/>
    </style:style>
    <style:style style:name="T46" style:family="text">
      <style:text-properties fo:font-weight="normal" officeooo:rsid="00498fc7" style:font-weight-asian="normal" style:font-weight-complex="normal"/>
    </style:style>
    <style:style style:name="T47" style:family="text">
      <style:text-properties fo:font-weight="normal" officeooo:rsid="0051dba3" style:font-weight-asian="normal" style:font-weight-complex="normal"/>
    </style:style>
    <style:style style:name="T48" style:family="text">
      <style:text-properties officeooo:rsid="00445dd4"/>
    </style:style>
    <style:style style:name="T49" style:family="text">
      <style:text-properties officeooo:rsid="00449cc6"/>
    </style:style>
    <style:style style:name="T50" style:family="text">
      <style:text-properties officeooo:rsid="0044b916"/>
    </style:style>
    <style:style style:name="T51" style:family="text">
      <style:text-properties officeooo:rsid="0045b168"/>
    </style:style>
    <style:style style:name="T52" style:family="text">
      <style:text-properties officeooo:rsid="0047a012"/>
    </style:style>
    <style:style style:name="T53" style:family="text">
      <style:text-properties officeooo:rsid="00491d48"/>
    </style:style>
    <style:style style:name="T54" style:family="text">
      <style:text-properties officeooo:rsid="00498fc7"/>
    </style:style>
    <style:style style:name="T55" style:family="text">
      <style:text-properties officeooo:rsid="004a6ac4"/>
    </style:style>
    <style:style style:name="T56" style:family="text">
      <style:text-properties officeooo:rsid="004b37bd"/>
    </style:style>
    <style:style style:name="T57" style:family="text">
      <style:text-properties officeooo:rsid="0051297a"/>
    </style:style>
    <style:style style:name="T58" style:family="text">
      <style:text-properties officeooo:rsid="005142ab"/>
    </style:style>
    <style:style style:name="T59" style:family="text">
      <style:text-properties fo:color="#000000" loext:opacity="100%" fo:font-style="normal" style:font-style-asian="normal" style:font-style-complex="normal"/>
    </style:style>
    <style:style style:name="T60" style:family="text">
      <style:text-properties fo:color="#000000" loext:opacity="100%" fo:font-style="normal" officeooo:rsid="0051dba3" style:font-style-asian="normal" style:font-style-complex="normal"/>
    </style:style>
    <style:style style:name="T61" style:family="text">
      <style:text-properties fo:color="#000000" loext:opacity="100%" fo:font-style="normal" officeooo:rsid="00537212" style:font-style-asian="normal" style:font-style-complex="normal"/>
    </style:style>
    <style:style style:name="T62" style:family="text">
      <style:text-properties fo:color="#000000" loext:opacity="100%" officeooo:rsid="0051297a"/>
    </style:style>
    <style:style style:name="T63" style:family="text">
      <style:text-properties officeooo:rsid="0051dba3"/>
    </style:style>
    <style:style style:name="T64" style:family="text">
      <style:text-properties officeooo:rsid="00537212"/>
    </style:style>
    <style:style style:name="T65" style:family="text">
      <style:text-properties officeooo:rsid="0053c009"/>
    </style:style>
    <style:style style:name="T66" style:family="text">
      <style:text-properties officeooo:rsid="00544ab8"/>
    </style:style>
    <style:style style:name="T67" style:family="text">
      <style:text-properties officeooo:rsid="005606d2"/>
    </style:style>
    <style:style style:name="T68" style:family="text">
      <style:text-properties officeooo:rsid="00568a06"/>
    </style:style>
    <style:style style:name="T69" style:family="text">
      <style:text-properties officeooo:rsid="00578f5b"/>
    </style:style>
    <style:style style:name="T70" style:family="text">
      <style:text-properties officeooo:rsid="005bcaf1"/>
    </style:style>
    <style:style style:name="T71" style:family="text">
      <style:text-properties officeooo:rsid="005d0400"/>
    </style:style>
    <style:style style:name="T72" style:family="text">
      <style:text-properties officeooo:rsid="005effee"/>
    </style:style>
    <style:style style:name="T73" style:family="text">
      <style:text-properties officeooo:rsid="0061b922"/>
    </style:style>
    <style:style style:name="T74" style:family="text">
      <style:text-properties officeooo:rsid="0062f9d5"/>
    </style:style>
    <style:style style:name="T75" style:family="text">
      <style:text-properties officeooo:rsid="00642611"/>
    </style:style>
    <style:style style:name="T76" style:family="text">
      <style:text-properties officeooo:rsid="0065f56a"/>
    </style:style>
    <style:style style:name="T77" style:family="text">
      <style:text-properties officeooo:rsid="0067f49a"/>
    </style:style>
    <style:style style:name="T78"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Joonis"/>
        <text:sequence-decl text:display-outline-level="0" text:name="Lisa"/>
      </text:sequence-decls>
      <text:section text:style-name="Sect1" text:name="TextSection">
        <table:table table:name="Table1" table:style-name="Table1">
          <table:table-column table:style-name="Table1.A"/>
          <table:table-column table:style-name="Table1.B"/>
          <table:table-row table:style-name="Table1.1">
            <table:table-cell table:style-name="Table1.A1" table:number-columns-spanned="2" office:value-type="string">
              <text:p text:style-name="P28">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Arvutisüsteemide instituut</text:p>
            </table:table-cell>
            <table:covered-table-cell/>
          </table:table-row>
          <table:table-row table:style-name="Table1.4">
            <table:table-cell table:style-name="Table1.A1" table:number-columns-spanned="2" office:value-type="string">
              <text:p text:style-name="P10"/>
            </table:table-cell>
            <table:covered-table-cell/>
          </table:table-row>
          <table:table-row table:style-name="Table1.5">
            <table:table-cell table:style-name="Table1.A1" table:number-columns-spanned="2" office:value-type="string">
              <text:p text:style-name="P3"/>
            </table:table-cell>
            <table:covered-table-cell/>
          </table:table-row>
          <table:table-row table:style-name="Table1.6">
            <table:table-cell table:style-name="Table1.A1" table:number-columns-spanned="2" office:value-type="string">
              <text:p text:style-name="P36">Frank Christopher Kirch 221925IVCM</text:p>
            </table:table-cell>
            <table:covered-table-cell/>
          </table:table-row>
          <table:table-row table:style-name="Table1.7">
            <table:table-cell table:style-name="Table1.A7" table:number-columns-spanned="2" office:value-type="string">
              <text:p text:style-name="P34">KODUTÖÖ <text:span text:style-name="T57">1</text:span></text:p>
            </table:table-cell>
            <table:covered-table-cell/>
          </table:table-row>
          <table:table-row table:style-name="Table1.8">
            <table:table-cell table:style-name="Table1.A1" table:number-columns-spanned="2" office:value-type="string">
              <text:p text:style-name="P36">Kodutöö <text:span text:style-name="T74">1</text:span> <text:span text:style-name="T73">õppeaines IAX0584 Programmeerimine II</text:span></text:p>
            </table:table-cell>
            <table:covered-table-cell/>
          </table:table-row>
          <table:table-row table:style-name="Table1.5">
            <table:table-cell table:style-name="Table1.A1" office:value-type="string">
              <text:p text:style-name="P6">Juhendaja:</text:p>
            </table:table-cell>
            <table:table-cell table:style-name="Table1.A1" office:value-type="string">
              <text:p text:style-name="P35">Risto Heinsar</text:p>
            </table:table-cell>
          </table:table-row>
          <table:table-row table:style-name="Table1.5">
            <table:table-cell table:style-name="Table1.A1" office:value-type="string">
              <text:p text:style-name="P6"/>
            </table:table-cell>
            <table:table-cell table:style-name="Table1.A1" office:value-type="string">
              <text:p text:style-name="P35">Insener</text:p>
            </table:table-cell>
          </table:table-row>
          <table:table-row table:style-name="Table1.5">
            <table:table-cell table:style-name="Table1.A1" office:value-type="string">
              <text:p text:style-name="P6"/>
            </table:table-cell>
            <table:table-cell table:style-name="Table1.A1" office:value-type="string">
              <text:p text:style-name="P4"/>
            </table:table-cell>
          </table:table-row>
          <table:table-row table:style-name="Table1.5">
            <table:table-cell table:style-name="Table1.A1" office:value-type="string">
              <text:p text:style-name="P9"/>
            </table:table-cell>
            <table:table-cell table:style-name="Table1.A1" office:value-type="string">
              <text:p text:style-name="P8"/>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row table:style-name="Table1.5">
            <table:table-cell table:style-name="Table1.A1" office:value-type="string">
              <text:p text:style-name="P6"/>
            </table:table-cell>
            <table:table-cell table:style-name="Table1.A1" office:value-type="string">
              <text:p text:style-name="P5"/>
            </table:table-cell>
          </table:table-row>
        </table:table>
        <text:p text:style-name="Standard"/>
      </text:section>
      <text:h text:style-name="P41" text:outline-level="1"><text:bookmark-start text:name="_Toc143516448"/><text:bookmark-start text:name="__RefHeading___Toc2997_2890390417"/><text:bookmark-start text:name="_Toc143525416"/>Autorideklaratsioon<text:bookmark-end text:name="_Toc143516448"/><text:bookmark-end text:name="__RefHeading___Toc2997_2890390417"/><text:bookmark-end text:name="_Toc143525416"/></text:h>
      <text:p text:style-name="P29">Kinnitan, et olen koostanud antud kodutöö iseseisvalt <text:s/>ning seda ei ole kellegi teise poolt varem kaitsmisele esitatud. Kõik töö koostamisel kasutatud teiste autorite tööd, olulised seisukohad, kirjandusallikatest ja mujalt pärinevad andmed on töös viidatud.</text:p>
      <text:p text:style-name="P29">Autor: <text:span text:style-name="T16">Frank Christopher Kirch</text:span></text:p>
      <text:p text:style-name="P30"><text:span text:style-name="T57">28</text:span>.<text:span text:style-name="T57">0</text:span><text:span text:style-name="T48">2</text:span>.202<text:span text:style-name="T57">4</text:span></text:p>
      <text:p text:style-name="Standard"/>
      <text:h text:style-name="P42" text:outline-level="1"><text:bookmark-start text:name="_Toc437263082"/><text:bookmark-start text:name="_Toc143525417"/><text:bookmark-start text:name="__RefHeading___Toc2999_2890390417"/><text:bookmark-start text:name="_Toc143516449"/>Lühendite ja mõistete sõnastik<text:bookmark-end text:name="_Toc437263082"/><text:bookmark-end text:name="_Toc143525417"/><text:bookmark-end text:name="__RefHeading___Toc2999_2890390417"/><text:bookmark-end text:name="_Toc143516449"/></text:h>
      <table:table table:name="Table2" table:style-name="Table2">
        <table:table-column table:style-name="Table2.A"/>
        <table:table-column table:style-name="Table2.B"/>
        <table:table-row table:style-name="Table2.1">
          <table:table-cell table:style-name="Table2.A1" office:value-type="string">
            <text:p text:style-name="P75">Massiiv</text:p>
          </table:table-cell>
          <table:table-cell table:style-name="Table2.A1" office:value-type="string">
            <text:p text:style-name="P73">Indekseeritud ühetaoliste andmete kogum</text:p>
          </table:table-cell>
        </table:table-row>
        <table:table-row table:style-name="Table2.1">
          <table:table-cell table:style-name="Table2.A1" office:value-type="string">
            <text:p text:style-name="P73">Tähemassiiv (ing. k. <text:span text:style-name="T2">char array</text:span>)</text:p>
          </table:table-cell>
          <table:table-cell table:style-name="Table2.A1" office:value-type="string">
            <text:p text:style-name="P73">Indekseeritud sümbolitest koosnev andmete kogum</text:p>
          </table:table-cell>
        </table:table-row>
        <table:table-row table:style-name="Table2.1">
          <table:table-cell table:style-name="Table2.A1" office:value-type="string">
            <text:p text:style-name="P76">Struktuuride massiiv</text:p>
          </table:table-cell>
          <table:table-cell table:style-name="Table2.A1" office:value-type="string">
            <text:p text:style-name="P74">Indekseerit<text:span text:style-name="T73">av andmete kogum, mis sisaldab ühte initsialiseeritud struktuuride tüüpi, mille väljade sisu võib erineda.</text:span></text:p>
          </table:table-cell>
        </table:table-row>
      </table:table>
      <text:p text:style-name="Standard"/>
      <text:h text:style-name="P43" text:outline-level="1"><text:bookmark-start text:name="_Toc143516450"/><text:bookmark-start text:name="__RefHeading___Toc3001_2890390417"/><text:bookmark-start text:name="_Toc143525418"/>Sisukord<text:bookmark-end text:name="_Toc143516450"/><text:bookmark-end text:name="__RefHeading___Toc3001_2890390417"/><text:bookmark-end text:name="_Toc143525418"/></text:h>
      <text:p text:style-name="P12"/>
      <text:p text:style-name="P1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_Toc2997_2890390417" text:style-name="Index_20_Link" text:visited-style-name="Index_20_Link">Autorideklaratsioon<text:tab/>2</text:a></text:p>
          <text:p text:style-name="P46"><text:a xlink:type="simple" xlink:href="#__RefHeading___Toc2999_2890390417" text:style-name="Index_20_Link" text:visited-style-name="Index_20_Link">Lühendite ja mõistete sõnastik<text:tab/>3</text:a></text:p>
          <text:p text:style-name="P46"><text:a xlink:type="simple" xlink:href="#__RefHeading___Toc3001_2890390417" text:style-name="Index_20_Link" text:visited-style-name="Index_20_Link">Sisukord<text:tab/>4</text:a></text:p>
          <text:p text:style-name="P46"><text:a xlink:type="simple" xlink:href="#__RefHeading___Toc3003_2890390417" text:style-name="Index_20_Link" text:visited-style-name="Index_20_Link">Jooniste loetelu<text:tab/>5</text:a></text:p>
          <text:p text:style-name="P46"><text:a xlink:type="simple" xlink:href="#__RefHeading___Toc3005_2890390417" text:style-name="Index_20_Link" text:visited-style-name="Index_20_Link">Tabelite loetelu<text:tab/>6</text:a></text:p>
          <text:p text:style-name="P46"><text:a xlink:type="simple" xlink:href="#__RefHeading___Toc3007_2890390417" text:style-name="Index_20_Link" text:visited-style-name="Index_20_Link">1 Ülesande püstitus<text:tab/>7</text:a></text:p>
          <text:p text:style-name="P47"><text:a xlink:type="simple" xlink:href="#__RefHeading___Toc3009_2890390417" text:style-name="Index_20_Link" text:visited-style-name="Index_20_Link">1.1 Ülesande variant – Variant X-09 Birthdays<text:tab/>7</text:a></text:p>
          <text:p text:style-name="P46"><text:a xlink:type="simple" xlink:href="#__RefHeading___Toc3015_2890390417" text:style-name="Index_20_Link" text:visited-style-name="Index_20_Link">2 Lahenduse kirjeldus<text:tab/>8</text:a></text:p>
          <text:p text:style-name="P47"><text:a xlink:type="simple" xlink:href="#__RefHeading___Toc3017_2890390417" text:style-name="Index_20_Link" text:visited-style-name="Index_20_Link">2.1 Programmi töövoog<text:tab/>8</text:a></text:p>
          <text:p text:style-name="P47"><text:a xlink:type="simple" xlink:href="#__RefHeading___Toc3921_2890390417" text:style-name="Index_20_Link" text:visited-style-name="Index_20_Link">2.2 Funktsioonid<text:tab/>9</text:a></text:p>
          <text:p text:style-name="P48"><text:a xlink:type="simple" xlink:href="#__RefHeading___Toc3923_2890390417" text:style-name="Index_20_Link" text:visited-style-name="Index_20_Link">2.2.1 Põhiprogramm </text:a><text:a xlink:type="simple" xlink:href="#__RefHeading___Toc3923_2890390417" text:style-name="Index_20_Link" text:visited-style-name="Index_20_Link"><text:span text:style-name="T2">main() </text:span></text:a><text:a xlink:type="simple" xlink:href="#__RefHeading___Toc3923_2890390417" text:style-name="Index_20_Link" text:visited-style-name="Index_20_Link"><text:span text:style-name="T2">käsurea argumentide töötlemiseks</text:span></text:a><text:a xlink:type="simple" xlink:href="#__RefHeading___Toc3923_2890390417" text:style-name="Index_20_Link" text:visited-style-name="Index_20_Link"><text:tab/>9</text:a></text:p>
          <text:p text:style-name="P48"><text:a xlink:type="simple" xlink:href="#__RefHeading___Toc3925_2890390417" text:style-name="Index_20_Link" text:visited-style-name="Index_20_Link">2.2.2 Funktsioon </text:a><text:a xlink:type="simple" xlink:href="#__RefHeading___Toc3925_2890390417" text:style-name="Index_20_Link" text:visited-style-name="Index_20_Link"><text:span text:style-name="T2">C</text:span></text:a><text:a xlink:type="simple" xlink:href="#__RefHeading___Toc3925_2890390417" text:style-name="Index_20_Link" text:visited-style-name="Index_20_Link"><text:span text:style-name="T2">reateOutputString(</text:span></text:a><text:a xlink:type="simple" xlink:href="#__RefHeading___Toc3925_2890390417" text:style-name="Index_20_Link" text:visited-style-name="Index_20_Link"><text:span text:style-name="T2">)</text:span></text:a><text:a xlink:type="simple" xlink:href="#__RefHeading___Toc3925_2890390417" text:style-name="Index_20_Link" text:visited-style-name="Index_20_Link"><text:span text:style-name="T2"> väljundi loomiseks</text:span></text:a><text:a xlink:type="simple" xlink:href="#__RefHeading___Toc3925_2890390417" text:style-name="Index_20_Link" text:visited-style-name="Index_20_Link"><text:tab/>10</text:a></text:p>
          <text:p text:style-name="P48"><text:a xlink:type="simple" xlink:href="#__RefHeading___Toc3925_28903904171" text:style-name="Index_20_Link" text:visited-style-name="Index_20_Link">2.2.1 </text:a><text:a xlink:type="simple" xlink:href="#__RefHeading___Toc3925_28903904171" text:style-name="Index_20_Link" text:visited-style-name="Index_20_Link"><text:span text:style-name="T18">F</text:span></text:a><text:a xlink:type="simple" xlink:href="#__RefHeading___Toc3925_28903904171" text:style-name="Index_20_Link" text:visited-style-name="Index_20_Link"><text:span text:style-name="T18">unktsioon </text:span></text:a><text:a xlink:type="simple" xlink:href="#__RefHeading___Toc3925_28903904171" text:style-name="Index_20_Link" text:visited-style-name="Index_20_Link"><text:span text:style-name="T2">ParseAllEntriesToStructFromInputFile(</text:span></text:a><text:a xlink:type="simple" xlink:href="#__RefHeading___Toc3925_28903904171" text:style-name="Index_20_Link" text:visited-style-name="Index_20_Link"><text:span text:style-name="T2">) </text:span></text:a><text:a xlink:type="simple" xlink:href="#__RefHeading___Toc3925_28903904171" text:style-name="Index_20_Link" text:visited-style-name="Index_20_Link"><text:span text:style-name="T2">struktuuride väljade töötlemiseks</text:span></text:a><text:a xlink:type="simple" xlink:href="#__RefHeading___Toc3925_28903904171" text:style-name="Index_20_Link" text:visited-style-name="Index_20_Link"><text:tab/>11</text:a></text:p>
          <text:p text:style-name="P48"><text:a xlink:type="simple" xlink:href="#__RefHeading___Toc3925_2890390417112" text:style-name="Index_20_Link" text:visited-style-name="Index_20_Link">2.2.2 </text:a><text:a xlink:type="simple" xlink:href="#__RefHeading___Toc3925_2890390417112" text:style-name="Index_20_Link" text:visited-style-name="Index_20_Link"><text:span text:style-name="T18"><text:s/></text:span></text:a><text:a xlink:type="simple" xlink:href="#__RefHeading___Toc3925_2890390417112" text:style-name="Index_20_Link" text:visited-style-name="Index_20_Link"><text:span text:style-name="T18">F</text:span></text:a><text:a xlink:type="simple" xlink:href="#__RefHeading___Toc3925_2890390417112" text:style-name="Index_20_Link" text:visited-style-name="Index_20_Link"><text:span text:style-name="T2">unktsioon </text:span></text:a><text:a xlink:type="simple" xlink:href="#__RefHeading___Toc3925_2890390417112" text:style-name="Index_20_Link" text:visited-style-name="Index_20_Link"><text:span text:style-name="T2">RunProgram</text:span></text:a><text:a xlink:type="simple" xlink:href="#__RefHeading___Toc3925_2890390417112" text:style-name="Index_20_Link" text:visited-style-name="Index_20_Link"><text:span text:style-name="T2">(</text:span></text:a><text:a xlink:type="simple" xlink:href="#__RefHeading___Toc3925_2890390417112" text:style-name="Index_20_Link" text:visited-style-name="Index_20_Link"><text:span text:style-name="T2">) </text:span></text:a><text:a xlink:type="simple" xlink:href="#__RefHeading___Toc3925_2890390417112" text:style-name="Index_20_Link" text:visited-style-name="Index_20_Link"><text:span text:style-name="T2">väljundvoo loomiseks ja väljastamiseks</text:span></text:a><text:a xlink:type="simple" xlink:href="#__RefHeading___Toc3925_2890390417112" text:style-name="Index_20_Link" text:visited-style-name="Index_20_Link"><text:tab/>12</text:a></text:p>
          <text:p text:style-name="P48"><text:a xlink:type="simple" xlink:href="#__RefHeading___Toc3101_3450467568" text:style-name="Index_20_Link" text:visited-style-name="Index_20_Link">2.2.3 Funktsioon </text:a><text:a xlink:type="simple" xlink:href="#__RefHeading___Toc3101_3450467568" text:style-name="Index_20_Link" text:visited-style-name="Index_20_Link"><text:span text:style-name="T2">WriteStdoutToFile()</text:span></text:a><text:a xlink:type="simple" xlink:href="#__RefHeading___Toc3101_3450467568" text:style-name="Index_20_Link" text:visited-style-name="Index_20_Link"><text:tab/>12</text:a></text:p>
          <text:p text:style-name="P46"><text:a xlink:type="simple" xlink:href="#__RefHeading___Toc3021_2890390417" text:style-name="Index_20_Link" text:visited-style-name="Index_20_Link">3 Lisaülesanne<text:tab/>13</text:a></text:p>
          <text:p text:style-name="P47"><text:a xlink:type="simple" xlink:href="#__RefHeading___Toc3023_2890390417" text:style-name="Index_20_Link" text:visited-style-name="Index_20_Link">3.1 Eriolukordade analüüs<text:tab/>15</text:a></text:p>
          <text:p text:style-name="P46"><text:a xlink:type="simple" xlink:href="#__RefHeading___Toc3025_2890390417" text:style-name="Index_20_Link" text:visited-style-name="Index_20_Link"><text:span text:style-name="T18">4 </text:span></text:a><text:a xlink:type="simple" xlink:href="#__RefHeading___Toc3025_2890390417" text:style-name="Index_20_Link" text:visited-style-name="Index_20_Link"><text:span text:style-name="T18">Kokkuvõte</text:span></text:a><text:a xlink:type="simple" xlink:href="#__RefHeading___Toc3025_2890390417" text:style-name="Index_20_Link" text:visited-style-name="Index_20_Link"><text:tab/>17</text:a></text:p>
          <text:p text:style-name="P46"><text:a xlink:type="simple" xlink:href="#__RefHeading___Toc3029_2890390417" text:style-name="Index_20_Link" text:visited-style-name="Index_20_Link">Lisa 1 – Kuvatõmmised<text:tab/>18</text:a></text:p>
        </text:index-body>
      </text:table-of-content>
      <text:p text:style-name="P7"/>
      <text:h text:style-name="P44" text:outline-level="1"><text:bookmark-start text:name="_Toc437263083"/><text:bookmark-start text:name="_Toc143525419"/><text:bookmark-start text:name="__RefHeading___Toc3003_2890390417"/><text:bookmark-start text:name="_Toc143516451"/>Jooniste loetelu<text:bookmark-end text:name="_Toc437263083"/><text:bookmark-end text:name="_Toc143525419"/><text:bookmark-end text:name="__RefHeading___Toc3003_2890390417"/><text:bookmark-end text:name="_Toc143516451"/></text:h>
      <text:illustration-index text:style-name="Sect1" text:protected="true" text:name="Table of Figures1">
        <text:illustration-index-source text:caption-sequence-name="Joonis"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p text:style-name="P13"/>
      <text:h text:style-name="P45" text:outline-level="1"><text:bookmark-start text:name="_Toc437263084"/><text:bookmark-start text:name="_Toc143525420"/><text:bookmark-start text:name="__RefHeading___Toc3005_2890390417"/><text:bookmark-start text:name="_Toc143516452"/>Tabelite loetelu<text:bookmark-end text:name="_Toc437263084"/><text:bookmark-end text:name="_Toc143525420"/><text:bookmark-end text:name="__RefHeading___Toc3005_2890390417"/><text:bookmark-end text:name="_Toc143516452"/></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9"><text:a xlink:type="simple" xlink:href="#Tabel!0%7Csequence" text:style-name="Index_20_Link" text:visited-style-name="Index_20_Link">Tabel 1. Eriolukordade analüüs<text:tab/>16</text:a></text:p>
        </text:index-body>
      </text:illustration-index>
      <text:p text:style-name="P14"><text:bookmark-start text:name="_Toc437856790"/><text:bookmark-start text:name="_Toc437263085"/><text:bookmark-start text:name="_Toc371596364"/><text:bookmark-start text:name="_Ref371595904"/><text:bookmark-start text:name="_Toc370226608"/></text:p>
      <text:list xml:id="list4214132392" text:style-name="WWNum5">
        <text:list-item>
          <text:h text:style-name="P51" text:outline-level="1"><text:bookmark-start text:name="_Toc143525421"/><text:bookmark-start text:name="_Toc143516453"/><text:bookmark-start text:name="_Toc82609479"/><text:bookmark-start text:name="__RefHeading___Toc3007_2890390417"/><text:bookmark-end text:name="_Toc437856790"/><text:bookmark-end text:name="_Toc437263085"/><text:bookmark-end text:name="_Toc371596364"/><text:bookmark-end text:name="_Ref371595904"/><text:bookmark-end text:name="_Toc370226608"/>Ülesande püstitus<text:bookmark-start text:name="_Ref371498087"/><text:bookmark-start text:name="_Toc370226609"/><text:bookmark-start text:name="_Ref370278170"/><text:bookmark-end text:name="_Toc143525421"/><text:bookmark-end text:name="_Toc143516453"/><text:bookmark-end text:name="_Toc82609479"/><text:bookmark-end text:name="__RefHeading___Toc3007_2890390417"/></text:h>
        </text:list-item>
      </text:list>
      <text:p text:style-name="P96"><text:span text:style-name="T36">Kodutöö </text:span><text:span text:style-name="T37">1</text:span><text:span text:style-name="T36"> </text:span><text:span text:style-name="T38">kätkeb endas nõuet luua</text:span><text:span text:style-name="T36"> tarkvaraline lahendus vastavalt variandis antud teemale ja nõuetele. </text:span><text:span text:style-name="T38">Esitatud lahendus tuleb dokumenteeida</text:span><text:span text:style-name="T36">. </text:span></text:p>
      <text:list xml:id="list25222119419219" text:continue-numbering="true" text:style-name="WWNum5">
        <text:list-item>
          <text:list>
            <text:list-item>
              <text:h text:style-name="P54" text:outline-level="2"><text:bookmark-start text:name="_Toc143516454"/><text:bookmark-start text:name="__RefHeading___Toc3009_2890390417"/><text:bookmark-start text:name="_Toc143525422"/>Ülesande variant<text:bookmark-end text:name="_Toc143516454"/><text:bookmark-end text:name="_Toc143525422"/> – <text:span text:style-name="T57">Variant X-09 Birthdays</text:span><text:bookmark-end text:name="__RefHeading___Toc3009_2890390417"/></text:h>
            </text:list-item>
          </text:list>
        </text:list-item>
      </text:list>
      <text:p text:style-name="P37">Kodutöö lahedamisel genereeriti variant lähtuvalt tudengi matriklinumbrit. Selle töö varandi genereerimiseks kasutati matriklinumbrit 221925.</text:p>
      <text:p text:style-name="P37"/>
      <text:p text:style-name="P38">Kodutöö <text:span text:style-name="T57">1</text:span> <text:span text:style-name="T57">ülesande püstitus on lugeda failist inimesed ja nende sünnipäevad. Ülesande lahenduses kuvada need inimesed, kellel on sünnipäeva valitud kuupäeval ning need inimesed, kellel on 14 päeva </text:span><text:span text:style-name="T77">jooksul</text:span><text:span text:style-name="T57"> sünnipäev. </text:span><text:span text:style-name="T58">Ülesande probleemikirjelduses on toodud järgmised nõuded:</text:span></text:p>
      <text:list xml:id="list3316005861" text:style-name="L1">
        <text:list-item>
          <text:p text:style-name="P83"><text:bookmark text:name="fn"/>Andmed loetakse failist ja hoitakse struktuuride masiivis. Fail sisaldab:</text:p>
          <text:list>
            <text:list-item>
              <text:p text:style-name="P83">nime</text:p>
            </text:list-item>
            <text:list-item>
              <text:p text:style-name="P83">sünnikuupäeva (pesastatud struktuur)</text:p>
              <text:list>
                <text:list-item>
                  <text:p text:style-name="P83">päev</text:p>
                </text:list-item>
                <text:list-item>
                  <text:p text:style-name="P83">kuu</text:p>
                </text:list-item>
                <text:list-item>
                  <text:p text:style-name="P83">aasta</text:p>
                </text:list-item>
              </text:list>
            </text:list-item>
          </text:list>
        </text:list-item>
        <text:list-item>
          <text:p text:style-name="P83">Kasutajalt palutakse sisestada kuupäev (dd.mm.yyyy formaadis)</text:p>
        </text:list-item>
        <text:list-item>
          <text:p text:style-name="P83">Program leiab kõigi nimed, ning nende sünnikuupäevad, kel on 14 päeva jooksul sünnipäev</text:p>
        </text:list-item>
        <text:list-item>
          <text:p text:style-name="P83">Program õnnitleb ka neid inimesi, kel on sünnipäev kasutaja poolt sisestatudisestatud kuupäeval</text:p>
        </text:list-item>
        <text:list-item>
          <text:p text:style-name="P84">Tulemused tuleb hoiustada failis ning kuvada ekraanil</text:p>
        </text:list-item>
      </text:list>
      <text:p text:style-name="P62">Ülaltoodud kirjeldus ei sätesta piiranguid struktruui ja pesastatust struktuuri väljade lisamisele. Minu lahendus kätkeb uute struktuuri väljade loomist ülesande lahendamiseks.</text:p>
      <text:p text:style-name="P31"><text:bookmark-end text:name="_Ref371498087"/><text:bookmark-end text:name="_Ref370278170"/><text:bookmark-end text:name="_Toc370226609"/></text:p>
      <text:list xml:id="list25221821399220" text:continue-list="list25222119419219" text:style-name="WWNum5">
        <text:list-item>
          <text:h text:style-name="P52" text:outline-level="1"><text:bookmark-start text:name="_Toc82609482"/><text:bookmark-start text:name="_Toc143525425"/><text:bookmark-start text:name="__RefHeading___Toc3015_2890390417"/><text:bookmark-start text:name="_Toc143516457"/>Lahenduse kirjeldus<text:bookmark-end text:name="_Toc82609482"/><text:bookmark-end text:name="_Toc143525425"/><text:bookmark-end text:name="__RefHeading___Toc3015_2890390417"/><text:bookmark-end text:name="_Toc143516457"/></text:h>
        </text:list-item>
      </text:list>
      <text:p text:style-name="P78">Programmi eesmärk on<text:span text:style-name="T62"> kuvada need inimesed, kellel on sünnipäeva valitud kuupäeval ning need inimesed, kellel on 14 päeva pärast sünnipäev. </text:span></text:p>
      <text:p text:style-name="P40"><text:span text:style-name="T20">P</text:span><text:span text:style-name="T18">rogramm on võimeline jooksma mitme käsurea argumendiga nagu nõutav lisaülesande tingimustest. </text:span><text:span text:style-name="T27">Programm on võ</text:span><text:span text:style-name="T28">imeline võtma vastu sisend- ja väljundfaili nime, ning lubada kasutajal väljalülitada tulemuste kuvamine ekraanile.</text:span></text:p>
      <text:list xml:id="list25222426971021" text:continue-numbering="true" text:style-name="WWNum5">
        <text:list-item>
          <text:list>
            <text:list-item>
              <text:h text:style-name="P54" text:outline-level="2"><text:bookmark-start text:name="__RefHeading___Toc3017_2890390417"/><text:bookmark-start text:name="_Toc143525426"/>Programmi töövoog<text:bookmark-end text:name="__RefHeading___Toc3017_2890390417"/><text:bookmark-end text:name="_Toc143525426"/></text:h>
            </text:list-item>
          </text:list>
        </text:list-item>
      </text:list>
      <text:p text:style-name="P85">1. <text:s/>Programm <text:span text:style-name="T49">kontrollib millised käsurea argumendid on kaasa antud programmi käivitusel. </text:span><text:span text:style-name="T64">Käsurea argumendid annavad võimaluse defineerida sisendfaili, väljundfaili ning ka seda kas tulemused kuvatakse ekraanil.</text:span></text:p>
      <text:p text:style-name="P85">2. <text:s/><text:span text:style-name="T49">Programm</text:span><text:span text:style-name="T54">i </text:span><text:span text:style-name="T63">küsib</text:span><text:span text:style-name="T54"> kasutajalt sisend</text:span><text:span text:style-name="T63">iks kuupäeva, ning valideerib selle korrektsuse</text:span></text:p>
      <text:p text:style-name="P86"><text:span text:style-name="T63">3. Korrektse kuupäeva korral loeb programm </text:span><text:span text:style-name="T64">sisend</text:span><text:span text:style-name="T63">faili, mis sisaldab inimeste nime ning nende sünnikuupäeva formaadis dd.mm.yyyy.</text:span></text:p>
      <text:p text:style-name="P87">4. Programm lisab nime ja sünnikuupäeva struktuuri, ning <text:span text:style-name="T77">valideerib</text:span> sünnikuupäeva korrektsus<text:span text:style-name="T77">t</text:span>. Kuupäeva korrektsuse valideerimiseks loome pesastatud struktuuri, kus hoiame päeva, kuu ning aasta eraldi.</text:p>
      <text:p text:style-name="P87">5. Pesastatud struktuuri <text:span text:style-name="T64">sisse</text:span> loome abistavad väljad, <text:span text:style-name="T77">kuhu</text:span> salvestam<text:span text:style-name="T64">e</text:span> tõeväärtused kas inimesel on sünnipäev kasutaja poolt sisestatud kuupäeval, või sünnipäev 14 päeva jooksul etteantud kuupäevast alates.</text:p>
      <text:p text:style-name="P87">6. <text:span text:style-name="T54">Programm suudab tuvastada </text:span>failis sünnikuupäeva kirjed<text:span text:style-name="T54">, mis on </text:span>ebakorrektsed ning nullväärtustab nende inimeste pesastatud struktuuri <text:span text:style-name="T77">väljad</text:span>.</text:p>
      <text:p text:style-name="P85"><text:span text:style-name="T63">7</text:span>. Progr<text:span text:style-name="T63">amm </text:span><text:span text:style-name="T54">sorteeri</text:span><text:span text:style-name="T63">b</text:span><text:span text:style-name="T54"> </text:span><text:span text:style-name="T63">mullsordi</text:span><text:span text:style-name="T17"> </text:span><text:span text:style-name="T46">funktsiooniga </text:span><text:span text:style-name="T47">sünnipäeva põhjal kasvavasse </text:span><text:span text:style-name="T46">järjestikku.</text:span></text:p>
      <text:p text:style-name="P88"><text:soft-page-break/><text:span text:style-name="T60">8</text:span><text:span text:style-name="T59">. <text:s/></text:span><text:span text:style-name="T61">Programm kuvab tulemused lähtuvalt käsurea argumentides valitud väljundfaili ning ekraanile, kui viimane pole kasutaja poolt keelatud.</text:span></text:p>
      <text:list xml:id="list25223283694242" text:continue-numbering="true" text:style-name="WWNum5">
        <text:list-item>
          <text:list>
            <text:list-item>
              <text:h text:style-name="P56" text:outline-level="2"><text:bookmark-start text:name="__RefHeading___Toc3921_2890390417"/>Funktsioonid<text:bookmark-end text:name="__RefHeading___Toc3921_2890390417"/></text:h>
            </text:list-item>
          </text:list>
        </text:list-item>
      </text:list>
      <text:p text:style-name="P33">Lahendatud ülesanne sisaldab rohkelt funktsioon<text:span text:style-name="T76">e</text:span>, et <text:span text:style-name="T68">vähendavad põhifunktsiooni </text:span><text:span text:style-name="T76">main()</text:span><text:span text:style-name="T68"> suurust</text:span>. <text:s/>Programmi peamine sisu on funktsioonides <text:span text:style-name="T2">main</text:span><text:span text:style-name="T4">()</text:span><text:span text:style-name="T2">,</text:span><text:span text:style-name="T4"> RunProgram(), </text:span><text:span text:style-name="T2"><text:s/>ParseAllEntriesToStructFromInputFile(</text:span><text:span text:style-name="T4">), ja C</text:span><text:span text:style-name="T2">reateOutputString(</text:span><text:span text:style-name="T4">)</text:span> </text:p>
      <text:list xml:id="list25223512681104" text:continue-numbering="true" text:style-name="WWNum5">
        <text:list-item>
          <text:list>
            <text:list-item>
              <text:list>
                <text:list-item>
                  <text:h text:style-name="Heading_20_3" text:outline-level="3"><text:bookmark-start text:name="__RefHeading___Toc3923_2890390417"/>Põhiprogramm <text:span text:style-name="T2">main() </text:span><text:span text:style-name="T6">käsurea argumentide töötlemiseks</text:span><text:bookmark-end text:name="__RefHeading___Toc3923_2890390417"/></text:h>
                </text:list-item>
              </text:list>
            </text:list-item>
          </text:list>
        </text:list-item>
      </text:list>
      <text:p text:style-name="P32">Ülesande põhifunktsioon main() <text:span text:style-name="T54">käivitab</text:span> <text:span text:style-name="T54">kaasaantud käsurea argumentide abil ülesande. </text:span><text:span text:style-name="T68">Põhifunktsioon eraldab baasülesande ning lisaülesande võimekuse tingimuslausetega. Samuti kasutab funktsioon käsurea argumente sisend- ja väljundfaili nime defineerimiseks.</text:span></text:p>
      <text:p text:style-name="P32"><draw:frame draw:style-name="fr1" draw:name="Frame14" text:anchor-type="char" svg:width="5.9055in" draw:z-index="0"><draw:text-box fo:min-height="5.1161in"><text:p text:style-name="Lisa"><draw:frame draw:style-name="fr7" draw:name="Image1" text:anchor-type="char" svg:width="5.9055in" svg:height="4.3146in" draw:z-index="4"><draw:image xlink:href="Pictures/10000001000003220000024AD72F9FF65F9DEF86.png" xlink:type="simple" xlink:show="embed" xlink:actuate="onLoad" draw:mime-type="image/png"/></draw:frame></text:p><text:p text:style-name="Lisa">Lisa <text:sequence text:ref-name="refLisa0" text:name="Lisa" text:formula="ooow:Lisa+1" style:num-format="1">1</text:sequence>: Funktsioon<text:span text:style-name="T53">i</text:span> main()<text:span text:style-name="T18"> </text:span><text:span text:style-name="T23">koodi osa.</text:span><text:span text:style-name="T18"> </text:span></text:p></draw:text-box></draw:frame>Funktsioon main() võimaldab kasutajal valida, kas lahendab <text:span text:style-name="T45">põhi- või lisaülesannet. </text:span></text:p>
      <text:list xml:id="list25223104444558" text:continue-numbering="true" text:style-name="WWNum5">
        <text:list-item>
          <text:list>
            <text:list-item>
              <text:list>
                <text:list-item>
                  <text:h text:style-name="Heading_20_3" text:outline-level="3"><text:bookmark-start text:name="__RefHeading___Toc3925_2890390417"/><text:soft-page-break/><text:span text:style-name="T70">F</text:span>unktsioon <text:span text:style-name="T4">C</text:span><text:span text:style-name="T5">reateOutputString(</text:span><text:span text:style-name="T4">)</text:span><text:span text:style-name="T6"> väljundi loomiseks</text:span><text:bookmark-start text:name="__RefHeading___Toc3925_289039041713"/><text:bookmark-start text:name="__RefHeading___Toc3925_289039041712"/><text:bookmark-end text:name="__RefHeading___Toc3925_2890390417"/><text:bookmark-end text:name="__RefHeading___Toc3925_289039041713"/><text:bookmark-end text:name="__RefHeading___Toc3925_289039041712"/></text:h>
                </text:list-item>
              </text:list>
            </text:list-item>
          </text:list>
          <text:p text:style-name="P77"><draw:frame draw:style-name="fr4" draw:name="Frame15" text:anchor-type="paragraph" svg:width="5.9055in" style:rel-width="100%" svg:height="2.9909in" style:rel-height="scale-min" draw:z-index="1"><draw:text-box><text:p text:style-name="Lisa"><draw:frame draw:style-name="fr7" draw:name="Image2" text:anchor-type="char" svg:width="5.9055in" svg:height="5.0236in" draw:z-index="3"><draw:image xlink:href="Pictures/1000000100000324000002ACD3B183D1211CAE91.png" xlink:type="simple" xlink:show="embed" xlink:actuate="onLoad" draw:mime-type="image/png"/></draw:frame></text:p><text:p text:style-name="Lisa">Lisa <text:sequence text:ref-name="refLisa1" text:name="Lisa" text:formula="ooow:Lisa+1" style:num-format="1">2</text:sequence>: Funktsioon <text:span text:style-name="T69">CreateOutputString</text:span><text:span text:style-name="T55">()</text:span></text:p></draw:text-box></draw:frame><text:span text:style-name="T25">Funktsioon </text:span><text:span text:style-name="T30">loob ühe terviku väljundvoo struktuuride massiivi ja selle suuruse, ning kasutaja sisendina antud kuupäeva põhjal, samuti ka sünnipäevaliste arvu ning 14 päeva vältel tähistavate inimeste arvu abil. Funktsioon on probleemne, loodav väljundvoog on tähemassiiv, mille suurus kasvab iga kirjega. Funktsioon vajab lihtsustamist, et vältida väljundvoo puhvri ületäitumist. Hetkel on selle suurus piirang defineerimata. Kasutusele tuleks võtta snprintf(), ning asendada see kasutusel oleva sprintf() sisseehitatud teegi funktsiooniga.</text:span></text:p>
          <text:p text:style-name="P77"><text:span text:style-name="T30">Funktsioon </text:span><text:span text:style-name="T31">loob</text:span><text:span text:style-name="T7"> </text:span><text:span text:style-name="T30">väljundvoo ning tagastab selle suuruse.</text:span><text:span text:style-name="T31"> See funktsioon kutsutakse välja funktsioonis</text:span><text:span text:style-name="T30"> </text:span><text:span text:style-name="T8">ParseAllEntriesToStructFromInputFile</text:span><text:span text:style-name="T30">(), </text:span><text:span text:style-name="T31">kus tagastatakse väljundvoo suurus.</text:span></text:p>
        </text:list-item>
      </text:list>
      <text:h text:style-name="P57" text:outline-level="3"><text:span text:style-name="T30"/></text:h>
      <text:list xml:id="list25223236920056" text:continue-numbering="true" text:style-name="WWNum5">
        <text:list-item>
          <text:list>
            <text:list-item>
              <text:list>
                <text:list-item>
                  <text:h text:style-name="P58" text:outline-level="3"><text:bookmark-start text:name="__RefHeading___Toc3925_28903904171"/><text:span text:style-name="T33">F</text:span><text:span text:style-name="T30">unktsioon </text:span><text:span text:style-name="T5">ParseAllEntriesToStructFromInputFile(</text:span><text:span text:style-name="T4">) </text:span><text:span text:style-name="T6">struktuuride väljade töötlemiseks</text:span><text:bookmark-end text:name="__RefHeading___Toc3925_28903904171"/></text:h>
                </text:list-item>
              </text:list>
            </text:list-item>
          </text:list>
        </text:list-item>
      </text:list>
      <text:p text:style-name="P97"><text:span text:style-name="T24">F</text:span><text:span text:style-name="T32">unktsioon </text:span><text:span text:style-name="T6">ParseAllEntriesToStructFromInputFile() </text:span><text:span text:style-name="T32">init</text:span><text:span text:style-name="T39">s</text:span><text:span text:style-name="T32">ialiseerib struktuuride massiivis iga struktuuri juurde kuuluva pesastatud struktuuri </text:span><text:span text:style-name="T6">dateOfBirth</text:span><text:span text:style-name="T32"> väljad. Ebakorrektse kuupäeva korral nullväärtustab selle pesastatud struktuuri väljad, et vältida tulemuste väljastamisel sisulisi vigu. Funktsioon init</text:span><text:span text:style-name="T39">s</text:span><text:span text:style-name="T32">ialiseerib sünnipäevade staatuse hoi</text:span><text:span text:style-name="T39">u</text:span><text:span text:style-name="T32">stamiseks </text:span><text:span text:style-name="T39">täiendavad struktuuri </text:span><text:span text:style-name="T32">väljad tõeväärtuse tüübiga</text:span><text:span text:style-name="T6">.</text:span><text:span text:style-name="T32"> Funktsioon kutsub välja funktsiooni </text:span><text:span text:style-name="T6">CreateOutputString() </text:span><text:span text:style-name="T32">väljundvoo tekitamiseks, ning tagastab </text:span><text:span text:style-name="T39">väljundvoo</text:span><text:span text:style-name="T32"> suuruse. </text:span><text:span text:style-name="T39">Seda ja </text:span><text:span text:style-name="T31">väljundvoogu ise</text:span><text:span text:style-name="T32"> kasutatakse </text:span><text:span text:style-name="T39">funktsioonis</text:span><text:span text:style-name="T32"> <text:s/>RunProgram().</text:span></text:p>
      <text:p text:style-name="P92"><text:bookmark-start text:name="__RefHeading___Toc3927_28903904171"/><draw:frame draw:style-name="fr1" draw:name="Frame16" text:anchor-type="char" svg:width="5.9055in" draw:z-index="5"><draw:text-box fo:min-height="3.3756in"><text:p text:style-name="Lisa"><draw:frame draw:style-name="fr7" draw:name="Image3" text:anchor-type="char" svg:width="5.9055in" svg:height="4.411in" draw:z-index="6"><draw:image xlink:href="Pictures/10000001000003F0000002F1FD530BF5E8B58D6D.png" xlink:type="simple" xlink:show="embed" xlink:actuate="onLoad" draw:mime-type="image/png"/></draw:frame></text:p><text:p text:style-name="P60">Lisa <text:sequence text:ref-name="refLisa2" text:name="Lisa" text:formula="ooow:Lisa+1" style:num-format="1">3</text:sequence>: Funktsioon <text:span text:style-name="T5">ParseAllEntriesToStructFromInputFile(</text:span><text:span text:style-name="T4">)</text:span></text:p><text:p text:style-name="Lisa"/></draw:text-box></draw:frame><text:bookmark-end text:name="__RefHeading___Toc3927_28903904171"/><text:span text:style-name="T6"/></text:p>
      <text:list xml:id="list25222117225522" text:continue-numbering="true" text:style-name="WWNum5">
        <text:list-item>
          <text:list>
            <text:list-item>
              <text:list>
                <text:list-item>
                  <text:h text:style-name="P58" text:outline-level="3"><text:bookmark-start text:name="__RefHeading___Toc3925_2890390417112"/><text:span text:style-name="T21"><text:s/></text:span><text:span text:style-name="T33">F</text:span><text:span text:style-name="T7">unktsioon </text:span><text:span text:style-name="T9">RunProgram</text:span><text:span text:style-name="T5">(</text:span><text:span text:style-name="T4">) </text:span><text:span text:style-name="T9">väljundvoo loomiseks ja väljastamiseks</text:span><text:bookmark-end text:name="__RefHeading___Toc3925_2890390417112"/></text:h>
                </text:list-item>
              </text:list>
            </text:list-item>
          </text:list>
        </text:list-item>
      </text:list>
      <text:p text:style-name="P94"><text:bookmark-start text:name="__RefHeading___Toc3927_28903904172"/><text:span text:style-name="T24">F</text:span><text:span text:style-name="T32">unktsioon </text:span><text:span text:style-name="T2">RunProgram</text:span><text:span text:style-name="T6">() </text:span><text:span text:style-name="T32">init</text:span><text:span text:style-name="T39">s</text:span><text:span text:style-name="T32">ialiseerib </text:span><text:span text:style-name="T18">väljundvoo ning </text:span><text:span text:style-name="T39">täidab selle väljundvoo </text:span><text:span text:style-name="T18">pesastatud funktsiooniga</text:span><text:span text:style-name="T2"> ParseAllEntriesToStructFromInputFile().</text:span><text:span text:style-name="T18"> </text:span><text:span text:style-name="T33">Funktsioon </text:span><text:span text:style-name="T39">omakorda </text:span><text:span text:style-name="T33">kutsub välja funktsiooni </text:span><text:span text:style-name="T10">WriteStdoutToFile() </text:span><text:span text:style-name="T39">selle</text:span><text:span text:style-name="T14"> </text:span><text:span text:style-name="T33">väljundvoo faili kirjutamiseks. <text:s/>Funktsioon hoidub <text:s/>väljundvoo näitamis</text:span><text:span text:style-name="T39">t</text:span><text:span text:style-name="T33"> terminali aknas kui programm käivitada vastava käsurea argumendiga, </text:span><text:span text:style-name="T39">milleks on</text:span><text:span text:style-name="T33"> --</text:span><text:span text:style-name="T39">prompt=disabled või -p=disabled</text:span><text:span text:style-name="T33">.</text:span><draw:frame draw:style-name="fr3" draw:name="Frame8" text:anchor-type="char" svg:width="5.9055in" draw:z-index="7"><draw:text-box fo:min-height="2.9528in"><text:p text:style-name="Lisa"><draw:frame draw:style-name="fr6" draw:name="Image17" text:anchor-type="paragraph" svg:width="5.9055in" style:rel-width="100%" svg:height="2.9528in" style:rel-height="scale" draw:z-index="8"><draw:image xlink:href="Pictures/10000001000002AC00000156A9582BD882B6489E.png" xlink:type="simple" xlink:show="embed" xlink:actuate="onLoad" draw:mime-type="image/png"/></draw:frame>Lisa <text:sequence text:ref-name="refLisa14" text:name="Lisa" text:formula="ooow:Lisa+1" style:num-format="1">4</text:sequence>: Funktsioon RunProgram()</text:p></draw:text-box></draw:frame><text:bookmark-end text:name="__RefHeading___Toc3927_28903904172"/></text:p>
      <text:list xml:id="list25223392977739" text:continue-numbering="true" text:style-name="WWNum5">
        <text:list-item>
          <text:list>
            <text:list-item>
              <text:list>
                <text:list-item>
                  <text:h text:style-name="Heading_20_3" text:outline-level="3"><text:bookmark-start text:name="__RefHeading___Toc3101_3450467568"/>Funktsioon <text:span text:style-name="T2">WriteStdoutToFile()</text:span><text:bookmark-end text:name="__RefHeading___Toc3101_3450467568"/></text:h>
                </text:list-item>
              </text:list>
            </text:list-item>
          </text:list>
        </text:list-item>
      </text:list>
      <text:p text:style-name="P93"><text:bookmark-start text:name="__RefHeading___Toc3927_2890390417"/><text:span text:style-name="T24">F</text:span><text:span text:style-name="T32">unktsioon</text:span><text:span text:style-name="T6"> </text:span><text:span text:style-name="T10">WriteStdoutToFile()</text:span><text:span text:style-name="T6"> </text:span><text:span text:style-name="T10">kirjutab</text:span><text:span text:style-name="T32"> </text:span><text:span text:style-name="T18">väljundvoo </text:span><text:span text:style-name="T33">sisu väljundfaili. Funktsioon võtab parameetrina väljundfaili sisu, mis on staatilise</text:span><text:span text:style-name="T39">lt</text:span><text:span text:style-name="T33"> väärtustatud või ülekirjutatud käsurea</text:span><text:span text:style-name="T34"> argumendiga.</text:span><text:bookmark-end text:name="__RefHeading___Toc3927_2890390417"/></text:p>
      <text:p text:style-name="P79"><draw:frame draw:style-name="fr7" draw:name="Image18" text:anchor-type="char" svg:width="5.9055in" svg:height="2.2654in" draw:z-index="9"><draw:image xlink:href="Pictures/10000001000003350000013B95A2A784420AB5B9.png" xlink:type="simple" xlink:show="embed" xlink:actuate="onLoad" draw:mime-type="image/png"/></draw:frame></text:p>
      <text:list xml:id="list25223639880553" text:continue-numbering="true" text:style-name="WWNum5">
        <text:list-item>
          <text:h text:style-name="P53" text:outline-level="1"><text:bookmark-start text:name="__RefHeading___Toc3021_2890390417"/>Lisaülesanne<text:bookmark-end text:name="__RefHeading___Toc3021_2890390417"/></text:h>
        </text:list-item>
      </text:list>
      <text:p text:style-name="P81"><text:span text:style-name="T71">Baasülesanne nõudis programmi käivitamist </text:span><text:span text:style-name="T72">erineva </text:span><text:span text:style-name="T71">sisendfaili nimega, </text:span><text:span text:style-name="T72">milleks programm ootab käsurea argumenti –input=input_filename.txt</text:span><text:span text:style-name="T71">. Lisaks, programm võimaldab lugeda kirjeldust käsurea argumentide kasutamise kohta, kasutades argumenti </text:span><text:span text:style-name="T56"><text:s/>--</text:span><text:span text:style-name="T3">help </text:span><text:span text:style-name="T56">või </text:span><text:span text:style-name="T3">-h</text:span><text:span text:style-name="T56">.</text:span></text:p>
      <text:p text:style-name="P80"><draw:frame draw:style-name="fr1" draw:name="Frame3" text:anchor-type="char" svg:width="5.9055in" draw:z-index="2"><draw:text-box fo:min-height="2.289in"><text:p text:style-name="P61"><draw:frame draw:style-name="fr7" draw:name="Image6" text:anchor-type="char" svg:width="5.9055in" svg:height="3.939in" draw:z-index="10"><draw:image xlink:href="Pictures/10000001000003700000024BF22471ADED234B71.png" xlink:type="simple" xlink:show="embed" xlink:actuate="onLoad" draw:mime-type="image/png"/></draw:frame></text:p><text:p text:style-name="P61">Lisa <text:sequence text:ref-name="refLisa3" text:name="Lisa" text:formula="ooow:Lisa+1" style:num-format="1">5</text:sequence>: Käsurea argumendid <text:span text:style-name="T3">-</text:span><text:span text:style-name="T11">-prompt=disabled </text:span><text:span text:style-name="T35">ja</text:span><text:span text:style-name="T11"> --output=output_filename.txt</text:span></text:p></draw:text-box></draw:frame>Lisaülesande lahendus nõudis võimalust keelata väljundvoo kuvamist terminali aknas. Seda saavutame käsurea argumendiga --<text:span text:style-name="T2">prompt=disabled</text:span>. </text:p>
      <text:p text:style-name="P81"><text:span text:style-name="T72">L</text:span><text:span text:style-name="T71">isaks, <text:s/>lisaülesande lahendus nõudis väljundfaili nime </text:span><text:span text:style-name="T76">valimist</text:span><text:span text:style-name="T72">, milleks kasutame käsurea argumenti –o</text:span><text:span text:style-name="T11">utput=output_filename.tx</text:span><text:span text:style-name="T12">t</text:span><text:span text:style-name="T71">.</text:span></text:p>
      <text:p text:style-name="P81"><draw:frame draw:style-name="fr1" draw:name="Frame1" text:anchor-type="char" svg:width="5.9055in" draw:z-index="11"><draw:text-box fo:min-height="4.6472in"><text:p text:style-name="Lisa"><draw:frame draw:style-name="fr6" draw:name="Image4" text:anchor-type="paragraph" svg:width="5.9055in" style:rel-width="100%" svg:height="4.6472in" style:rel-height="scale" draw:z-index="12"><draw:image xlink:href="Pictures/10000001000003AB000002E32A1B79DBDE4CE87C.png" xlink:type="simple" xlink:show="embed" xlink:actuate="onLoad" draw:mime-type="image/png"/></draw:frame>Lisa <text:sequence text:ref-name="refLisa4" text:name="Lisa" text:formula="ooow:Lisa+1" style:num-format="1">6</text:sequence>: Lisaülesande osa põhiprogrammis main()</text:p></draw:text-box></draw:frame><text:soft-page-break/></text:p>
      <text:p text:style-name="P82">Programm lubab kuni neli käsurea argumenti, ning lähtuvalt arvust mõjutab <text:span text:style-name="T76">see </text:span>programmi režiimi. Kui kasutaja sisestab ühe argumendi, peab see olema kas --<text:span text:style-name="T2">help</text:span> või failist lugemise korral <text:span text:style-name="T2">--input=filename.txt</text:span>. Kahe käsurea argumendil <text:span text:style-name="T76">korrral </text:span>programm ootab kas käsurea argumenti <text:span text:style-name="T2">--prompt=disabled</text:span> või --<text:span text:style-name="T2">output=filename.txt.</text:span> Kolme korral ootab järjestust --<text:span text:style-name="T2">input=filename.txt --prompt=disable --output=filename.tx</text:span><text:span text:style-name="T13">t.</text:span></text:p>
      <text:list xml:id="list25223689789221" text:continue-numbering="true" text:style-name="WWNum5">
        <text:list-item>
          <text:list>
            <text:list-item>
              <text:h text:style-name="P55" text:outline-level="2"><text:bookmark-start text:name="__RefHeading___Toc3023_2890390417"/><text:bookmark-start text:name="_Toc143525428"/>Eriolukordade analüüs<text:bookmark-end text:name="__RefHeading___Toc3023_2890390417"/><text:bookmark-end text:name="_Toc143525428"/></text:h>
            </text:list-item>
          </text:list>
        </text:list-item>
      </text:list>
      <text:p text:style-name="P27"><text:bookmark-start text:name="_Toc143523055"/>Tabel <text:sequence text:ref-name="refTabel0" text:name="Tabel" text:formula="ooow:Tabel+1" style:num-format="1">1</text:sequence>. Eriolukordade analüüs<text:bookmark-end text:name="_Toc143523055"/></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text:p>
          </table:table-cell>
          <table:table-cell table:style-name="Table3.A1" office:value-type="string">
            <text:p text:style-name="P15">Kirjeldus</text:p>
          </table:table-cell>
          <table:table-cell table:style-name="Table3.A1" office:value-type="string">
            <text:p text:style-name="P15">Olek</text:p>
          </table:table-cell>
          <table:table-cell table:style-name="Table3.A1" office:value-type="string">
            <text:p text:style-name="P15">Lahendus </text:p>
          </table:table-cell>
        </table:table-row>
        <table:table-row table:style-name="Table3.1">
          <table:table-cell table:style-name="Table3.A1" office:value-type="string">
            <text:p text:style-name="P72">1</text:p>
          </table:table-cell>
          <table:table-cell table:style-name="Table3.A1" office:value-type="string">
            <text:p text:style-name="P65">Failist lugemisel esineb ebakorrektseid nimesid</text:p>
          </table:table-cell>
          <table:table-cell table:style-name="Table3.A1" office:value-type="string">
            <text:p text:style-name="P65">Lahendamata</text:p>
          </table:table-cell>
          <table:table-cell table:style-name="Table3.A1" office:value-type="string">
            <text:p text:style-name="P65">Programm ei ole suuteline keelama nimesid, mis sisaldama arve või muid sümboleid, mis pole tähed.</text:p>
            <text:p text:style-name="P66">Programm jookseb kokku.</text:p>
          </table:table-cell>
        </table:table-row>
        <table:table-row table:style-name="Table3.1">
          <table:table-cell table:style-name="Table3.A3" office:value-type="string">
            <text:p text:style-name="P72">2</text:p>
          </table:table-cell>
          <table:table-cell table:style-name="Table3.A3" office:value-type="string">
            <text:p text:style-name="P24">Kasutaja sisestab <text:span text:style-name="T66">ebakorrektse kuupäeva</text:span></text:p>
          </table:table-cell>
          <table:table-cell table:style-name="Table3.A3" office:value-type="string">
            <text:p text:style-name="P24">Lahendatud</text:p>
          </table:table-cell>
          <table:table-cell table:style-name="Table3.A3" office:value-type="string">
            <text:p text:style-name="P24">Programm käivitub, <text:span text:style-name="T66">ning küsib uuesti uut korrektsed tulemust kuni 3 korda.</text:span></text:p>
          </table:table-cell>
        </table:table-row>
        <table:table-row table:style-name="Table3.1">
          <table:table-cell table:style-name="Table3.A3" office:value-type="string">
            <text:p text:style-name="P72">3</text:p>
          </table:table-cell>
          <table:table-cell table:style-name="Table3.A3" office:value-type="string">
            <text:p text:style-name="P16">Kasutaja <text:span text:style-name="T50">sisestab </text:span><text:span text:style-name="T66">29. veebruari aastal, mis pole liigaasta</text:span></text:p>
          </table:table-cell>
          <table:table-cell table:style-name="Table3.A3" office:value-type="string">
            <text:p text:style-name="P16">Lahendatud</text:p>
          </table:table-cell>
          <table:table-cell table:style-name="Table3.A3" office:value-type="string">
            <text:p text:style-name="P67">Programm <text:span text:style-name="T66">küsib uuesti uut korrektsed tulemust kuni 3 korda.</text:span></text:p>
          </table:table-cell>
        </table:table-row>
        <table:table-row table:style-name="Table3.1">
          <table:table-cell table:style-name="Table3.A3" office:value-type="string">
            <text:p text:style-name="P72">4</text:p>
          </table:table-cell>
          <table:table-cell table:style-name="Table3.A3" office:value-type="string">
            <text:p text:style-name="P70">Kasutaja <text:span text:style-name="T50">sisestab </text:span><text:span text:style-name="T66">31nda kuupäeva kuus, mil on 30 päeva.</text:span></text:p>
          </table:table-cell>
          <table:table-cell table:style-name="Table3.A3" office:value-type="string">
            <text:p text:style-name="P16">Lahendatud</text:p>
          </table:table-cell>
          <table:table-cell table:style-name="Table3.A3" office:value-type="string">
            <text:p text:style-name="P67">Programm <text:span text:style-name="T66">küsib uuesti uut korrektsed tulemust kuni 3 korda.</text:span></text:p>
          </table:table-cell>
        </table:table-row>
        <table:table-row table:style-name="Table3.1">
          <table:table-cell table:style-name="Table3.A3" office:value-type="string">
            <text:p text:style-name="P72">5</text:p>
          </table:table-cell>
          <table:table-cell table:style-name="Table3.A3" office:value-type="string">
            <text:p text:style-name="P66">Kasutaja sisendab kuuks arvu, mis on väiksem kui 1 ja suurem kui 13</text:p>
          </table:table-cell>
          <table:table-cell table:style-name="Table3.A3" office:value-type="string">
            <text:p text:style-name="P16">Lahendatud</text:p>
          </table:table-cell>
          <table:table-cell table:style-name="Table3.A3" office:value-type="string">
            <text:p text:style-name="P67">Programm <text:span text:style-name="T66">küsib uuesti uut korrektsed tulemust kuni 3 korda.</text:span></text:p>
          </table:table-cell>
        </table:table-row>
        <table:table-row table:style-name="Table3.1">
          <table:table-cell table:style-name="Table3.A3" office:value-type="string">
            <text:p text:style-name="P72">6</text:p>
          </table:table-cell>
          <table:table-cell table:style-name="Table3.A3" office:value-type="string">
            <text:p text:style-name="P17">Kasutaja <text:span text:style-name="T66">sisestab aasta, mis on suurem kui tänane aasta. </text:span></text:p>
          </table:table-cell>
          <table:table-cell table:style-name="Table3.A3" office:value-type="string">
            <text:p text:style-name="P18">Lahend<text:span text:style-name="T66">amata</text:span></text:p>
          </table:table-cell>
          <table:table-cell table:style-name="Table3.A3" office:value-type="string">
            <text:p text:style-name="P19">Programm <text:span text:style-name="T66">ei valideeri olukorda, kus kasutaja sisestatud kuupäev on tulevikus tänase kuupäeva suhtes.</text:span></text:p>
          </table:table-cell>
        </table:table-row>
        <table:table-row table:style-name="Table3.1">
          <table:table-cell table:style-name="Table3.A3" office:value-type="string">
            <text:p text:style-name="P66">7</text:p>
          </table:table-cell>
          <table:table-cell table:style-name="Table3.A3" office:value-type="string">
            <text:p text:style-name="P17">Kasutaja <text:span text:style-name="T66">leiab sisendkuupäev ühtib inimese sünnikuupäevaga, ning aasta</text:span></text:p>
          </table:table-cell>
          <table:table-cell table:style-name="Table3.A3" office:value-type="string">
            <text:p text:style-name="P18">Lahenda<text:span text:style-name="T50">tud</text:span></text:p>
          </table:table-cell>
          <table:table-cell table:style-name="Table3.A3" office:value-type="string">
            <text:p text:style-name="P19">Programm <text:span text:style-name="T66">väljastab tulemuse, et see inimene sündis sel kuupäeval</text:span></text:p>
          </table:table-cell>
        </table:table-row>
        <table:table-row table:style-name="Table3.1">
          <table:table-cell table:style-name="Table3.A3" office:value-type="string">
            <text:p text:style-name="P66">8</text:p>
          </table:table-cell>
          <table:table-cell table:style-name="Table3.A3" office:value-type="string">
            <text:p text:style-name="P24">Kasutaja sisesta<text:span text:style-name="T66">tud kuupäev on detsembri teises pooles</text:span></text:p>
          </table:table-cell>
          <table:table-cell table:style-name="Table3.A3" office:value-type="string">
            <text:p text:style-name="P20">Lahenda<text:span text:style-name="T50">tud</text:span></text:p>
          </table:table-cell>
          <table:table-cell table:style-name="Table3.A3" office:value-type="string">
            <text:p text:style-name="P20">Programm <text:span text:style-name="T66">on võimeline leidma inimesi, kel on detsembri teises pooles, ning pärast aastavahetust sünnipäev. Programm arvestab aastaarvu muutust ning kohendab tulemusi lähtuvalt</text:span></text:p>
          </table:table-cell>
        </table:table-row>
        <table:table-row table:style-name="Table3.1">
          <table:table-cell table:style-name="Table3.A3" office:value-type="string">
            <text:p text:style-name="P66">9</text:p>
          </table:table-cell>
          <table:table-cell table:style-name="Table3.A3" office:value-type="string">
            <text:p text:style-name="P25">Kasuaja <text:span text:style-name="T66">sisestab kuupäeva, mis on kuu teises pooles</text:span></text:p>
          </table:table-cell>
          <table:table-cell table:style-name="Table3.A3" office:value-type="string">
            <text:p text:style-name="P20">Lahenda<text:span text:style-name="T50">tud</text:span></text:p>
          </table:table-cell>
          <table:table-cell table:style-name="Table3.A3" office:value-type="string">
            <text:p text:style-name="P25">Programm <text:span text:style-name="T67">suudab leida inimesed, kel on sünnipäev tulemas 14 päeva jooksul ka siis, kui see on järgmises kuus.</text:span></text:p>
          </table:table-cell>
        </table:table-row>
        <table:table-row table:style-name="Table3.1">
          <table:table-cell table:style-name="Table3.A3" office:value-type="string">
            <text:p text:style-name="P66">10</text:p>
          </table:table-cell>
          <table:table-cell table:style-name="Table3.A3" office:value-type="string">
            <text:p text:style-name="P25">Kasutaja <text:span text:style-name="T67">sisestab </text:span><text:soft-page-break/><text:span text:style-name="T67">kuupäeva, mil inimene pole sündinud, kui kuupäev ühtiks</text:span></text:p>
          </table:table-cell>
          <table:table-cell table:style-name="Table3.A3" office:value-type="string">
            <text:p text:style-name="P25">Lahendatud</text:p>
          </table:table-cell>
          <table:table-cell table:style-name="Table3.A3" office:value-type="string">
            <text:p text:style-name="P20">Programm <text:span text:style-name="T67">ei kuva sündimata inimeste </text:span><text:soft-page-break/><text:span text:style-name="T67">sünnipäeva loetelus, kuna ta pole sündinud veel.</text:span></text:p>
          </table:table-cell>
        </table:table-row>
        <table:table-row table:style-name="Table3.1">
          <table:table-cell table:style-name="Table3.A3" office:value-type="string">
            <text:p text:style-name="P66">11</text:p>
          </table:table-cell>
          <table:table-cell table:style-name="Table3.A3" office:value-type="string">
            <text:p text:style-name="P25">Kasutaja <text:span text:style-name="T67">sisestab kuupäeva, mil inimese sünnipäev on 14 päeva jooksu, kuid sünniaasta on hiljem (s.t pole veel sündinud)</text:span></text:p>
          </table:table-cell>
          <table:table-cell table:style-name="Table3.A3" office:value-type="string">
            <text:p text:style-name="P25">Lahendatud</text:p>
          </table:table-cell>
          <table:table-cell table:style-name="Table3.A3" office:value-type="string">
            <text:p text:style-name="P20">Program<text:span text:style-name="T67">m suudab eristada olukorda, kus inimene pole veel sündinud, kui tema sünnipäev oleks 14 päeva vältel (s.t inimene pole veel sündinud).</text:span></text:p>
          </table:table-cell>
        </table:table-row>
        <table:table-row table:style-name="Table3.1">
          <table:table-cell table:style-name="Table3.A3" office:value-type="string">
            <text:p text:style-name="P25">12</text:p>
          </table:table-cell>
          <table:table-cell table:style-name="Table3.A3" office:value-type="string">
            <text:p text:style-name="P72">Programm loeb sisendfailist andmeid, kus inimene on ebainimlikult suure vanusega</text:p>
          </table:table-cell>
          <table:table-cell table:style-name="Table3.A3" office:value-type="string">
            <text:p text:style-name="P72">Lahendamata</text:p>
          </table:table-cell>
          <table:table-cell table:style-name="Table3.A3" office:value-type="string">
            <text:p text:style-name="P72">Programm ei suuda tuvastada, kas inimene on elus või mitte. </text:p>
            <text:p text:style-name="P72">Programm ei sätesta vanusele ülempiire ega erista kas inimese sünnipäeva tähistatakse või mälestatakse.</text:p>
          </table:table-cell>
        </table:table-row>
        <table:table-row table:style-name="Table3.1">
          <table:table-cell table:style-name="Table3.A14" table:number-columns-spanned="4" office:value-type="string">
            <text:p text:style-name="P22">L<text:span text:style-name="T67">i</text:span>saülesanne</text:p>
          </table:table-cell>
          <table:covered-table-cell/>
          <table:covered-table-cell/>
          <table:covered-table-cell/>
        </table:table-row>
        <table:table-row table:style-name="Table3.1">
          <table:table-cell table:style-name="Table3.A3" office:value-type="string">
            <text:p text:style-name="P72">13</text:p>
          </table:table-cell>
          <table:table-cell table:style-name="Table3.A3" office:value-type="string">
            <text:p text:style-name="P21">Kasutaja sisestab ebakorrektse käsurea argumendi</text:p>
          </table:table-cell>
          <table:table-cell table:style-name="Table3.A3" office:value-type="string">
            <text:p text:style-name="P21">Lahendatud</text:p>
          </table:table-cell>
          <table:table-cell table:style-name="Table3.A3" office:value-type="string">
            <text:p text:style-name="P19">Programm <text:span text:style-name="T51">prindib kasutajale käsurea argumentidest, mille programm on käivitatav.</text:span></text:p>
          </table:table-cell>
        </table:table-row>
        <table:table-row table:style-name="Table3.1">
          <table:table-cell table:style-name="Table3.A3" office:value-type="string">
            <text:p text:style-name="P72">14</text:p>
          </table:table-cell>
          <table:table-cell table:style-name="Table3.A3" office:value-type="string">
            <text:p text:style-name="P21">Lisaülesandes eelseadistatud sisendandmed on arvude asemel tähemärgid</text:p>
          </table:table-cell>
          <table:table-cell table:style-name="Table3.A3" office:value-type="string">
            <text:p text:style-name="P21">Lahenda<text:span text:style-name="T51">tud</text:span></text:p>
          </table:table-cell>
          <table:table-cell table:style-name="Table3.A3" office:value-type="string">
            <text:p text:style-name="P18">Programm peaks kätke<text:span text:style-name="T51">b</text:span> endas andmetüübi valideerimist. Vastasel juhul programm sattub lõputusse tsüklisse, risustades konsooli.</text:p>
            <text:p text:style-name="P18"/>
            <text:p text:style-name="P25">Programm loeb fotograafile <text:s/>tulemused tähemassiivi (ing. k. <text:span text:style-name="T2">char array</text:span><text:span text:style-name="T18">)</text:span>, ning teisendab pärast sümbolite valideerimist numbrilisse andmetüüpi</text:p>
          </table:table-cell>
        </table:table-row>
        <table:table-row table:style-name="Table3.1">
          <table:table-cell table:style-name="Table3.A3" office:value-type="string">
            <text:p text:style-name="P72">15</text:p>
          </table:table-cell>
          <table:table-cell table:style-name="Table3.A3" office:value-type="string">
            <text:p text:style-name="P26">Failist lugemisel <text:span text:style-name="T65">esineb ebakorrektseid kuupäevi</text:span></text:p>
          </table:table-cell>
          <table:table-cell table:style-name="Table3.A3" office:value-type="string">
            <text:p text:style-name="P26">Lahendatud</text:p>
          </table:table-cell>
          <table:table-cell table:style-name="Table3.A3" office:value-type="string">
            <text:p text:style-name="P26">Programm <text:span text:style-name="T65">loeb igaljuhul andmed struktuuri ja pesastatud struktuuri.</text:span></text:p>
            <text:p text:style-name="P63">Programm <text:span text:style-name="T65">nullväärtustab pesastatud struktuuri tulemused</text:span> <text:span text:style-name="T65">vasta dd.mmmm.yy formaadile ja kuupäev ei eksisteeri kalendris.</text:span></text:p>
          </table:table-cell>
        </table:table-row>
        <table:table-row table:style-name="Table3.1">
          <table:table-cell table:style-name="Table3.A3" office:value-type="string">
            <text:p text:style-name="P72">16</text:p>
          </table:table-cell>
          <table:table-cell table:style-name="Table3.A3" office:value-type="string">
            <text:p text:style-name="P65">Failist lugemisel esineb ebakorrektseid nimesid</text:p>
          </table:table-cell>
          <table:table-cell table:style-name="Table3.A3" office:value-type="string">
            <text:p text:style-name="P65">Lahendamata</text:p>
          </table:table-cell>
          <table:table-cell table:style-name="Table3.A3" office:value-type="string">
            <text:p text:style-name="P65">Programm ei ole suuteline keelama nimesid, mis sisaldama arve või muid sümboleid, mis pole tähed.</text:p>
            <text:p text:style-name="P66">Programm jookseb kokku.</text:p>
          </table:table-cell>
        </table:table-row>
        <table:table-row table:style-name="Table3.1">
          <table:table-cell table:style-name="Table3.A3" office:value-type="string">
            <text:p text:style-name="P23">1<text:span text:style-name="T67">7</text:span></text:p>
          </table:table-cell>
          <table:table-cell table:style-name="Table3.A3" office:value-type="string">
            <text:p text:style-name="P26">Käsurea argumendid esitatakse (vales) järjekorras</text:p>
          </table:table-cell>
          <table:table-cell table:style-name="Table3.A3" office:value-type="string">
            <text:p text:style-name="P25">Lahendamata</text:p>
          </table:table-cell>
          <table:table-cell table:style-name="Table3.A3" office:value-type="string">
            <text:p text:style-name="P25">Programm ei <text:span text:style-name="T52">kätke endas käsurea argumentide positsioonide muutmist, kuigi käsurea argumendid on sisult õiged</text:span></text:p>
          </table:table-cell>
        </table:table-row>
      </table:table>
      <text:list xml:id="list25221948548189" text:continue-numbering="true" text:style-name="WWNum5">
        <text:list-header>
          <text:h text:style-name="P50" text:outline-level="1"><text:bookmark-start text:name="__RefHeading___Toc3025_2890390417"/><text:soft-page-break/><text:span text:style-name="T26">4 </text:span><text:bookmark-start text:name="_Toc143516459"/><text:bookmark-start text:name="_Toc143525429"/><text:bookmark-start text:name="_Toc82609484"/><text:span text:style-name="T18">Kokkuvõte</text:span><text:bookmark-end text:name="__RefHeading___Toc3025_2890390417"/><text:bookmark-end text:name="_Toc143516459"/><text:bookmark-end text:name="_Toc143525429"/><text:bookmark-end text:name="_Toc82609484"/></text:h>
        </text:list-header>
      </text:list>
      <text:p text:style-name="P90"><text:span text:style-name="T19">Ül</text:span><text:span text:style-name="T21">e</text:span><text:span text:style-name="T19">san</text:span><text:span text:style-name="T21">d</text:span><text:span text:style-name="T19">e koodi lahendami</text:span><text:span text:style-name="T21">sega alustasin</text:span><text:span text:style-name="T19"> </text:span><text:span text:style-name="T22">2</text:span><text:span text:style-name="T28">3</text:span><text:span text:style-name="T22">. </text:span><text:span text:style-name="T28">veebruaril</text:span><text:span text:style-name="T22">,</text:span><text:span text:style-name="T19"> ning </text:span><text:span text:style-name="T21">töö kulges kuni</text:span><text:span text:style-name="T19"> </text:span><text:span text:style-name="T28">28</text:span><text:span text:style-name="T19">. </text:span><text:span text:style-name="T28">veebruarini</text:span><text:span text:style-name="T22">. </text:span><text:span text:style-name="T29">Ülesande lahendamisele kulus 43h. Arvestusse kuuluvad töötunnid jaotusid järgmiselt:</text:span></text:p>
      <text:list xml:id="list2127447723" text:style-name="L2">
        <text:list-item>
          <text:p text:style-name="P91"><text:span text:style-name="T29">23. veebruaril kulus 7 tundi,</text:span></text:p>
        </text:list-item>
        <text:list-item>
          <text:p text:style-name="P91"><text:span text:style-name="T29">25. veebrauril kulus 11 tundi,</text:span></text:p>
        </text:list-item>
        <text:list-item>
          <text:p text:style-name="P91"><text:span text:style-name="T29">26. veebruaril kulus 19 tundi,</text:span></text:p>
        </text:list-item>
        <text:list-item>
          <text:p text:style-name="P91"><text:span text:style-name="T29">27. veebruaril kulus 6 tundi.</text:span></text:p>
        </text:list-item>
      </text:list>
      <text:p text:style-name="P89"><text:span text:style-name="T42">Esitatud ü</text:span><text:span text:style-name="T40">lesan</text:span><text:span text:style-name="T42">de lahendus täidab funktsionaalsust, kuid sellest hoolimata saab koodi ülesehitust ja loogikat lihtsustada. </text:span><text:span text:style-name="T44">Ülesande lahendasin </text:span><text:span text:style-name="T42">hulga pesastatud</text:span><text:span text:style-name="T44"> funktsiooni</text:span><text:span text:style-name="T42">de</text:span><text:span text:style-name="T44">ga, </text:span><text:span text:style-name="T42">mis eraldas koodi väiksemateks tükkideks. </text:span></text:p>
      <text:p text:style-name="P89"><text:span text:style-name="T42">Enim vajaks põhjalik muutmist väljundvoo eraldamine väiksemateks tükkideks, kuna ühes väljundvoos terviktulemuse hoiustamine </text:span><text:span text:style-name="T43">raskendab vigade leidmist koodis, ning loob ohu väljundvoo puhvri ületäitumiseks.</text:span></text:p>
      <text:p text:style-name="P89"><text:span text:style-name="T41">Ülesande variant </text:span><text:span text:style-name="T42">lihtsasti jälgitav, eluline, </text:span><text:span text:style-name="T41"><text:s/></text:span><text:span text:style-name="T42">ning <text:s/>lahendus põhines varem õpitud teadmiste ja osksuste rakendamisel.</text:span><text:span text:style-name="T41"> </text:span></text:p>
      <text:h text:style-name="P59" text:outline-level="1"><text:bookmark-start text:name="__RefHeading___Toc3029_2890390417"/><text:bookmark-start text:name="_Toc227485540"/><text:bookmark-start text:name="_Toc437856796"/><text:bookmark-start text:name="_Toc437263091"/><text:bookmark-start text:name="_Toc371596370"/><text:bookmark-start text:name="_Toc143525431"/><text:bookmark-start text:name="_Toc143516461"/><text:bookmark-start text:name="_Toc82609486"/>Lisa 1<text:bookmark-end text:name="_Toc227485540"/><text:bookmark-end text:name="_Toc437856796"/><text:bookmark-end text:name="_Toc437263091"/><text:bookmark-end text:name="_Toc371596370"/> – <text:span text:style-name="T15">Kuvatõmmised</text:span><text:bookmark-end text:name="__RefHeading___Toc3029_2890390417"/><text:bookmark-end text:name="_Toc143525431"/><text:bookmark-end text:name="_Toc143516461"/><text:bookmark-end text:name="_Toc82609486"/></text:h>
      <text:p text:style-name="P39"><draw:frame draw:style-name="fr1" draw:name="Frame2" text:anchor-type="char" svg:width="5.9055in" draw:z-index="15"><draw:text-box fo:min-height="2.7535in"><text:p text:style-name="Lisa"><draw:frame draw:style-name="fr6" draw:name="Image5" text:anchor-type="paragraph" svg:width="5.9055in" style:rel-width="100%" svg:height="2.7535in" style:rel-height="scale" draw:z-index="16"><draw:image xlink:href="Pictures/100000010000044C00000201801AEF0348597B43.png" xlink:type="simple" xlink:show="embed" xlink:actuate="onLoad" draw:mime-type="image/png"/></draw:frame>Lisa <text:sequence text:ref-name="refLisa5" text:name="Lisa" text:formula="ooow:Lisa+1" style:num-format="1">7</text:sequence>: Põhiülesanne käsurea argumendiga -i=input.txt või --input.txt</text:p></draw:text-box></draw:frame></text:p>
      <text:p text:style-name="P39"><draw:frame draw:style-name="fr1" draw:name="Frame4" text:anchor-type="char" svg:width="5.9055in" draw:z-index="13"><draw:text-box fo:min-height="1.4209in"><text:p text:style-name="Lisa"><draw:frame draw:style-name="fr5" draw:name="Image7" text:anchor-type="paragraph" svg:x="0in" svg:y="-0.6898in" svg:width="5.9055in" style:rel-width="100%" svg:height="1.4209in" style:rel-height="scale" draw:z-index="14"><draw:image xlink:href="Pictures/100000010000044D0000010922844BA432BD182B.png" xlink:type="simple" xlink:show="embed" xlink:actuate="onLoad" draw:mime-type="image/png"/></draw:frame>Lisa <text:sequence text:ref-name="refLisa6" text:name="Lisa" text:formula="ooow:Lisa+1" style:num-format="1">8</text:sequence>: Lisaülesanne käsurea argumendiga -p=disabled või --prompt=disabled</text:p></draw:text-box></draw:frame><draw:frame draw:style-name="fr2" draw:name="Frame5" text:anchor-type="char" svg:x="0in" svg:y="1.6972in" svg:width="5.9055in" draw:z-index="17"><draw:text-box fo:min-height="1.3957in"><text:p text:style-name="Lisa"><draw:frame draw:style-name="fr6" draw:name="Image8" text:anchor-type="paragraph" svg:width="5.9055in" style:rel-width="100%" svg:height="1.3957in" style:rel-height="scale" draw:z-index="18"><draw:image xlink:href="Pictures/1000000100000450000001055969AF892D48EEB3.png" xlink:type="simple" xlink:show="embed" xlink:actuate="onLoad" draw:mime-type="image/png"/></draw:frame>Lisa <text:sequence text:ref-name="refLisa7" text:name="Lisa" text:formula="ooow:Lisa+1" style:num-format="1">9</text:sequence>: Lisaülesanne käsurea argumendiga -p=disabled ja -o=out.txt</text:p></draw:text-box></draw:frame></text:p>
      <text:p text:style-name="P39"><text:soft-page-break/></text:p>
      <text:p text:style-name="P39"><draw:frame draw:style-name="fr1" draw:name="Frame6" text:anchor-type="char" svg:width="5.9055in" draw:z-index="19"><draw:text-box fo:min-height="2.7819in"><text:p text:style-name="Lisa"><draw:frame draw:style-name="fr5" draw:name="Image9" text:anchor-type="paragraph" svg:x="0in" svg:y="-0.4028in" svg:width="5.9055in" style:rel-width="100%" svg:height="2.7819in" style:rel-height="scale" draw:z-index="20"><draw:image xlink:href="Pictures/10000001000004430000020275B187DB8E2BF7BA.png" xlink:type="simple" xlink:show="embed" xlink:actuate="onLoad" draw:mime-type="image/png"/></draw:frame>Lisa <text:sequence text:ref-name="refLisa8" text:name="Lisa" text:formula="ooow:Lisa+1" style:num-format="1">10</text:sequence>: Lisaülesanne käsurea argumendiga -i=input.txt -o=output.txt</text:p></draw:text-box></draw:frame></text:p>
      <text:p text:style-name="P39"><draw:frame draw:style-name="fr1" draw:name="Frame7" text:anchor-type="char" svg:width="5.9055in" draw:z-index="21"><draw:text-box fo:min-height="1.8917in"><text:p text:style-name="Lisa"><draw:frame draw:style-name="fr5" draw:name="Image10" text:anchor-type="paragraph" svg:x="0in" svg:y="-0.6283in" svg:width="5.9055in" style:rel-width="100%" svg:height="1.8917in" style:rel-height="scale" draw:z-index="22"><draw:image xlink:href="Pictures/10000001000003BB000001328E2941CBF1C8242D.png" xlink:type="simple" xlink:show="embed" xlink:actuate="onLoad" draw:mime-type="image/png"/></draw:frame>Lisa <text:sequence text:ref-name="refLisa9" text:name="Lisa" text:formula="ooow:Lisa+1" style:num-format="1">11</text:sequence>: Lisaülesande tulemused sisendkuupäevaga 31.12.2023</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t" fo:country="EE" style:letter-kerning="false" style:font-name-asian="Times New Roman1" style:font-size-asian="10pt" style:language-asian="et" style:country-asian="E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t" fo:country="EE" style:letter-kerning="false" style:font-name-asian="Times New Roman1" style:font-size-asian="10pt" style:language-asian="et" style:country-asian="E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officeooo:rsid="002f6eda"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1665in" style:contextual-spacing="false" fo:line-height="150%" fo:text-align="justify" style:justify-single-word="false"/>
      <style:text-properties fo:font-style="italic" officeooo:rsid="003b9ab9" style:font-style-asian="italic"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ext_20_body" style:next-style-name="Text_20_body" loext:linked-style-name="Heading_20_1_20_Char" style:default-outline-level="1" style:list-style-name="WWNum5" style:class="text">
      <style:paragraph-properties fo:margin-top="0.8335in" fo:margin-bottom="0.25in" style:contextual-spacing="false" fo:text-align="start" style:justify-single-word="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5" style:list-level="2" style:class="text">
      <style:paragraph-properties fo:margin-top="0.3335in" fo:margin-bottom="0.0835in" style:contextual-spacing="false" fo:line-height="150%" fo:keep-with-next="always"/>
      <style:text-properties fo:font-size="14pt" fo:font-weight="bold" style:font-size-asian="14pt" style:font-weight-asian="bold" style:font-size-complex="10pt"/>
    </style:style>
    <style:style style:name="Heading_20_3" style:display-name="Heading 3" style:family="paragraph" style:parent-style-name="Standard" style:next-style-name="Text_20_body" style:default-outline-level="3" style:list-style-name="WWNum5" style:list-level="3" style:class="text">
      <style:paragraph-properties fo:margin-top="0.1665in" fo:margin-bottom="0.0835in" style:contextual-spacing="false" fo:line-height="150%" fo:keep-with-next="always"/>
      <style:text-properties fo:font-weight="bold" style:font-weight-asian="bold"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list-style-name="WWNum5" style:list-level="4" style:class="text">
      <style:paragraph-properties fo:line-height="150%" fo:text-align="center" style:justify-single-word="false" fo:keep-with-next="always"/>
      <style:text-properties fo:language="en" fo:country="GB" fo:font-weight="bold" style:font-weight-asian="bold" style:font-size-complex="10pt"/>
    </style:style>
    <style:style style:name="Heading_20_5" style:display-name="Heading 5" style:family="paragraph" style:parent-style-name="Standard" style:next-style-name="Standard" style:default-outline-level="5" style:list-style-name="WWNum5" style:list-level="5" style:class="text">
      <style:paragraph-properties fo:text-align="center" style:justify-single-word="false" fo:keep-with-next="always"/>
      <style:text-properties fo:font-weight="bold" style:font-weight-asian="bold" style:font-size-complex="10pt"/>
    </style:style>
    <style:style style:name="Heading_20_6" style:display-name="Heading 6" style:family="paragraph" style:parent-style-name="Standard" style:next-style-name="Standard" style:default-outline-level="6" style:list-style-name="WWNum5" style:list-level="6" style:class="text">
      <style:paragraph-properties fo:text-align="center" style:justify-single-word="false" fo:keep-with-next="always"/>
      <style:text-properties fo:language="en" fo:country="GB" fo:font-weight="bold" style:font-weight-asian="bold" style:font-size-complex="10pt"/>
    </style:style>
    <style:style style:name="Heading_20_7" style:display-name="Heading 7" style:family="paragraph" style:parent-style-name="Standard" style:next-style-name="Standard" style:default-outline-level="7" style:list-style-name="WWNum5" style:list-level="7" style:class="text">
      <style:paragraph-properties fo:text-align="center" style:justify-single-word="false" fo:keep-with-next="always"/>
      <style:text-properties fo:font-weight="bold" style:font-weight-asian="bold" style:font-size-complex="10pt"/>
    </style:style>
    <style:style style:name="Heading_20_8" style:display-name="Heading 8" style:family="paragraph" style:parent-style-name="Standard" style:next-style-name="Standard" style:default-outline-level="8" style:list-style-name="WWNum5" style:list-level="8" style:class="text">
      <style:paragraph-properties fo:keep-with-next="always"/>
      <style:text-properties fo:font-style="italic" fo:font-weight="bold" style:font-style-asian="italic" style:font-weight-asian="bold" style:font-size-complex="10pt"/>
    </style:style>
    <style:style style:name="Heading_20_9" style:display-name="Heading 9" style:family="paragraph" style:parent-style-name="Standard" style:next-style-name="Standard" loext:linked-style-name="Heading_20_9_20_Char" style:default-outline-level="9" style:list-style-name="WWNum5" style:list-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style:style>
    <style:style style:name="Style_20_Right" style:display-name="Style Right" style:family="paragraph" style:parent-style-name="Standard">
      <style:paragraph-properties fo:text-align="end" style:justify-single-word="false"/>
      <style:text-properties style:font-size-complex="10pt"/>
    </style:style>
    <style:style style:name="List_20_Bullet_20_2" style:display-name="List Bullet 2" style:family="paragraph" style:parent-style-name="Standard" style:auto-update="true" style:list-style-name="WWNum1"/>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2" style:display-name="List Number 2" style:family="paragraph" style:parent-style-name="Standard" style:list-style-name="WWNum2"/>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class="index">
      <style:paragraph-properties fo:line-height="150%"/>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style>
    <style:style style:name="Equation" style:family="paragraph" style:parent-style-name="Standard">
      <style:paragraph-properties fo:margin-top="0in" fo:margin-bottom="0.1665in" style:contextual-spacing="false">
        <style:tab-stops>
          <style:tab-stop style:position="5.828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346in" fo:margin-right="0in" fo:line-height="150%" fo:text-indent="0in" style:auto-text-indent="false"/>
    </style:style>
    <style:style style:name="caption" style:family="paragraph" style:parent-style-name="Standard" style:next-style-name="Standard">
      <style:paragraph-properties fo:margin-top="0.0835in" fo:margin-bottom="0.0835in" style:contextual-spacing="false" fo:line-height="115%" fo:text-align="center" style:justify-single-word="false"/>
      <style:text-properties fo:font-size="10pt" style:font-size-asian="10pt" style:font-size-complex="10pt" style:font-weight-complex="bold"/>
    </style:style>
    <style:style style:name="Tabel" style:family="paragraph" style:parent-style-name="Text_20_body">
      <style:paragraph-properties fo:margin-top="0in" fo:margin-bottom="0in" style:contextual-spacing="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line-height="150%"/>
    </style:style>
    <style:style style:name="toa_20_heading" style:display-name="toa heading" style:family="paragraph" style:parent-style-name="Standard" style:next-style-name="Standard">
      <style:paragraph-properties fo:margin-top="0.0835in" fo:margin-bottom="0in" style:contextual-spacing="false" fo:line-height="150%"/>
      <style:text-properties fo:font-weight="bold" style:font-weight-asian="bold" style:font-name-complex="Arial" style:font-family-complex="Arial" style:font-family-generic-complex="system" style:font-pitch-complex="variable" style:font-weight-complex="bold"/>
    </style:style>
    <style:style style:name="List_20_Number" style:display-name="List Number" style:family="paragraph" style:parent-style-name="Standard" style:list-style-name="WWNum3">
      <style:paragraph-properties fo:margin-left="0.248in" fo:margin-right="0in" fo:margin-top="0in" fo:margin-bottom="0.1665in" style:contextual-spacing="true" fo:line-height="150%" fo:text-align="justify" style:justify-single-word="false" fo:text-indent="-0.248in" style:auto-text-indent="false"/>
    </style:style>
    <style:style style:name="Bibliography" style:family="paragraph" style:parent-style-name="Standard" style:next-style-name="Standard"/>
    <style:style style:name="Heading_5f_unnumber" style:display-name="Heading_unnumber" style:family="paragraph" style:parent-style-name="Heading_20_1" style:next-style-name="Text_20_body" style:default-outline-level="1" style:list-style-name=""/>
    <style:style style:name="List_20_Bullet" style:display-name="List Bullet" style:family="paragraph" style:parent-style-name="Standard" style:list-style-name="WWNum6">
      <style:paragraph-properties fo:margin-left="0.4957in" fo:margin-right="0in" fo:margin-top="0in" fo:margin-bottom="0.1665in" style:contextual-spacing="true" fo:line-height="150%" fo:text-align="justify" style:justify-single-word="false" fo:text-indent="-0.248in" style:auto-text-indent="false"/>
      <style:text-properties style:font-name-asian="Calibri" style:font-family-asian="Calibri" style:font-family-generic-asian="system" style:font-pitch-asian="variable" style:font-size-complex="11pt"/>
    </style:style>
    <style:style style:name="Footnote" style:family="paragraph" style:parent-style-name="Standard" loext:linked-style-name="Footnote_20_Text_20_Char" style:class="extra">
      <style:paragraph-properties fo:margin-top="0.0835in" fo:margin-bottom="0in" style:contextual-spacing="false" fo:line-height="115%"/>
      <style:text-properties fo:font-size="10pt" style:font-size-asian="10pt" style:font-size-complex="10pt"/>
    </style:style>
    <style:style style:name="Table_5f_head" style:display-name="Table_head" style:family="paragraph" style:parent-style-name="Standard">
      <style:paragraph-properties fo:margin-top="0.0417in" fo:margin-bottom="0.0417in" style:contextual-spacing="false" fo:line-height="115%"/>
      <style:text-properties fo:font-size="11pt" fo:font-weight="bold" style:font-size-asian="11pt" style:font-weight-asian="bold"/>
    </style:style>
    <style:style style:name="Table_5f_text" style:display-name="Table_text" style:family="paragraph" style:parent-style-name="Standard">
      <style:paragraph-properties fo:margin-top="0.0417in" fo:margin-bottom="0.0417in" style:contextual-spacing="false" fo:line-height="115%"/>
      <style:text-properties fo:font-size="11pt" style:font-size-asian="11pt"/>
    </style:style>
    <style:style style:name="Program_5f_code" style:display-name="Program_code" style:family="paragraph" style:parent-style-name="Standard">
      <style:paragraph-properties fo:margin-top="0.028in" fo:margin-bottom="0.028in" style:contextual-spacing="false" fo:keep-together="always" fo:keep-with-next="always"/>
      <style:text-properties style:font-name="Consolas" fo:font-family="Consolas" style:font-family-generic="roman" style:font-pitch="variable" fo:font-size="10pt" style:font-size-asian="10pt"/>
    </style:style>
    <style:style style:name="List_5f_bibliogr" style:display-name="List_bibliogr" style:family="paragraph" style:parent-style-name="Table_5f_text" style:list-style-name="WWNum7">
      <style:paragraph-properties fo:margin-left="0.3154in" fo:margin-right="0in" fo:margin-top="0.028in" fo:margin-bottom="0.028in" style:contextual-spacing="false" fo:text-indent="-0.3154in" style:auto-text-indent="false"/>
      <style:text-properties fo:language="en" fo:country="GB"/>
    </style:style>
    <style:style style:name="Figure" style:family="paragraph" style:parent-style-name="Standard" style:class="extra">
      <style:paragraph-properties fo:margin-top="0in" fo:margin-bottom="0.0835in" style:contextual-spacing="false" fo:line-height="115%" fo:text-align="center" style:justify-single-word="false"/>
      <style:text-properties fo:font-size="11pt" style:font-name-asian="Calibri"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ing_5f_center" style:display-name="Heading_center" style:family="paragraph" style:parent-style-name="Heading_20_1" style:next-style-name="Text_20_body" style:default-outline-level="1" style:list-style-name="">
      <style:paragraph-properties fo:text-align="center" style:justify-single-word="false"/>
    </style:style>
    <style:style style:name="Heading_5f_title" style:display-name="Heading_title" style:family="paragraph" style:parent-style-name="Standard">
      <style:paragraph-properties fo:text-align="center" style:justify-single-word="false"/>
      <style:text-properties fo:text-transform="uppercase" fo:font-size="20pt" fo:font-weight="bold" style:font-size-asian="20pt" style:font-weight-asian="bold" style:font-weight-complex="bold"/>
    </style:style>
    <style:style style:name="University" style:family="paragraph" style:parent-style-name="Text_20_body">
      <style:paragraph-properties fo:margin-top="0in" fo:margin-bottom="0.0555in" style:contextual-spacing="false" fo:line-height="100%" fo:text-align="center" style:justify-single-word="false"/>
      <style:text-properties fo:text-transform="uppercase"/>
    </style:style>
    <style:style style:name="Caption_5f_multiline" style:display-name="Caption_multiline" style:family="paragraph" style:parent-style-name="caption">
      <style:paragraph-properties fo:text-align="justify" style:justify-single-word="false"/>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justify" style:justify-single-word="false" fo:text-indent="0in" style:auto-text-indent="false"/>
      <style:text-properties fo:language="en" fo:country="US" style:font-name-asian="Calibri" style:font-family-asian="Calibri" style:font-family-generic-asian="system" style:font-pitch-asian="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keep-together="always"/>
      <style:text-properties fo:color="#2e74b5" loext:opacity="100%" style:font-name="Calibri Light" fo:font-family="'Calibri Light'" style:font-family-generic="roman" style:font-pitch="variable" fo:language="en" fo:country="US" fo:font-weight="normal" style:letter-kerning="false"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Joonis"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Lis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loext:linked-style-name="Heading_20_9">
      <style:text-properties fo:color="#272727" loext:opacity="100%" style:font-name="Cambria" fo:font-family="Cambria" style:font-family-generic="roman" style:font-pitch="variable" fo:font-size="10.5pt" fo:font-style="italic" style:font-size-asian="10.5pt" style:language-asian="en" style:country-asian="US" style:font-style-asian="italic" style:font-size-complex="10.5pt" style:font-style-complex="italic"/>
    </style:style>
    <style:style style:name="Footer_20_Char" style:display-name="Footer Char" style:family="text" loext:linked-style-name="Footer">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Internet_20_link" style:display-name="Internet link" style:family="text">
      <style:text-properties style:use-window-font-color="true" loext:opacity="0%"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style:language-asian="en" style:country-asian="US"/>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Heading_20_1_20_Char" style:display-name="Heading 1 Char" style:family="text" style:parent-style-name="Default_20_Paragraph_20_Font" loext:linked-style-name="Heading_20_1">
      <style:text-properties fo:font-size="16pt" fo:font-weight="bold" style:letter-kerning="true" style:font-size-asian="16pt" style:language-asian="en" style:country-asian="US" style:font-weight-asian="bold" style:font-size-complex="16pt" style:font-weight-complex="bold"/>
    </style:style>
    <style:style style:name="ListLabel_20_1" style:display-name="ListLabel 1" style:family="text">
      <style:text-properties fo:font-size="10pt" style:font-size-asian="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2" loext:num-list-format="%1%" style:num-format="1">
        <style:list-level-properties text:list-level-position-and-space-mode="label-alignment">
          <style:list-level-label-alignment text:label-followed-by="space"/>
        </style:list-level-properties>
      </text:outline-level-style>
      <text:outline-level-style text:level="2" text:style-name="ListLabel_20_13"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4"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5"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6"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7"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8"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9"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0"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loext:num-list-format="%1%" style:num-format="1">
        <style:list-level-properties text:list-level-position-and-space-mode="label-alignment">
          <style:list-level-label-alignment text:label-followed-by="space"/>
        </style:list-level-properties>
      </text:list-level-style-number>
      <text:list-level-style-number text:level="2" text:style-name="ListLabel_20_2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9" loext:num-list-format="[%1%] " style:num-prefix="["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T1" style:family="text">
      <style:text-properties fo:font-size="14pt" style:font-size-asian="14pt" style:font-size-complex="14pt"/>
    </style:style>
    <style:style style:name="MT2" style:family="text">
      <style:text-properties officeooo:rsid="00642611"/>
    </style:style>
    <style:style style:name="MT3" style:family="text"/>
    <style:page-layout style:name="Mpm1">
      <style:page-layout-properties fo:page-width="8.2681in" fo:page-height="11.6929in" style:num-format="1" style:print-orientation="portrait" fo:margin-top="0.9846in" fo:margin-bottom="0.7874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style:page-layout style:name="Mpm2">
      <style:page-layout-properties fo:page-width="8.2681in" fo:page-height="11.6929in" style:num-format="1" style:print-orientation="portrait" fo:margin-top="0.9846in" fo:margin-bottom="0.9846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allinn<text:span text:style-name="MT1"> </text:span>202<text:span text:style-name="MT2">4</text:span></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text:page-number text:select-page="current">2</text:page-number></text:p>
      </style:footer>
    </style:master-page>
    <style:master-page style:name="Converted2" style:page-layout-name="Mpm3" draw:style-name="Mdp1">
      <style:footer>
        <text:p text:style-name="MP2"><text:page-number text:select-page="current">3</text:page-number></text:p>
      </style:footer>
    </style:master-page>
    <style:master-page style:name="Converted3" style:page-layout-name="Mpm3" draw:style-name="Mdp1">
      <style:footer>
        <text:p text:style-name="MP2"><text:page-number text:select-page="current">4</text:page-number></text:p>
      </style:footer>
    </style:master-page>
    <style:master-page style:name="Converted4" style:page-layout-name="Mpm3" draw:style-name="Mdp1">
      <style:footer>
        <text:p text:style-name="MP1"><text:span text:style-name="page_20_number"><text:page-number text:select-page="current">5</text:page-number></text:span></text:p>
      </style:footer>
    </style:master-page>
    <style:master-page style:name="Converted5" style:page-layout-name="Mpm3" draw:style-name="Mdp1">
      <style:footer>
        <text:p text:style-name="MP1"><text:span text:style-name="page_20_number"><text:page-number text:select-page="current">6</text:page-number></text:span></text:p>
      </style:footer>
    </style:master-page>
    <style:master-page style:name="Converted6" style:page-layout-name="Mpm3" draw:style-name="Mdp1">
      <style:footer>
        <text:p text:style-name="MP1"><text:span text:style-name="page_20_number"><text:page-number text:select-page="current">7</text:page-number></text:span></text:p>
      </style:footer>
    </style:master-page>
    <style:master-page style:name="Converted7" style:page-layout-name="Mpm3" draw:style-name="Mdp1">
      <style:footer>
        <text:p text:style-name="MP1"><text:span text:style-name="page_20_number"><text:page-number text:select-page="current">0</text:page-number></text:span></text:p>
      </style:footer>
    </style:master-page>
    <style:master-page style:name="Converted8" style:page-layout-name="Mpm3" draw:style-name="Mdp1">
      <style:footer>
        <text:p text:style-name="MP1"><text:span text:style-name="page_20_number"><text:page-number text:select-page="current">17</text:page-number></text:span></text:p>
      </style:footer>
    </style:master-page>
    <style:master-page style:name="Converted9" style:page-layout-name="Mpm3" draw:style-name="Mdp1">
      <style:footer>
        <text:p text:style-name="MP1"><text:span text:style-name="page_20_number"><text:page-number text:select-page="current">0</text:page-number></text:span></text:p>
      </style:footer>
    </style:master-page>
    <style:master-page style:name="Converted10" style:page-layout-name="Mpm3" draw:style-name="Mdp1">
      <style:footer>
        <text:p text:style-name="MP1"><text:span text:style-name="page_20_number"><text:page-number text:select-page="current">0</text:page-number></text:span></text:p>
      </style:footer>
    </style:master-page>
    <style:master-page style:name="Converted11" style:page-layout-name="Mpm3" draw:style-name="Mdp1">
      <style:footer>
        <text:p text:style-name="MP1"><text:span text:style-name="page_20_number"><text:page-number text:select-page="current">19</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2</meta:editing-cycles>
    <meta:creation-date>2023-10-29T15:10:43.173027682</meta:creation-date>
    <dc:date>2024-02-28T02:52:21.120561062</dc:date>
    <meta:editing-duration>PT1H52M48S</meta:editing-duration>
    <meta:generator>LibreOffice/7.3.7.2$Linux_X86_64 LibreOffice_project/30$Build-2</meta:generator>
    <meta:document-statistic meta:table-count="3" meta:image-count="12" meta:object-count="0" meta:page-count="19" meta:paragraph-count="203" meta:word-count="1585" meta:character-count="12877" meta:non-whitespace-character-count="11504"/>
    <meta:user-defined meta:name="AppVersion">16.0000</meta:user-defined>
  </office:meta>
</office:document-meta>
</file>