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2BD0000023135FA95D918C3E236.png" manifest:media-type="image/png"/>
  <manifest:file-entry manifest:full-path="Pictures/10000001000002C30000031D49665AB49531967E.png" manifest:media-type="image/png"/>
  <manifest:file-entry manifest:full-path="Pictures/10000001000002C2000003B9B9F816663A1E1CA2.png" manifest:media-type="image/png"/>
  <manifest:file-entry manifest:full-path="Pictures/10000001000002C30000029DD94AF33A4B487B25.png" manifest:media-type="image/png"/>
  <manifest:file-entry manifest:full-path="Pictures/10000000000007DD000004FDDAA623EE31635321.png" manifest:media-type="image/png"/>
  <manifest:file-entry manifest:full-path="Pictures/1000000100000371000002465C197E5907C3A943.png" manifest:media-type="image/png"/>
  <manifest:file-entry manifest:full-path="Pictures/100000010000030D0000016155279C15115D799B.png" manifest:media-type="image/png"/>
  <manifest:file-entry manifest:full-path="Pictures/1000000100000324000001E936B47CF7245B28D0.png" manifest:media-type="image/png"/>
  <manifest:file-entry manifest:full-path="Pictures/10000001000003600000020142413CA2E8EAD63A.png" manifest:media-type="image/png"/>
  <manifest:file-entry manifest:full-path="Pictures/100000010000030D000001616AFE23EB44C391BB.png" manifest:media-type="image/png"/>
  <manifest:file-entry manifest:full-path="Pictures/10000001000002A4000000E4B88ABAE097B1D165.png" manifest:media-type="image/png"/>
  <manifest:file-entry manifest:full-path="Pictures/100000000000046D000002391E36F4BFB87118FC.png" manifest:media-type="image/png"/>
  <manifest:file-entry manifest:full-path="Pictures/100000010000030D00000161C4C65C9B26ED6EC4.png" manifest:media-type="image/png"/>
  <manifest:file-entry manifest:full-path="Pictures/1000000100000373000002FDF825FCCE7C23B5F5.png" manifest:media-type="image/png"/>
  <manifest:file-entry manifest:full-path="Pictures/1000000100000361000002FFE99A7112D9E76806.png" manifest:media-type="image/png"/>
  <manifest:file-entry manifest:full-path="Pictures/10000001000002BC000000FE3111D695D577D2CE.png" manifest:media-type="image/png"/>
  <manifest:file-entry manifest:full-path="Pictures/10000001000002F2000000BF99898127ECCC4C58.png" manifest:media-type="image/png"/>
  <manifest:file-entry manifest:full-path="Pictures/1000000100000370000001A5114B31F1A3179A3A.png" manifest:media-type="image/png"/>
  <manifest:file-entry manifest:full-path="Pictures/100000010000036F00000238EF7FF7A033724CE2.png" manifest:media-type="image/png"/>
  <manifest:file-entry manifest:full-path="Pictures/1000000100000375000001BCA30AC468353481B7.png" manifest:media-type="image/png"/>
  <manifest:file-entry manifest:full-path="Pictures/1000000100000339000000D53D3466644A2A171F.png" manifest:media-type="image/png"/>
  <manifest:file-entry manifest:full-path="Pictures/10000001000002BD00000233BFF20E96A412E46A.png" manifest:media-type="image/png"/>
  <manifest:file-entry manifest:full-path="Pictures/100000010000030A00000105730D50A8D1591F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master-page-name="Standard">
      <style:table-properties style:width="5.9007in" fo:margin-left="0.0847in" fo:margin-top="0in" fo:margin-bottom="0in" style:page-number="auto" table:align="left" style:writing-mode="lr-tb"/>
    </style:style>
    <style:style style:name="Table1.A" style:family="table-column">
      <style:table-column-properties style:column-width="4.2313in"/>
    </style:style>
    <style:style style:name="Table1.B" style:family="table-column">
      <style:table-column-properties style:column-width="1.6694in"/>
    </style:style>
    <style:style style:name="Table1.1" style:family="table-row">
      <style:table-row-properties style:min-row-height="0.1931in"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2" style:family="table-row">
      <style:table-row-properties style:min-row-height="0.2569in" fo:keep-together="auto"/>
    </style:style>
    <style:style style:name="Table1.3" style:family="table-row">
      <style:table-row-properties style:min-row-height="0.2785in" fo:keep-together="auto"/>
    </style:style>
    <style:style style:name="Table1.4" style:family="table-row">
      <style:table-row-properties style:min-row-height="1.3993in" fo:keep-together="auto"/>
    </style:style>
    <style:style style:name="Table1.5" style:family="table-row">
      <style:table-row-properties style:min-row-height="0.3153in" fo:keep-together="auto"/>
    </style:style>
    <style:style style:name="Table1.6" style:family="table-row">
      <style:table-row-properties style:min-row-height="0.3451in" fo:keep-together="auto"/>
    </style:style>
    <style:style style:name="Table1.7" style:family="table-row">
      <style:table-row-properties style:min-row-height="1.6688in" fo:keep-together="auto"/>
    </style:style>
    <style:style style:name="Table1.A7" style:family="table-cell">
      <style:table-cell-properties style:vertical-align="middle" fo:background-color="transparent" fo:padding-left="0.075in" fo:padding-right="0.075in" fo:padding-top="0in" fo:padding-bottom="0in" fo:border="none">
        <style:background-image/>
      </style:table-cell-properties>
    </style:style>
    <style:style style:name="Table1.8" style:family="table-row">
      <style:table-row-properties style:min-row-height="1.1833in" fo:keep-together="auto"/>
    </style:style>
    <style:style style:name="Table2" style:family="table">
      <style:table-properties style:width="5.9063in" fo:margin-left="0in" fo:margin-top="0in" fo:margin-bottom="0in" table:align="left" style:writing-mode="lr-tb"/>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fo:keep-together="auto"/>
    </style:style>
    <style:style style:name="Table2.A1" style:family="table-cell">
      <style:table-cell-properties style:vertical-align="middle" fo:background-color="transparent" fo:padding-left="0.075in" fo:padding-right="0.075in" fo:padding-top="0in" fo:padding-bottom="0in" fo:border="none">
        <style:background-image/>
      </style:table-cell-properties>
    </style:style>
    <style:style style:name="Table3" style:family="table">
      <style:table-properties style:width="5.8583in" fo:margin-left="0.0444in" fo:margin-top="0in" fo:margin-bottom="0in" table:align="left" style:writing-mode="lr-tb"/>
    </style:style>
    <style:style style:name="Table3.A" style:family="table-column">
      <style:table-column-properties style:column-width="0.3764in"/>
    </style:style>
    <style:style style:name="Table3.B" style:family="table-column">
      <style:table-column-properties style:column-width="1.3542in"/>
    </style:style>
    <style:style style:name="Table3.C" style:family="table-column">
      <style:table-column-properties style:column-width="0.9778in"/>
    </style:style>
    <style:style style:name="Table3.D" style:family="table-column">
      <style:table-column-properties style:column-width="3.1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fo:background-color="#b2b2b2"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orphans="0" fo:widows="0"/>
    </style:style>
    <style:style style:name="P5" style:family="paragraph" style:parent-style-name="Standard">
      <style:paragraph-properties fo:orphans="0" fo:widows="0">
        <style:tab-stops>
          <style:tab-stop style:position="3.9634in"/>
        </style:tab-stops>
      </style:paragraph-properties>
    </style:style>
    <style:style style:name="P6" style:family="paragraph" style:parent-style-name="Style_20_Right">
      <style:paragraph-properties fo:orphans="0" fo:widows="0"/>
    </style:style>
    <style:style style:name="P7" style:family="paragraph" style:parent-style-name="Contents_20_Heading">
      <style:paragraph-properties fo:margin-left="0in" fo:margin-right="0in" fo:text-indent="0in" style:auto-text-indent="false"/>
    </style:style>
    <style:style style:name="P8" style:family="paragraph" style:parent-style-name="Standard">
      <style:paragraph-properties fo:orphans="0" fo:widows="0"/>
      <style:text-properties fo:font-size="14pt" style:font-size-asian="14pt"/>
    </style:style>
    <style:style style:name="P9" style:family="paragraph" style:parent-style-name="Style_20_Right">
      <style:paragraph-properties fo:orphans="0" fo:widows="0"/>
      <style:text-properties fo:font-size="14pt" style:font-size-asian="14pt"/>
    </style:style>
    <style:style style:name="P10" style:family="paragraph" style:parent-style-name="Text_20_body">
      <style:paragraph-properties fo:margin-top="0in" fo:margin-bottom="0.0555in" style:contextual-spacing="false" fo:line-height="100%" fo:text-align="center" style:justify-single-word="false" fo:orphans="0" fo:widows="0"/>
      <style:text-properties fo:font-size="14pt" style:font-size-asian="14pt"/>
    </style:style>
    <style:style style:name="P11" style:family="paragraph" style:parent-style-name="Standard">
      <style:text-properties fo:color="#5b9bd5" loext:opacity="100%" fo:language="en" fo:country="US" fo:font-style="italic" style:font-style-asian="italic"/>
    </style:style>
    <style:style style:name="P12" style:family="paragraph" style:parent-style-name="Text_20_body">
      <style:text-properties fo:color="#5b9bd5" loext:opacity="100%" fo:font-style="italic" style:font-style-asian="italic" style:font-style-complex="italic"/>
    </style:style>
    <style:style style:name="P13" style:family="paragraph" style:parent-style-name="Standard">
      <style:text-properties fo:color="#5b9bd5" loext:opacity="100%" fo:font-style="italic" officeooo:rsid="0016d83a" officeooo:paragraph-rsid="0016d83a" style:font-style-asian="italic"/>
    </style:style>
    <style:style style:name="P14" style:family="paragraph" style:parent-style-name="Text_20_body">
      <style:text-properties fo:color="#5b9bd5" loext:opacity="100%" fo:font-style="italic" style:font-style-asian="italic"/>
    </style:style>
    <style:style style:name="P15" style:family="paragraph" style:parent-style-name="Standard">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able_5f_head">
      <style:paragraph-properties fo:text-align="start" style:justify-single-word="false" fo:orphans="2" fo:widows="2"/>
      <style:text-properties style:font-name="Times New Roman" fo:language="et" fo:country="EE" style:letter-kerning="false" style:font-name-asian="Times New Roman1" style:font-name-complex="Times New Roman1" style:language-complex="ar" style:country-complex="SA"/>
    </style:style>
    <style:style style:name="P18" style:family="paragraph" style:parent-style-name="Table_5f_text">
      <style:paragraph-properties fo:text-align="start" style:justify-single-word="false" fo:orphans="2" fo:widows="2"/>
      <style:text-properties style:font-name="Times New Roman" fo:language="et" fo:country="EE" style:letter-kerning="false" style:font-name-asian="Times New Roman1" style:font-name-complex="Times New Roman1" style:language-complex="ar" style:country-complex="SA"/>
    </style:style>
    <style:style style:name="P19" style:family="paragraph" style:parent-style-name="Table_5f_text">
      <style:paragraph-properties fo:text-align="start" style:justify-single-word="false" fo:orphans="2" fo:widows="2"/>
      <style:text-properties style:font-name="Times New Roman" fo:language="et" fo:country="EE" officeooo:rsid="0035c318" officeooo:paragraph-rsid="0035c318" style:letter-kerning="false" style:font-name-asian="Times New Roman1" style:font-name-complex="Times New Roman1" style:language-complex="ar" style:country-complex="SA"/>
    </style:style>
    <style:style style:name="P20" style:family="paragraph" style:parent-style-name="Table_5f_text">
      <style:paragraph-properties fo:text-align="start" style:justify-single-word="false" fo:orphans="2" fo:widows="2"/>
      <style:text-properties style:font-name="Times New Roman" fo:language="et" fo:country="EE" officeooo:rsid="0035f1a8" officeooo:paragraph-rsid="0035f1a8" style:letter-kerning="false" style:font-name-asian="Times New Roman1" style:font-name-complex="Times New Roman1" style:language-complex="ar" style:country-complex="SA"/>
    </style:style>
    <style:style style:name="P21" style:family="paragraph" style:parent-style-name="Table_5f_text">
      <style:paragraph-properties fo:text-align="start" style:justify-single-word="false" fo:orphans="2" fo:widows="2"/>
      <style:text-properties style:font-name="Times New Roman" fo:language="et" fo:country="EE" officeooo:rsid="0035f1a8" officeooo:paragraph-rsid="0037324b" style:letter-kerning="false" style:font-name-asian="Times New Roman1" style:font-name-complex="Times New Roman1" style:language-complex="ar" style:country-complex="SA"/>
    </style:style>
    <style:style style:name="P22" style:family="paragraph" style:parent-style-name="Table_5f_text">
      <style:paragraph-properties fo:text-align="start" style:justify-single-word="false" fo:orphans="2" fo:widows="2"/>
      <style:text-properties style:font-name="Times New Roman" fo:language="et" fo:country="EE" officeooo:rsid="0037324b" officeooo:paragraph-rsid="0037324b" style:letter-kerning="false" style:font-name-asian="Times New Roman1" style:font-name-complex="Times New Roman1" style:language-complex="ar" style:country-complex="SA"/>
    </style:style>
    <style:style style:name="P23" style:family="paragraph" style:parent-style-name="Table_5f_text">
      <style:paragraph-properties fo:text-align="center" style:justify-single-word="false" fo:orphans="2" fo:widows="2"/>
      <style:text-properties style:font-name="Times New Roman" fo:language="et" fo:country="EE" officeooo:rsid="0037324b" officeooo:paragraph-rsid="0037324b" style:letter-kerning="false" style:font-name-asian="Times New Roman1" style:font-name-complex="Times New Roman1" style:language-complex="ar" style:country-complex="SA"/>
    </style:style>
    <style:style style:name="P24" style:family="paragraph" style:parent-style-name="Table_5f_text">
      <style:paragraph-properties fo:text-align="start" style:justify-single-word="false" fo:orphans="2" fo:widows="2"/>
      <style:text-properties style:font-name="Times New Roman" fo:language="et" fo:country="EE" officeooo:rsid="0038d5aa" officeooo:paragraph-rsid="0038d5aa" style:letter-kerning="false" style:font-name-asian="Times New Roman1" style:font-name-complex="Times New Roman1" style:language-complex="ar" style:country-complex="SA"/>
    </style:style>
    <style:style style:name="P25" style:family="paragraph" style:parent-style-name="caption">
      <style:paragraph-properties fo:keep-with-next="always"/>
    </style:style>
    <style:style style:name="P26" style:family="paragraph" style:parent-style-name="University">
      <style:paragraph-properties fo:orphans="0" fo:widows="0"/>
      <style:text-properties fo:font-style="normal" style:font-style-asian="normal" style:font-style-complex="normal"/>
    </style:style>
    <style:style style:name="P27" style:family="paragraph" style:parent-style-name="Text_20_body">
      <style:text-properties fo:font-style="normal" officeooo:rsid="00205b58" officeooo:paragraph-rsid="0027da0d" style:font-style-asian="normal" style:font-style-complex="normal"/>
    </style:style>
    <style:style style:name="P28" style:family="paragraph" style:parent-style-name="Text_20_body">
      <style:text-properties fo:font-style="normal" officeooo:paragraph-rsid="0030e11f" style:font-style-asian="normal" style:font-style-complex="normal"/>
    </style:style>
    <style:style style:name="P29" style:family="paragraph" style:parent-style-name="Text_20_body">
      <style:text-properties fo:font-style="normal" officeooo:rsid="003a1d2e" officeooo:paragraph-rsid="003a1d2e" style:font-style-asian="normal" style:font-style-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tyle="normal" officeooo:rsid="003bf4b5" officeooo:paragraph-rsid="00400858" style:font-style-asian="normal" style:font-style-complex="normal"/>
    </style:style>
    <style:style style:name="P32" style:family="paragraph" style:parent-style-name="Text_20_body">
      <style:text-properties fo:font-style="normal" officeooo:rsid="003d4032" officeooo:paragraph-rsid="003d4032" style:font-style-asian="normal" style:font-style-complex="normal"/>
    </style:style>
    <style:style style:name="P33" style:family="paragraph" style:parent-style-name="Text_20_body">
      <style:text-properties fo:font-style="normal" officeooo:rsid="003ea914" officeooo:paragraph-rsid="003b9ab9" style:font-style-asian="normal" style:font-style-complex="normal"/>
    </style:style>
    <style:style style:name="P34" style:family="paragraph" style:parent-style-name="Text_20_body">
      <style:text-properties fo:font-style="normal" officeooo:rsid="003ea914" officeooo:paragraph-rsid="003ea914" style:font-style-asian="normal" style:font-style-complex="normal"/>
    </style:style>
    <style:style style:name="P35" style:family="paragraph" style:parent-style-name="Text_20_body">
      <style:text-properties fo:font-style="normal" officeooo:rsid="003eb67d" officeooo:paragraph-rsid="003eb67d" style:font-style-asian="normal" style:font-style-complex="normal"/>
    </style:style>
    <style:style style:name="P36" style:family="paragraph" style:parent-style-name="Text_20_body">
      <style:text-properties fo:font-style="normal" officeooo:rsid="003eb67d" officeooo:paragraph-rsid="003fa171" style:font-style-asian="normal" style:font-style-complex="normal"/>
    </style:style>
    <style:style style:name="P37" style:family="paragraph" style:parent-style-name="Text_20_body">
      <style:text-properties fo:font-style="normal" officeooo:rsid="003fa171" officeooo:paragraph-rsid="003fa171" style:font-style-asian="normal" style:font-style-complex="normal"/>
    </style:style>
    <style:style style:name="P38" style:family="paragraph" style:parent-style-name="Text_20_body">
      <style:text-properties fo:font-style="normal" officeooo:rsid="002bf639" officeooo:paragraph-rsid="002bf639" style:font-style-asian="normal" style:font-style-complex="normal"/>
    </style:style>
    <style:style style:name="P39" style:family="paragraph" style:parent-style-name="Text_20_body">
      <style:text-properties fo:font-style="normal" officeooo:rsid="0038d5aa" officeooo:paragraph-rsid="00393179" style:font-style-asian="normal" style:font-style-complex="normal"/>
    </style:style>
    <style:style style:name="P40" style:family="paragraph" style:parent-style-name="Text_20_body">
      <style:text-properties fo:font-style="normal" officeooo:rsid="0038d5aa" officeooo:paragraph-rsid="00393629" style:font-style-asian="normal" style:font-style-complex="normal"/>
    </style:style>
    <style:style style:name="P41" style:family="paragraph" style:parent-style-name="Text_20_body">
      <style:text-properties fo:font-style="normal" officeooo:rsid="0030e11f" officeooo:paragraph-rsid="0030e11f" style:font-style-asian="normal" style:font-style-complex="normal"/>
    </style:style>
    <style:style style:name="P42" style:family="paragraph" style:parent-style-name="Text_20_body">
      <style:text-properties fo:font-style="normal" officeooo:rsid="0016d83a" officeooo:paragraph-rsid="0016d83a" style:font-style-asian="normal" style:font-style-complex="normal"/>
    </style:style>
    <style:style style:name="P43" style:family="paragraph" style:parent-style-name="Text_20_body">
      <style:text-properties fo:font-style="normal" officeooo:paragraph-rsid="0016d83a" style:font-style-asian="normal" style:font-style-complex="normal"/>
    </style:style>
    <style:style style:name="P44" style:family="paragraph" style:parent-style-name="Text_20_body">
      <style:text-properties fo:font-style="normal" officeooo:paragraph-rsid="0026f138" style:font-style-asian="normal" style:font-style-complex="normal"/>
    </style:style>
    <style:style style:name="P45" style:family="paragraph" style:parent-style-name="Heading_5f_title">
      <style:paragraph-properties fo:orphans="0" fo:widows="0"/>
      <style:text-properties officeooo:rsid="0016d83a" officeooo:paragraph-rsid="0016d83a"/>
    </style:style>
    <style:style style:name="P46" style:family="paragraph" style:parent-style-name="Standard">
      <style:paragraph-properties fo:orphans="0" fo:widows="0"/>
      <style:text-properties officeooo:rsid="0016d83a" officeooo:paragraph-rsid="0016d83a"/>
    </style:style>
    <style:style style:name="P47" style:family="paragraph" style:parent-style-name="Standard">
      <style:paragraph-properties fo:text-align="center" style:justify-single-word="false" fo:orphans="0" fo:widows="0"/>
      <style:text-properties officeooo:rsid="0016d83a" officeooo:paragraph-rsid="0016d83a"/>
    </style:style>
    <style:style style:name="P48" style:family="paragraph" style:parent-style-name="Contents_20_1">
      <style:paragraph-properties>
        <style:tab-stops>
          <style:tab-stop style:position="5.9055in" style:type="right" style:leader-style="dotted" style:leader-text="."/>
        </style:tab-stops>
      </style:paragraph-properties>
    </style:style>
    <style:style style:name="P49" style:family="paragraph" style:parent-style-name="Contents_20_2">
      <style:paragraph-properties>
        <style:tab-stops>
          <style:tab-stop style:position="5.9055in" style:type="right" style:leader-style="dotted" style:leader-text="."/>
        </style:tab-stops>
      </style:paragraph-properties>
    </style:style>
    <style:style style:name="P50" style:family="paragraph" style:parent-style-name="Contents_20_3">
      <style:paragraph-properties>
        <style:tab-stops>
          <style:tab-stop style:position="5.9055in" style:type="right" style:leader-style="dotted" style:leader-text="."/>
        </style:tab-stops>
      </style:paragraph-properties>
    </style:style>
    <style:style style:name="P51" style:family="paragraph" style:parent-style-name="Figure_20_Index_20_1">
      <style:paragraph-properties>
        <style:tab-stops>
          <style:tab-stop style:position="5.9055in" style:type="right" style:leader-style="dotted" style:leader-text="."/>
        </style:tab-stops>
      </style:paragraph-properties>
    </style:style>
    <style:style style:name="P52" style:family="paragraph" style:parent-style-name="Table_5f_text">
      <style:paragraph-properties fo:orphans="0" fo:widows="0"/>
      <style:text-properties officeooo:rsid="003a1d2e" officeooo:paragraph-rsid="003a1d2e"/>
    </style:style>
    <style:style style:name="P53" style:family="paragraph" style:parent-style-name="Standard">
      <style:text-properties fo:color="#000000" loext:opacity="100%" fo:font-style="normal" officeooo:rsid="0016d83a" officeooo:paragraph-rsid="0016d83a" style:font-style-asian="normal" style:font-style-complex="normal"/>
    </style:style>
    <style:style style:name="P54" style:family="paragraph" style:parent-style-name="Text_20_body">
      <style:text-properties fo:color="#000000" loext:opacity="100%" fo:font-style="normal" officeooo:rsid="001e5de4" officeooo:paragraph-rsid="0027da0d" style:font-style-asian="normal" style:font-style-complex="normal"/>
    </style:style>
    <style:style style:name="P55" style:family="paragraph" style:parent-style-name="Text_20_body">
      <style:text-properties fo:color="#000000" loext:opacity="100%" fo:font-style="normal" officeooo:rsid="0029a98d" officeooo:paragraph-rsid="0029a98d" style:font-style-asian="normal" style:font-style-complex="normal"/>
    </style:style>
    <style:style style:name="P56" style:family="paragraph" style:parent-style-name="Text_20_body">
      <style:text-properties fo:color="#000000" loext:opacity="100%" fo:font-style="normal" officeooo:rsid="0029a98d" officeooo:paragraph-rsid="002f6eda" style:font-style-asian="normal" style:font-style-complex="normal"/>
    </style:style>
    <style:style style:name="P57" style:family="paragraph" style:parent-style-name="Text_20_body">
      <style:text-properties fo:color="#000000" loext:opacity="100%" fo:font-style="normal" officeooo:rsid="002b9639" officeooo:paragraph-rsid="002b9639" style:font-style-asian="normal" style:font-style-complex="normal"/>
    </style:style>
    <style:style style:name="P58" style:family="paragraph" style:parent-style-name="Text_20_body">
      <style:text-properties fo:color="#000000" loext:opacity="100%" fo:font-style="normal" officeooo:rsid="002b9639" officeooo:paragraph-rsid="002bf639" style:font-style-asian="normal" style:font-style-complex="normal"/>
    </style:style>
    <style:style style:name="P59" style:family="paragraph" style:parent-style-name="Text_20_body">
      <style:text-properties officeooo:rsid="001b232e" officeooo:paragraph-rsid="001c587c"/>
    </style:style>
    <style:style style:name="P60" style:family="paragraph" style:parent-style-name="Text_20_body">
      <style:text-properties officeooo:paragraph-rsid="001d9fde"/>
    </style:style>
    <style:style style:name="P61" style:family="paragraph" style:parent-style-name="Text_20_body">
      <style:text-properties officeooo:paragraph-rsid="0027da0d"/>
    </style:style>
    <style:style style:name="P62" style:family="paragraph" style:parent-style-name="Text_20_body">
      <style:text-properties officeooo:paragraph-rsid="002bf639"/>
    </style:style>
    <style:style style:name="P63" style:family="paragraph" style:parent-style-name="Text_20_body">
      <style:text-properties officeooo:rsid="002f6eda" officeooo:paragraph-rsid="0030e11f"/>
    </style:style>
    <style:style style:name="P64" style:family="paragraph" style:parent-style-name="Text_20_body">
      <style:text-properties officeooo:rsid="00342a52" officeooo:paragraph-rsid="00342a52"/>
    </style:style>
    <style:style style:name="P65" style:family="paragraph" style:parent-style-name="Heading_5f_unnumber" style:master-page-name="Converted11">
      <style:paragraph-properties fo:margin-left="0in" fo:margin-right="0in" fo:text-indent="0in" style:auto-text-indent="false" style:page-number="auto"/>
      <style:text-properties fo:font-style="normal" style:font-style-asian="normal" style:font-style-complex="normal"/>
    </style:style>
    <style:style style:name="P66" style:family="paragraph" style:parent-style-name="Heading_5f_center" style:master-page-name="Converted1">
      <style:paragraph-properties fo:margin-left="0in" fo:margin-right="0in" fo:text-indent="0in" style:auto-text-indent="false" style:page-number="auto"/>
      <style:text-properties fo:font-style="normal" style:font-style-asian="normal" style:font-style-complex="normal"/>
    </style:style>
    <style:style style:name="P67" style:family="paragraph" style:parent-style-name="Heading_5f_center" style:master-page-name="Converted2">
      <style:paragraph-properties fo:margin-left="0in" fo:margin-right="0in" fo:text-indent="0in" style:auto-text-indent="false" style:page-number="auto"/>
      <style:text-properties fo:font-style="normal" style:font-style-asian="normal" style:font-style-complex="normal"/>
    </style:style>
    <style:style style:name="P68" style:family="paragraph" style:parent-style-name="Heading_5f_center" style:master-page-name="Converted3">
      <style:paragraph-properties fo:margin-left="0in" fo:margin-right="0in" fo:text-indent="0in" style:auto-text-indent="false" style:page-number="auto"/>
      <style:text-properties fo:font-style="normal" style:font-style-asian="normal" style:font-style-complex="normal"/>
    </style:style>
    <style:style style:name="P69" style:family="paragraph" style:parent-style-name="Heading_5f_center" style:master-page-name="Converted4">
      <style:paragraph-properties fo:margin-left="0in" fo:margin-right="0in" fo:text-indent="0in" style:auto-text-indent="false" style:page-number="auto"/>
      <style:text-properties fo:font-style="normal" style:font-style-asian="normal" style:font-style-complex="normal"/>
    </style:style>
    <style:style style:name="P70" style:family="paragraph" style:parent-style-name="Heading_5f_center" style:master-page-name="Converted5">
      <style:paragraph-properties fo:margin-left="0in" fo:margin-right="0in" fo:text-indent="0in" style:auto-text-indent="false" style:page-number="auto"/>
      <style:text-properties fo:font-style="normal" style:font-style-asian="normal" style:font-style-complex="normal"/>
    </style:style>
    <style:style style:name="P71" style:family="paragraph" style:parent-style-name="Contents_20_1">
      <style:paragraph-properties>
        <style:tab-stops>
          <style:tab-stop style:position="5.9055in" style:type="right" style:leader-style="dotted" style:leader-text="."/>
        </style:tab-stops>
      </style:paragraph-properties>
    </style:style>
    <style:style style:name="P72" style:family="paragraph" style:parent-style-name="Contents_20_2">
      <style:paragraph-properties>
        <style:tab-stops>
          <style:tab-stop style:position="5.9055in" style:type="right" style:leader-style="dotted" style:leader-text="."/>
        </style:tab-stops>
      </style:paragraph-properties>
    </style:style>
    <style:style style:name="P73" style:family="paragraph" style:parent-style-name="Contents_20_3">
      <style:paragraph-properties>
        <style:tab-stops>
          <style:tab-stop style:position="5.9055in" style:type="right" style:leader-style="dotted" style:leader-text="."/>
        </style:tab-stops>
      </style:paragraph-properties>
    </style:style>
    <style:style style:name="P74" style:family="paragraph" style:parent-style-name="Figure_20_Index_20_1">
      <style:paragraph-properties>
        <style:tab-stops>
          <style:tab-stop style:position="5.9055in" style:type="right" style:leader-style="dotted" style:leader-text="."/>
        </style:tab-stops>
      </style:paragraph-properties>
    </style:style>
    <style:style style:name="P75" style:family="paragraph" style:parent-style-name="Heading_20_1" style:list-style-name="WWNum5" style:master-page-name="Converted6">
      <style:paragraph-properties style:page-number="auto"/>
      <style:text-properties fo:font-style="normal" style:font-style-asian="normal" style:font-style-complex="normal"/>
    </style:style>
    <style:style style:name="P76" style:family="paragraph" style:parent-style-name="Heading_20_1" style:list-style-name="WWNum5" style:master-page-name="Converted8">
      <style:paragraph-properties style:page-number="auto"/>
      <style:text-properties fo:font-style="normal" style:font-style-asian="normal" style:font-style-complex="normal"/>
    </style:style>
    <style:style style:name="P77" style:family="paragraph" style:parent-style-name="Heading_20_1" style:list-style-name="WWNum5" style:master-page-name="Converted9">
      <style:paragraph-properties style:page-number="auto"/>
      <style:text-properties fo:font-style="normal" style:font-style-asian="normal" style:font-style-complex="normal"/>
    </style:style>
    <style:style style:name="P78" style:family="paragraph" style:parent-style-name="Heading_20_1" style:list-style-name="" style:master-page-name="Converted7">
      <style:paragraph-properties style:page-number="auto"/>
      <style:text-properties fo:font-style="normal" officeooo:paragraph-rsid="0030e11f" style:font-style-asian="normal" style:font-style-complex="normal"/>
    </style:style>
    <style:style style:name="P79" style:family="paragraph" style:parent-style-name="Heading_20_1">
      <style:paragraph-properties fo:break-before="page"/>
      <style:text-properties fo:font-style="normal" officeooo:rsid="00205b58" officeooo:paragraph-rsid="0026f138" style:font-style-asian="normal" style:font-style-complex="normal"/>
    </style:style>
    <style:style style:name="P80" style:family="paragraph" style:parent-style-name="Heading_20_1" style:list-style-name="">
      <style:paragraph-properties fo:line-height="150%" fo:text-align="start" style:justify-single-word="false" fo:orphans="2" fo:widows="2"/>
      <style:text-properties officeooo:rsid="00205b58" officeooo:paragraph-rsid="0026f138"/>
    </style:style>
    <style:style style:name="P81" style:family="paragraph" style:parent-style-name="Heading_20_2" style:list-style-name="WWNum5"/>
    <style:style style:name="P82" style:family="paragraph" style:parent-style-name="Heading_20_2" style:list-style-name=""/>
    <style:style style:name="P83" style:family="paragraph" style:parent-style-name="Heading_20_2">
      <style:text-properties officeooo:rsid="003a1d2e" officeooo:paragraph-rsid="003a1d2e"/>
    </style:style>
    <style:style style:name="P84" style:family="paragraph" style:parent-style-name="Heading_20_3">
      <style:text-properties officeooo:rsid="003a1d2e" officeooo:paragraph-rsid="003a1d2e"/>
    </style:style>
    <style:style style:name="P85" style:family="paragraph" style:parent-style-name="Heading_20_3">
      <style:text-properties officeooo:paragraph-rsid="0030e11f"/>
    </style:style>
    <style:style style:name="P86" style:family="paragraph" style:parent-style-name="Heading_20_3" style:list-style-name="">
      <style:paragraph-properties fo:line-height="150%" fo:text-align="start" style:justify-single-word="false" fo:orphans="2" fo:widows="2"/>
      <style:text-properties officeooo:paragraph-rsid="0030e11f"/>
    </style:style>
    <style:style style:name="P87" style:family="paragraph" style:parent-style-name="Heading_20_3">
      <style:paragraph-properties fo:break-before="page"/>
    </style:style>
    <style:style style:name="P88" style:family="paragraph" style:parent-style-name="Text_20_body">
      <style:text-properties fo:font-style="normal" officeooo:rsid="00393629" officeooo:paragraph-rsid="00393629" style:font-style-asian="normal" style:font-style-complex="normal"/>
    </style:style>
    <style:style style:name="P89" style:family="paragraph" style:parent-style-name="Text_20_body" style:list-style-name="L1">
      <style:paragraph-properties fo:text-align="justify" style:justify-single-word="false"/>
      <style:text-properties fo:font-style="normal" officeooo:rsid="0018b288" officeooo:paragraph-rsid="0018b288" style:font-style-asian="normal" style:font-style-complex="normal"/>
    </style:style>
    <style:style style:name="P90" style:family="paragraph" style:parent-style-name="Text_20_body">
      <style:text-properties fo:font-style="normal" officeooo:rsid="002f6eda" officeooo:paragraph-rsid="002f6eda" style:font-style-asian="normal" style:font-style-complex="normal"/>
    </style:style>
    <style:style style:name="P91" style:family="paragraph" style:parent-style-name="Text_20_body" style:list-style-name="L2">
      <style:text-properties fo:font-style="normal" officeooo:rsid="003a1d2e" officeooo:paragraph-rsid="003a1d2e" style:font-style-asian="normal" style:font-style-complex="normal"/>
    </style:style>
    <style:style style:name="P92" style:family="paragraph" style:parent-style-name="Text_20_body">
      <style:text-properties fo:font-style="normal" officeooo:rsid="003bf4b5" officeooo:paragraph-rsid="003bf4b5" style:font-style-asian="normal" style:font-style-complex="normal"/>
    </style:style>
    <style:style style:name="P93" style:family="paragraph" style:parent-style-name="Text_20_body">
      <style:text-properties fo:font-style="normal" officeooo:rsid="001c587c" officeooo:paragraph-rsid="001c587c" style:font-style-asian="normal" style:font-style-complex="normal"/>
    </style:style>
    <style:style style:name="P94" style:family="paragraph" style:parent-style-name="Text_20_body">
      <style:text-properties fo:font-style="normal" officeooo:paragraph-rsid="00205b58" style:font-style-asian="normal" style:font-style-complex="normal"/>
    </style:style>
    <style:style style:name="P95" style:family="paragraph" style:parent-style-name="Text_20_body">
      <style:text-properties fo:font-style="italic" officeooo:rsid="003eb67d" officeooo:paragraph-rsid="003eb67d" style:font-style-asian="italic" style:font-style-complex="italic"/>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officeooo:rsid="001c587c" style:font-style-asian="italic" style:font-style-complex="italic"/>
    </style:style>
    <style:style style:name="T4" style:family="text">
      <style:text-properties fo:font-style="italic" officeooo:rsid="001d9fde" style:font-style-asian="italic" style:font-style-complex="italic"/>
    </style:style>
    <style:style style:name="T5" style:family="text">
      <style:text-properties fo:font-style="italic" officeooo:rsid="002bf639" style:font-style-asian="italic" style:font-style-complex="italic"/>
    </style:style>
    <style:style style:name="T6" style:family="text">
      <style:text-properties fo:font-style="italic" fo:font-weight="bold" officeooo:rsid="001c587c"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language="en" fo:country="GB"/>
    </style:style>
    <style:style style:name="T9" style:family="text">
      <style:text-properties officeooo:rsid="0016d83a"/>
    </style:style>
    <style:style style:name="T10" style:family="text">
      <style:text-properties officeooo:rsid="0018b288"/>
    </style:style>
    <style:style style:name="T11" style:family="text">
      <style:text-properties fo:font-weight="bold" style:font-weight-asian="bold" style:font-weight-complex="bold"/>
    </style:style>
    <style:style style:name="T12" style:family="text">
      <style:text-properties fo:font-weight="bold" officeooo:rsid="0016d83a" style:font-weight-asian="bold" style:font-weight-complex="bold"/>
    </style:style>
    <style:style style:name="T13" style:family="text">
      <style:text-properties fo:font-weight="bold" officeooo:rsid="001d9fde" style:font-weight-asian="bold" style:font-weight-complex="bold"/>
    </style:style>
    <style:style style:name="T14" style:family="text">
      <style:text-properties officeooo:rsid="001a61cd"/>
    </style:style>
    <style:style style:name="T15" style:family="text">
      <style:text-properties officeooo:rsid="001c587c"/>
    </style:style>
    <style:style style:name="T16" style:family="text">
      <style:text-properties fo:font-style="normal" style:font-style-asian="normal" style:font-style-complex="normal"/>
    </style:style>
    <style:style style:name="T17" style:family="text">
      <style:text-properties fo:font-style="normal" officeooo:rsid="001c587c" style:font-style-asian="normal" style:font-style-complex="normal"/>
    </style:style>
    <style:style style:name="T18" style:family="text">
      <style:text-properties fo:font-style="normal" officeooo:rsid="001d9fde" style:font-style-asian="normal" style:font-style-complex="normal"/>
    </style:style>
    <style:style style:name="T19" style:family="text">
      <style:text-properties fo:font-style="normal" officeooo:rsid="001f9b1f" style:font-style-asian="normal" style:font-style-complex="normal"/>
    </style:style>
    <style:style style:name="T20" style:family="text">
      <style:text-properties fo:font-style="normal" officeooo:rsid="0025b6ac" style:font-style-asian="normal" style:font-style-complex="normal"/>
    </style:style>
    <style:style style:name="T21" style:family="text">
      <style:text-properties fo:font-style="normal" officeooo:rsid="00393179" style:font-style-asian="normal" style:font-style-complex="normal"/>
    </style:style>
    <style:style style:name="T22" style:family="text">
      <style:text-properties fo:font-style="normal" officeooo:rsid="003a1d2e" style:font-style-asian="normal" style:font-style-complex="normal"/>
    </style:style>
    <style:style style:name="T23" style:family="text">
      <style:text-properties fo:font-style="normal" officeooo:rsid="002bf639" style:font-style-asian="normal" style:font-style-complex="normal"/>
    </style:style>
    <style:style style:name="T24" style:family="text">
      <style:text-properties fo:font-style="normal" officeooo:rsid="00400858" style:font-style-asian="normal" style:font-style-complex="normal"/>
    </style:style>
    <style:style style:name="T25" style:family="text">
      <style:text-properties fo:font-style="normal" officeooo:rsid="0022149e" style:font-style-asian="normal" style:font-style-complex="normal"/>
    </style:style>
    <style:style style:name="T26" style:family="text">
      <style:text-properties fo:font-style="normal" officeooo:rsid="00419265" style:font-style-asian="normal" style:font-style-complex="normal"/>
    </style:style>
    <style:style style:name="T27" style:family="text">
      <style:text-properties fo:font-style="normal" fo:font-weight="bold" officeooo:rsid="001d9fde" style:font-style-asian="normal" style:font-weight-asian="bold" style:font-style-complex="normal" style:font-weight-complex="bold"/>
    </style:style>
    <style:style style:name="T28" style:family="text">
      <style:text-properties fo:font-style="normal" fo:font-weight="normal" officeooo:rsid="001e5de4" style:font-style-asian="normal" style:font-weight-asian="normal" style:font-style-complex="normal" style:font-weight-complex="normal"/>
    </style:style>
    <style:style style:name="T29" style:family="text">
      <style:text-properties fo:font-style="normal" fo:font-weight="normal" officeooo:rsid="001d9fde" style:font-style-asian="normal" style:font-weight-asian="normal" style:font-style-complex="normal" style:font-weight-complex="normal"/>
    </style:style>
    <style:style style:name="T30" style:family="text">
      <style:text-properties officeooo:rsid="001d9fde"/>
    </style:style>
    <style:style style:name="T31" style:family="text">
      <style:text-properties officeooo:rsid="001f9b1f"/>
    </style:style>
    <style:style style:name="T32" style:family="text">
      <style:text-properties officeooo:rsid="00205b58"/>
    </style:style>
    <style:style style:name="T33" style:family="text">
      <style:text-properties officeooo:rsid="0022149e"/>
    </style:style>
    <style:style style:name="T34" style:family="text">
      <style:text-properties officeooo:rsid="0025b6ac"/>
    </style:style>
    <style:style style:name="T35" style:family="text">
      <style:text-properties officeooo:rsid="0026f138"/>
    </style:style>
    <style:style style:name="T36" style:family="text">
      <style:text-properties officeooo:rsid="0027da0d"/>
    </style:style>
    <style:style style:name="T37" style:family="text">
      <style:text-properties fo:color="#000000" loext:opacity="100%" fo:font-style="normal" officeooo:rsid="00205b58" style:font-style-asian="normal" style:font-style-complex="normal"/>
    </style:style>
    <style:style style:name="T38" style:family="text">
      <style:text-properties fo:color="#000000" loext:opacity="100%" fo:font-style="normal" officeooo:rsid="0022149e" style:font-style-asian="normal" style:font-style-complex="normal"/>
    </style:style>
    <style:style style:name="T39" style:family="text">
      <style:text-properties fo:color="#000000" loext:opacity="100%" fo:font-style="normal" officeooo:rsid="0027da0d" style:font-style-asian="normal" style:font-style-complex="normal"/>
    </style:style>
    <style:style style:name="T40" style:family="text">
      <style:text-properties fo:color="#000000" loext:opacity="100%" fo:font-style="normal" officeooo:rsid="0029a98d" style:font-style-asian="normal" style:font-style-complex="normal"/>
    </style:style>
    <style:style style:name="T41" style:family="text">
      <style:text-properties fo:color="#000000" loext:opacity="100%" fo:font-style="normal" officeooo:rsid="002b9639" style:font-style-asian="normal" style:font-style-complex="normal"/>
    </style:style>
    <style:style style:name="T42" style:family="text">
      <style:text-properties fo:color="#000000" loext:opacity="100%" fo:font-style="normal" officeooo:rsid="00419265" style:font-style-asian="normal" style:font-style-complex="normal"/>
    </style:style>
    <style:style style:name="T43" style:family="text">
      <style:text-properties officeooo:rsid="0029a98d"/>
    </style:style>
    <style:style style:name="T44" style:family="text">
      <style:text-properties officeooo:rsid="002b9639"/>
    </style:style>
    <style:style style:name="T45" style:family="text">
      <style:text-properties officeooo:rsid="002bf639"/>
    </style:style>
    <style:style style:name="T46" style:family="text">
      <style:text-properties officeooo:rsid="002dc3cd"/>
    </style:style>
    <style:style style:name="T47" style:family="text">
      <style:text-properties officeooo:rsid="0030e11f"/>
    </style:style>
    <style:style style:name="T48" style:family="text">
      <style:text-properties officeooo:rsid="003289de"/>
    </style:style>
    <style:style style:name="T49" style:family="text">
      <style:text-properties officeooo:rsid="0037324b"/>
    </style:style>
    <style:style style:name="T50" style:family="text">
      <style:text-properties officeooo:rsid="0038d5aa"/>
    </style:style>
    <style:style style:name="T51" style:family="text">
      <style:text-properties officeooo:rsid="00393179"/>
    </style:style>
    <style:style style:name="T52" style:family="text">
      <style:text-properties officeooo:rsid="003a1d2e"/>
    </style:style>
    <style:style style:name="T53" style:family="text">
      <style:text-properties officeooo:rsid="003b9ab9"/>
    </style:style>
    <style:style style:name="T54" style:family="text">
      <style:text-properties officeooo:rsid="003bf4b5"/>
    </style:style>
    <style:style style:name="T55" style:family="text">
      <style:text-properties style:text-underline-style="none"/>
    </style:style>
    <style:style style:name="T56" style:family="text">
      <style:text-properties officeooo:rsid="003fa171"/>
    </style:style>
    <style:style style:name="T57" style:family="text">
      <style:text-properties officeooo:rsid="00419265"/>
    </style:style>
    <style:style style:name="T58" style:family="text">
      <style:text-properties fo:font-weight="normal" officeooo:rsid="001d9fde" style:font-weight-asian="normal" style:font-weight-complex="normal"/>
    </style:style>
    <style:style style:name="T59" style:family="text">
      <style:text-properties fo:font-weight="normal" officeooo:rsid="001e5de4" style:font-weight-asian="normal" style:font-weight-complex="normal"/>
    </style:style>
    <style:style style:name="T60"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Joonis"/>
        <text:sequence-decl text:display-outline-level="0" text:name="Lisa"/>
      </text:sequence-decls>
      <text:section text:style-name="Sect1" text:name="TextSection">
        <table:table table:name="Table1" table:style-name="Table1">
          <table:table-column table:style-name="Table1.A"/>
          <table:table-column table:style-name="Table1.B"/>
          <table:table-row table:style-name="Table1.1">
            <table:table-cell table:style-name="Table1.A1" table:number-columns-spanned="2" office:value-type="string">
              <text:p text:style-name="P26">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Arvutisüsteemide instituut</text:p>
            </table:table-cell>
            <table:covered-table-cell/>
          </table:table-row>
          <table:table-row table:style-name="Table1.4">
            <table:table-cell table:style-name="Table1.A1" table:number-columns-spanned="2" office:value-type="string">
              <text:p text:style-name="P10"/>
            </table:table-cell>
            <table:covered-table-cell/>
          </table:table-row>
          <table:table-row table:style-name="Table1.5">
            <table:table-cell table:style-name="Table1.A1" table:number-columns-spanned="2" office:value-type="string">
              <text:p text:style-name="P3"/>
            </table:table-cell>
            <table:covered-table-cell/>
          </table:table-row>
          <table:table-row table:style-name="Table1.6">
            <table:table-cell table:style-name="Table1.A1" table:number-columns-spanned="2" office:value-type="string">
              <text:p text:style-name="P47">Frank Christopher Kirch 221925IVCM</text:p>
            </table:table-cell>
            <table:covered-table-cell/>
          </table:table-row>
          <table:table-row table:style-name="Table1.7">
            <table:table-cell table:style-name="Table1.A7" table:number-columns-spanned="2" office:value-type="string">
              <text:p text:style-name="P45">KODUTÖÖ 1: Funktsiooni y = F(x) tabuleerimine</text:p>
            </table:table-cell>
            <table:covered-table-cell/>
          </table:table-row>
          <table:table-row table:style-name="Table1.8">
            <table:table-cell table:style-name="Table1.A1" table:number-columns-spanned="2" office:value-type="string">
              <text:p text:style-name="P47">Kodutöö</text:p>
            </table:table-cell>
            <table:covered-table-cell/>
          </table:table-row>
          <table:table-row table:style-name="Table1.5">
            <table:table-cell table:style-name="Table1.A1" office:value-type="string">
              <text:p text:style-name="P6">Juhendaja:</text:p>
            </table:table-cell>
            <table:table-cell table:style-name="Table1.A1" office:value-type="string">
              <text:p text:style-name="P46">Risto Heinsar</text:p>
            </table:table-cell>
          </table:table-row>
          <table:table-row table:style-name="Table1.5">
            <table:table-cell table:style-name="Table1.A1" office:value-type="string">
              <text:p text:style-name="P6"/>
            </table:table-cell>
            <table:table-cell table:style-name="Table1.A1" office:value-type="string">
              <text:p text:style-name="P46">Insener</text:p>
            </table:table-cell>
          </table:table-row>
          <table:table-row table:style-name="Table1.5">
            <table:table-cell table:style-name="Table1.A1" office:value-type="string">
              <text:p text:style-name="P6"/>
            </table:table-cell>
            <table:table-cell table:style-name="Table1.A1" office:value-type="string">
              <text:p text:style-name="P4"/>
            </table:table-cell>
          </table:table-row>
          <table:table-row table:style-name="Table1.5">
            <table:table-cell table:style-name="Table1.A1" office:value-type="string">
              <text:p text:style-name="P9"/>
            </table:table-cell>
            <table:table-cell table:style-name="Table1.A1" office:value-type="string">
              <text:p text:style-name="P8"/>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
        <text:p text:style-name="Standard"/>
      </text:section>
      <text:h text:style-name="P66" text:outline-level="1"><text:bookmark-start text:name="_Toc143516448"/><text:bookmark-start text:name="__RefHeading___Toc2997_2890390417"/><text:bookmark-start text:name="_Toc143525416"/>Autorideklaratsioon<text:bookmark-end text:name="_Toc143516448"/><text:bookmark-end text:name="__RefHeading___Toc2997_2890390417"/><text:bookmark-end text:name="_Toc143525416"/></text:h>
      <text:p text:style-name="P30">Kinnitan, et olen koostanud antud kodutöö iseseisvalt <text:s/>ning seda ei ole kellegi teise poolt varem kaitsmisele esitatud. Kõik töö koostamisel kasutatud teiste autorite tööd, olulised seisukohad, kirjandusallikatest ja mujalt pärinevad andmed on töös viidatud.</text:p>
      <text:p text:style-name="P30">Autor: <text:span text:style-name="T9">Frank Christopher Kirch</text:span></text:p>
      <text:p text:style-name="P42">29.11.2023</text:p>
      <text:p text:style-name="Standard"/>
      <text:h text:style-name="P67" text:outline-level="1"><text:bookmark-start text:name="_Toc437263082"/><text:bookmark-start text:name="_Toc143525417"/><text:bookmark-start text:name="__RefHeading___Toc2999_2890390417"/><text:bookmark-start text:name="_Toc143516449"/>Lühendite ja mõistete sõnastik<text:bookmark-end text:name="_Toc437263082"/><text:bookmark-end text:name="_Toc143525417"/><text:bookmark-end text:name="__RefHeading___Toc2999_2890390417"/><text:bookmark-end text:name="_Toc143516449"/></text:h>
      <table:table table:name="Table2" table:style-name="Table2">
        <table:table-column table:style-name="Table2.A"/>
        <table:table-column table:style-name="Table2.B"/>
        <table:table-row table:style-name="Table2.1">
          <table:table-cell table:style-name="Table2.A1" office:value-type="string">
            <text:p text:style-name="P52">N</text:p>
          </table:table-cell>
          <table:table-cell table:style-name="Table2.A1" office:value-type="string">
            <text:p text:style-name="P52">Sammude arv</text:p>
          </table:table-cell>
        </table:table-row>
        <table:table-row table:style-name="Table2.1">
          <table:table-cell table:style-name="Table2.A1" office:value-type="string">
            <text:p text:style-name="P52">H</text:p>
          </table:table-cell>
          <table:table-cell table:style-name="Table2.A1" office:value-type="string">
            <text:p text:style-name="P52">Sammude pikkus</text:p>
          </table:table-cell>
        </table:table-row>
        <table:table-row table:style-name="Table2.1">
          <table:table-cell table:style-name="Table2.A1" office:value-type="string">
            <text:p text:style-name="P52">A</text:p>
          </table:table-cell>
          <table:table-cell table:style-name="Table2.A1" office:value-type="string">
            <text:p text:style-name="P52">Funktsiooni argumendi algväärtus</text:p>
          </table:table-cell>
        </table:table-row>
        <table:table-row table:style-name="Table2.1">
          <table:table-cell table:style-name="Table2.A1" office:value-type="string">
            <text:p text:style-name="P52">B</text:p>
          </table:table-cell>
          <table:table-cell table:style-name="Table2.A1" office:value-type="string">
            <text:p text:style-name="P52">Funktsiooni argumendi lõppväärtus</text:p>
          </table:table-cell>
        </table:table-row>
        <table:table-row table:style-name="Table2.1">
          <table:table-cell table:style-name="Table2.A1" office:value-type="string">
            <text:p text:style-name="P52">UML</text:p>
          </table:table-cell>
          <table:table-cell table:style-name="Table2.A1" office:value-type="string">
            <text:p text:style-name="P52">Unified Modeling Language</text:p>
          </table:table-cell>
        </table:table-row>
      </table:table>
      <text:p text:style-name="Standard"/>
      <text:h text:style-name="P68" text:outline-level="1"><text:bookmark-start text:name="_Toc143516450"/><text:bookmark-start text:name="__RefHeading___Toc3001_2890390417"/><text:bookmark-start text:name="_Toc143525418"/>Sisukord<text:bookmark-end text:name="_Toc143516450"/><text:bookmark-end text:name="__RefHeading___Toc3001_2890390417"/><text:bookmark-end text:name="_Toc143525418"/></text:h>
      <text:p text:style-name="P14"/>
      <text:p text:style-name="P1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_RefHeading___Toc2997_2890390417" text:style-name="Index_20_Link" text:visited-style-name="Index_20_Link">Autorideklaratsioon<text:tab/>2</text:a></text:p>
          <text:p text:style-name="P71"><text:a xlink:type="simple" xlink:href="#__RefHeading___Toc2999_2890390417" text:style-name="Index_20_Link" text:visited-style-name="Index_20_Link">Lühendite ja mõistete sõnastik<text:tab/>3</text:a></text:p>
          <text:p text:style-name="P71"><text:a xlink:type="simple" xlink:href="#__RefHeading___Toc3001_2890390417" text:style-name="Index_20_Link" text:visited-style-name="Index_20_Link">Sisukord<text:tab/>4</text:a></text:p>
          <text:p text:style-name="P71"><text:a xlink:type="simple" xlink:href="#__RefHeading___Toc3003_2890390417" text:style-name="Index_20_Link" text:visited-style-name="Index_20_Link">Jooniste loetelu<text:tab/>6</text:a></text:p>
          <text:p text:style-name="P71"><text:a xlink:type="simple" xlink:href="#__RefHeading___Toc3005_2890390417" text:style-name="Index_20_Link" text:visited-style-name="Index_20_Link">Tabelite loetelu<text:tab/>7</text:a></text:p>
          <text:p text:style-name="P71"><text:a xlink:type="simple" xlink:href="#__RefHeading___Toc3007_2890390417" text:style-name="Index_20_Link" text:visited-style-name="Index_20_Link">1 Ülesande püstitus<text:tab/>8</text:a></text:p>
          <text:p text:style-name="P72"><text:a xlink:type="simple" xlink:href="#__RefHeading___Toc3009_2890390417" text:style-name="Index_20_Link" text:visited-style-name="Index_20_Link">1.1 Ülesande variant<text:tab/>8</text:a></text:p>
          <text:p text:style-name="P71"><text:a xlink:type="simple" xlink:href="#__RefHeading___Toc3011_2890390417" text:style-name="Index_20_Link" text:visited-style-name="Index_20_Link">Funktsiooni analüüs<text:tab/>9</text:a></text:p>
          <text:p text:style-name="P72"><text:a xlink:type="simple" xlink:href="#__RefHeading___Toc3013_2890390417" text:style-name="Index_20_Link" text:visited-style-name="Index_20_Link">Funktsiooni graafik<text:tab/>9</text:a></text:p>
          <text:p text:style-name="P71"><text:a xlink:type="simple" xlink:href="#__RefHeading___Toc3015_2890390417" text:style-name="Index_20_Link" text:visited-style-name="Index_20_Link">2 Lahenduse kirjeldus<text:tab/>11</text:a></text:p>
          <text:p text:style-name="P72"><text:a xlink:type="simple" xlink:href="#__RefHeading___Toc3017_2890390417" text:style-name="Index_20_Link" text:visited-style-name="Index_20_Link">2.1 Programmi töövoog<text:tab/>11</text:a></text:p>
          <text:p text:style-name="P72"><text:a xlink:type="simple" xlink:href="#__RefHeading___Toc3921_2890390417" text:style-name="Index_20_Link" text:visited-style-name="Index_20_Link">2.2 Funktsioonid<text:tab/>12</text:a></text:p>
          <text:p text:style-name="P73"><text:a xlink:type="simple" xlink:href="#__RefHeading___Toc3923_2890390417" text:style-name="Index_20_Link" text:visited-style-name="Index_20_Link">2.2.1 Põhiprogramm </text:a><text:a xlink:type="simple" xlink:href="#__RefHeading___Toc3923_2890390417" text:style-name="Index_20_Link" text:visited-style-name="Index_20_Link"><text:span text:style-name="T2">main()</text:span></text:a><text:a xlink:type="simple" xlink:href="#__RefHeading___Toc3923_2890390417" text:style-name="Index_20_Link" text:visited-style-name="Index_20_Link"><text:tab/>12</text:a></text:p>
          <text:p text:style-name="P73"><text:a xlink:type="simple" xlink:href="#__RefHeading___Toc3925_2890390417" text:style-name="Index_20_Link" text:visited-style-name="Index_20_Link">2.2.2 Põhiülesande põhifunktsioon </text:a><text:a xlink:type="simple" xlink:href="#__RefHeading___Toc3925_2890390417" text:style-name="Index_20_Link" text:visited-style-name="Index_20_Link"><text:span text:style-name="T2">BaseSolution</text:span></text:a><text:a xlink:type="simple" xlink:href="#__RefHeading___Toc3925_2890390417" text:style-name="Index_20_Link" text:visited-style-name="Index_20_Link"><text:tab/>13</text:a></text:p>
          <text:p text:style-name="P73"><text:a xlink:type="simple" xlink:href="#__RefHeading___Toc3927_2890390417" text:style-name="Index_20_Link" text:visited-style-name="Index_20_Link">2.2.3 Põhiülesande funktsion </text:a><text:a xlink:type="simple" xlink:href="#__RefHeading___Toc3927_2890390417" text:style-name="Index_20_Link" text:visited-style-name="Index_20_Link"><text:span text:style-name="T2">PrintGreetMessage</text:span></text:a><text:a xlink:type="simple" xlink:href="#__RefHeading___Toc3927_2890390417" text:style-name="Index_20_Link" text:visited-style-name="Index_20_Link"><text:tab/>13</text:a></text:p>
          <text:p text:style-name="P73"><text:a xlink:type="simple" xlink:href="#__RefHeading___Toc3929_2890390417" text:style-name="Index_20_Link" text:visited-style-name="Index_20_Link">2.2.4 Põhiülesande funktsioon </text:a><text:a xlink:type="simple" xlink:href="#__RefHeading___Toc3929_2890390417" text:style-name="Index_20_Link" text:visited-style-name="Index_20_Link"><text:span text:style-name="T2">GetStartInput</text:span></text:a><text:a xlink:type="simple" xlink:href="#__RefHeading___Toc3929_2890390417" text:style-name="Index_20_Link" text:visited-style-name="Index_20_Link"><text:tab/>14</text:a></text:p>
          <text:p text:style-name="P73"><text:a xlink:type="simple" xlink:href="#__RefHeading___Toc3931_2890390417" text:style-name="Index_20_Link" text:visited-style-name="Index_20_Link">2.2.5 Põhiülesande funktsioon </text:a><text:a xlink:type="simple" xlink:href="#__RefHeading___Toc3931_2890390417" text:style-name="Index_20_Link" text:visited-style-name="Index_20_Link"><text:span text:style-name="T2">GetEndInput</text:span></text:a><text:a xlink:type="simple" xlink:href="#__RefHeading___Toc3931_2890390417" text:style-name="Index_20_Link" text:visited-style-name="Index_20_Link"><text:tab/>14</text:a></text:p>
          <text:p text:style-name="P73"><text:a xlink:type="simple" xlink:href="#__RefHeading___Toc3933_2890390417" text:style-name="Index_20_Link" text:visited-style-name="Index_20_Link">2.2.6 Põhiülesande funktsioon </text:a><text:a xlink:type="simple" xlink:href="#__RefHeading___Toc3933_2890390417" text:style-name="Index_20_Link" text:visited-style-name="Index_20_Link"><text:span text:style-name="T2">GetStepInt</text:span></text:a><text:a xlink:type="simple" xlink:href="#__RefHeading___Toc3933_2890390417" text:style-name="Index_20_Link" text:visited-style-name="Index_20_Link"><text:tab/>15</text:a></text:p>
          <text:p text:style-name="P73"><text:a xlink:type="simple" xlink:href="#__RefHeading___Toc3935_2890390417" text:style-name="Index_20_Link" text:visited-style-name="Index_20_Link">2.2.7 Põhiülesande funktsioon </text:a><text:a xlink:type="simple" xlink:href="#__RefHeading___Toc3935_2890390417" text:style-name="Index_20_Link" text:visited-style-name="Index_20_Link"><text:span text:style-name="T2">ModifyStepIntoBound</text:span></text:a><text:a xlink:type="simple" xlink:href="#__RefHeading___Toc3935_2890390417" text:style-name="Index_20_Link" text:visited-style-name="Index_20_Link"><text:tab/>16</text:a></text:p>
          <text:p text:style-name="P73"><text:a xlink:type="simple" xlink:href="#__RefHeading___Toc3937_2890390417" text:style-name="Index_20_Link" text:visited-style-name="Index_20_Link">2.2.8 Põhiülesande funktsioon CalcH<text:tab/>16</text:a></text:p>
          <text:p text:style-name="P73"><text:a xlink:type="simple" xlink:href="#__RefHeading___Toc3939_2890390417" text:style-name="Index_20_Link" text:visited-style-name="Index_20_Link">2.2.9 Põhiülesande funktsioon </text:a><text:a xlink:type="simple" xlink:href="#__RefHeading___Toc3939_2890390417" text:style-name="Index_20_Link" text:visited-style-name="Index_20_Link"><text:span text:style-name="T2">GetArrayX</text:span></text:a><text:a xlink:type="simple" xlink:href="#__RefHeading___Toc3939_2890390417" text:style-name="Index_20_Link" text:visited-style-name="Index_20_Link"><text:tab/>17</text:a></text:p>
          <text:p text:style-name="P73"><text:a xlink:type="simple" xlink:href="#__RefHeading___Toc3941_2890390417" text:style-name="Index_20_Link" text:visited-style-name="Index_20_Link">2.2.10 Põhiülesande funktsioon </text:a><text:a xlink:type="simple" xlink:href="#__RefHeading___Toc3941_2890390417" text:style-name="Index_20_Link" text:visited-style-name="Index_20_Link"><text:span text:style-name="T2">GetArrayY</text:span></text:a><text:a xlink:type="simple" xlink:href="#__RefHeading___Toc3941_2890390417" text:style-name="Index_20_Link" text:visited-style-name="Index_20_Link"><text:tab/>18</text:a></text:p>
          <text:p text:style-name="P73"><text:a xlink:type="simple" xlink:href="#__RefHeading___Toc3943_2890390417" text:style-name="Index_20_Link" text:visited-style-name="Index_20_Link">2.2.11 Põhiülesande funktsioon </text:a><text:a xlink:type="simple" xlink:href="#__RefHeading___Toc3943_2890390417" text:style-name="Index_20_Link" text:visited-style-name="Index_20_Link"><text:span text:style-name="T2">PrintTable</text:span></text:a><text:a xlink:type="simple" xlink:href="#__RefHeading___Toc3943_2890390417" text:style-name="Index_20_Link" text:visited-style-name="Index_20_Link"><text:tab/>19</text:a></text:p>
          <text:p text:style-name="P72"><text:a xlink:type="simple" xlink:href="#__RefHeading___Toc3019_2890390417" text:style-name="Index_20_Link" text:visited-style-name="Index_20_Link">2.3 Algoritm<text:tab/>19</text:a></text:p>
          <text:p text:style-name="P71"><text:a xlink:type="simple" xlink:href="#__RefHeading___Toc3021_2890390417" text:style-name="Index_20_Link" text:visited-style-name="Index_20_Link">3 Lisaülesanne<text:tab/>22</text:a></text:p>
          <text:p text:style-name="P72"><text:a xlink:type="simple" xlink:href="#__RefHeading___Toc3023_2890390417" text:style-name="Index_20_Link" text:visited-style-name="Index_20_Link">3.1 Eriolukordade analüüs<text:tab/>24</text:a></text:p>
          <text:p text:style-name="P71"><text:soft-page-break/><text:a xlink:type="simple" xlink:href="#__RefHeading___Toc3025_2890390417" text:style-name="Index_20_Link" text:visited-style-name="Index_20_Link">4 Kokkuvõte<text:tab/>26</text:a></text:p>
          <text:p text:style-name="P71"><text:a xlink:type="simple" xlink:href="#__RefHeading___Toc3029_2890390417" text:style-name="Index_20_Link" text:visited-style-name="Index_20_Link">Lisa 1 – Kuvatõmmised<text:tab/>27</text:a></text:p>
        </text:index-body>
      </text:table-of-content>
      <text:p text:style-name="P7"/>
      <text:h text:style-name="P69" text:outline-level="1"><text:bookmark-start text:name="_Toc437263083"/><text:bookmark-start text:name="_Toc143525419"/><text:bookmark-start text:name="__RefHeading___Toc3003_2890390417"/><text:bookmark-start text:name="_Toc143516451"/>Jooniste loetelu<text:bookmark-end text:name="_Toc437263083"/><text:bookmark-end text:name="_Toc143525419"/><text:bookmark-end text:name="__RefHeading___Toc3003_2890390417"/><text:bookmark-end text:name="_Toc143516451"/></text:h>
      <text:illustration-index text:style-name="Sect1" text:protected="true" text:name="Table of Figures1">
        <text:illustration-index-source text:caption-sequence-name="Joonis"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74"><text:a xlink:type="simple" xlink:href="#Joonis!0%7Csequence" text:style-name="Index_20_Link" text:visited-style-name="Index_20_Link">Joonis 1: Funktsiooni graafik nullpunkti ümbruses.<text:tab/>9</text:a></text:p>
          <text:p text:style-name="P74"><text:a xlink:type="simple" xlink:href="#Joonis!1%7Csequence" text:style-name="Index_20_Link" text:visited-style-name="Index_20_Link">Joonis 2: Funktsiooni graafik positiivse argumendi x korral.<text:tab/>10</text:a></text:p>
          <text:p text:style-name="P74"><text:a xlink:type="simple" xlink:href="#Joonis!2%7Csequence" text:style-name="Index_20_Link" text:visited-style-name="Index_20_Link">Joonis 3: Funktsiooni graafik negatiivse argumendi x korral.<text:tab/>10</text:a></text:p>
          <text:p text:style-name="P74"><text:a xlink:type="simple" xlink:href="#Joonis!3%7Csequence" text:style-name="Index_20_Link" text:visited-style-name="Index_20_Link">Joonis 4: UML tegevusdiagramm baasüleande lahenduse korral.<text:tab/>20</text:a></text:p>
          <text:p text:style-name="P74"><text:a xlink:type="simple" xlink:href="#Joonis!4%7Csequence" text:style-name="Index_20_Link" text:visited-style-name="Index_20_Link">Joonis 5: UML tegevusdiagramm programmi režiimi valimisel<text:tab/>22</text:a></text:p>
          <text:p text:style-name="P74"><text:a xlink:type="simple" xlink:href="#Joonis!5%7Csequence" text:style-name="Index_20_Link" text:visited-style-name="Index_20_Link">Joonis 6: Lisasülesande põhiprogrami osa.<text:tab/>23</text:a></text:p>
          <text:p text:style-name="P74"><text:a xlink:type="simple" xlink:href="#Joonis!6%7Csequence" text:style-name="Index_20_Link" text:visited-style-name="Index_20_Link">Joonis 7: Lisaülesande abifunktsioon TestHardCodedValues.<text:tab/>23</text:a></text:p>
        </text:index-body>
      </text:illustration-index>
      <text:p text:style-name="P15"/>
      <text:h text:style-name="P70" text:outline-level="1"><text:bookmark-start text:name="_Toc437263084"/><text:bookmark-start text:name="_Toc143525420"/><text:bookmark-start text:name="__RefHeading___Toc3005_2890390417"/><text:bookmark-start text:name="_Toc143516452"/>Tabelite loetelu<text:bookmark-end text:name="_Toc437263084"/><text:bookmark-end text:name="_Toc143525420"/><text:bookmark-end text:name="__RefHeading___Toc3005_2890390417"/><text:bookmark-end text:name="_Toc143516452"/></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1"><text:a xlink:type="simple" xlink:href="#Tabel!0%7Csequence" text:style-name="Index_20_Link" text:visited-style-name="Index_20_Link">Tabel 1. Eriolukordade analüüs<text:tab/>24</text:a></text:p>
        </text:index-body>
      </text:illustration-index>
      <text:p text:style-name="P16"><text:bookmark-start text:name="_Toc437856790"/><text:bookmark-start text:name="_Toc437263085"/><text:bookmark-start text:name="_Toc371596364"/><text:bookmark-start text:name="_Ref371595904"/><text:bookmark-start text:name="_Toc370226608"/></text:p>
      <text:list xml:id="list1762093483" text:style-name="WWNum5">
        <text:list-item>
          <text:h text:style-name="P75" text:outline-level="1"><text:bookmark-start text:name="_Toc143525421"/><text:bookmark-start text:name="_Toc143516453"/><text:bookmark-start text:name="_Toc82609479"/><text:bookmark-start text:name="__RefHeading___Toc3007_2890390417"/><text:bookmark-end text:name="_Toc437856790"/><text:bookmark-end text:name="_Toc437263085"/><text:bookmark-end text:name="_Toc371596364"/><text:bookmark-end text:name="_Ref371595904"/><text:bookmark-end text:name="_Toc370226608"/>Ülesande püstitus<text:bookmark-start text:name="_Ref371498087"/><text:bookmark-start text:name="_Toc370226609"/><text:bookmark-start text:name="_Ref370278170"/><text:bookmark-end text:name="_Toc143525421"/><text:bookmark-end text:name="_Toc143516453"/><text:bookmark-end text:name="_Toc82609479"/><text:bookmark-end text:name="__RefHeading___Toc3007_2890390417"/></text:h>
        </text:list-item>
      </text:list>
      <text:p text:style-name="P39">Kodutöö 1 kätkeb funktsiooni lahendamist ning kuvada tulemused tabelisse. Ülesande lahendusega täitub tabel funktsiooni argumendi x ja y väärtused, lähtuvalt sisendandmetest. Funktsiooni analüüsimis<text:span text:style-name="T51">el</text:span> on lähtutud funktsiooni graafikust. </text:p>
      <text:p text:style-name="P40">Põhiülesande algoritm on põhjalikult kirjeldatud UML tegevusdiagrammiga [Joonis 4]. <text:s/>Töö sisaldab ka lisaülesannet, milles on lahendatud kolme komplekti eelseadistatud sisendandmeid. Lisaülesande algoritm kasutab põhiülesandes kirjeldatud UML tegevusdiagramm <text:span text:style-name="T51">[Joonis 4]</text:span>, ent rakendab ka lisaülesande käivitamis<text:span text:style-name="T51">t selgitavat algoritmi,</text:span> mis on kirjeldatud eraldiseisva UML tegevusdiagrammiga [Joonis 6]. </text:p>
      <text:p text:style-name="P88">Lühidalt, käesoleva ülesande lahenduse tulemusel leiab kasutaja võrdsete vahedega funktsiooni abstsissid ning vastavad ordinaadid, võttes arvesse kasutaja enda poolt soovitud abstsisside sammude arvu, ning arvestatades ka sisestatud argumenxi x alg- ja lõppväärtust.</text:p>
      <text:list xml:id="list223310657111885" text:continue-numbering="true" text:style-name="WWNum5">
        <text:list-item>
          <text:list>
            <text:list-item>
              <text:h text:style-name="P81" text:outline-level="2"><text:bookmark-start text:name="_Toc143516454"/><text:bookmark-start text:name="__RefHeading___Toc3009_2890390417"/><text:bookmark-start text:name="_Toc143525422"/>Ülesande variant<text:bookmark-end text:name="_Toc143516454"/><text:bookmark-end text:name="__RefHeading___Toc3009_2890390417"/><text:bookmark-end text:name="_Toc143525422"/></text:h>
            </text:list-item>
          </text:list>
        </text:list-item>
      </text:list>
      <text:p text:style-name="P13"/>
      <text:p text:style-name="P53">Kodutöö lahedamisel genereeriti variant lähtuvalt tudengi matriklinumbrit. Selle töö varandi genereerimiseks kasutati matriklinumbrit 221925.</text:p>
      <text:p text:style-name="P53"/>
      <text:p text:style-name="P53">Selle variandiga genereeri, et sisendiks on argumendi x alg- ja lõppväärtused A ja B ning sammude arv N. <text:line-break/>Kehtivad tingimused <text:span text:style-name="T11">A &lt; B;</text:span><text:tab/> <text:span text:style-name="T11">N &gt; 0</text:span>. <text:line-break/>Samm <text:span text:style-name="T11">H = (B – A) / (N – 1).</text:span> Funktsiooni väärtust y arvutatakse punktides:</text:p>
      <text:p text:style-name="P53">A</text:p>
      <text:p text:style-name="P53">A + H</text:p>
      <text:p text:style-name="P53">A + 2H</text:p>
      <text:p text:style-name="P53">...</text:p>
      <text:p text:style-name="P53">A + (N-1)H.</text:p>
      <text:p text:style-name="Text_20_body"/>
      <text:p text:style-name="P43"><text:span text:style-name="T12">Funktsioon<text:line-break/></text:span><text:span text:style-name="T10">y = </text:span>(2x+1)/sqrt((2x^2+3x+4)^3-7)</text:p>
      <text:h text:style-name="P78" text:outline-level="1"><text:bookmark-start text:name="_Toc143516455"/><text:bookmark-start text:name="_Toc143525423"/><text:bookmark-start text:name="_Toc82609480"/><text:bookmark-start text:name="__RefHeading___Toc3011_2890390417"/><text:bookmark-end text:name="_Toc370226609"/><text:bookmark-end text:name="_Ref370278170"/><text:bookmark-end text:name="_Ref371498087"/>Funktsi<text:bookmark text:name="_GoBack"/>ooni <draw:frame draw:style-name="fr6" draw:name="Object3" text:anchor-type="as-char" svg:width="0.5535in" svg:height="0.2in" draw:z-index="0"><draw:object xlink:href="./Object 3" xlink:type="simple" xlink:show="embed" xlink:actuate="onLoad"/><draw:image xlink:href="./ObjectReplacements/Object 3" xlink:type="simple" xlink:show="embed" xlink:actuate="onLoad"/></draw:frame><text:s/>analüüs<text:bookmark-end text:name="_Toc143516455"/><text:bookmark-end text:name="_Toc143525423"/><text:bookmark-end text:name="_Toc82609480"/><text:bookmark-end text:name="__RefHeading___Toc3011_2890390417"/></text:h>
      <text:p text:style-name="P41">Funktsiooni analüüs võimaldab tuvastada järgmiseid tunnuseid:</text:p>
      <text:list xml:id="list4216808645" text:style-name="L1">
        <text:list-item>
          <text:p text:style-name="P89">Funktsiooni määramispiirkond: x = <text:s/><text:span text:style-name="T50">[</text:span><text:span text:style-name="T44">-</text:span>inf; inf<text:span text:style-name="T50">]</text:span></text:p>
        </text:list-item>
        <text:list-item>
          <text:p text:style-name="P89">Funktsiooni muutumispiirkond: y = [-0.271, <text:span text:style-name="T14">0.144</text:span>]</text:p>
        </text:list-item>
        <text:list-item>
          <text:p text:style-name="P89">Funktsiooni lõikepunkt x-teljega on (-0.5, 0). <text:s/></text:p>
        </text:list-item>
        <text:list-item>
          <text:p text:style-name="P89">Funktsiooni lõikepunkt y-teljega on (0, 0.132).</text:p>
        </text:list-item>
        <text:list-item>
          <text:p text:style-name="P89">Ymin = (1.349; -0.271); Ymax = <text:s/>(0.263, 0.144);</text:p>
        </text:list-item>
      </text:list>
      <text:h text:style-name="P82" text:outline-level="2"><text:bookmark-start text:name="_Toc82609481"/><text:bookmark-start text:name="_Toc143525424"/><text:bookmark-start text:name="__RefHeading___Toc3013_2890390417"/><text:bookmark-start text:name="_Toc143516456"/>Funktsiooni <draw:frame draw:style-name="fr6" draw:name="Object4" text:anchor-type="as-char" svg:width="0.5535in" svg:height="0.2in" draw:z-index="1"><draw:object xlink:href="./Object 4" xlink:type="simple" xlink:show="embed" xlink:actuate="onLoad"/><draw:image xlink:href="./ObjectReplacements/Object 4" xlink:type="simple" xlink:show="embed" xlink:actuate="onLoad"/></draw:frame><text:s/>graafik<text:bookmark-end text:name="_Toc82609481"/><text:bookmark-end text:name="_Toc143525424"/><text:bookmark-end text:name="__RefHeading___Toc3013_2890390417"/><text:bookmark-end text:name="_Toc143516456"/></text:h>
      <text:p text:style-name="P90">Funktsiooni graafik on ainulaadne, ning selget erineb tavapärastest ruutvõrranditest. Funktsiooni nimetaja ja lugeja koosmõjul moodustub funktsioon. <text:s/></text:p>
      <text:p text:style-name="P63"><draw:frame draw:style-name="fr1" draw:name="Frame1" text:anchor-type="char" svg:width="5.9055in" draw:z-index="2"><draw:text-box fo:min-height="2.6689in"><text:p text:style-name="Joonis"><draw:frame draw:style-name="fr4" draw:name="Image1" text:anchor-type="paragraph" svg:width="5.9055in" style:rel-width="100%" svg:height="2.6689in" style:rel-height="scale" draw:z-index="3"><draw:image xlink:href="Pictures/100000010000030D0000016155279C15115D799B.png" xlink:type="simple" xlink:show="embed" xlink:actuate="onLoad" draw:mime-type="image/png"/></draw:frame>Joonis <text:sequence text:ref-name="refJoonis0" text:name="Joonis" text:formula="ooow:Joonis+1" style:num-format="1">1</text:sequence>: Funktsiooni graafik nullpunkti ümbruses.</text:p></draw:text-box></draw:frame></text:p>
      <text:p text:style-name="Standard"/>
      <text:p text:style-name="P28"><text:soft-page-break/><text:span text:style-name="T50">Funktsiooni</text:span><text:span text:style-name="T47"> x-tel</text:span><text:span text:style-name="T50">j</text:span><text:span text:style-name="T47">e</text:span><text:span text:style-name="T50">st paremale poole</text:span><text:span text:style-name="T47"> on näha, et mida suurem on </text:span><text:span text:style-name="T50">abstsiss (</text:span><text:span text:style-name="T47">x</text:span><text:span text:style-name="T50">)</text:span><text:span text:style-name="T47">, seda lähedamal on ordinaadi </text:span><text:span text:style-name="T50">(y) </text:span><text:span text:style-name="T47">väärtus arvule 0. See on nähtav alltoodud funktsiooni graafiku osast:</text:span></text:p>
      <text:p text:style-name="P28"><draw:frame draw:style-name="fr1" draw:name="Frame3" text:anchor-type="char" svg:width="5.9055in" draw:z-index="17"><draw:text-box fo:min-height="2.6689in"><text:p text:style-name="Joonis"><draw:frame draw:style-name="fr4" draw:name="Image3" text:anchor-type="paragraph" svg:width="5.9055in" style:rel-width="100%" svg:height="2.6689in" style:rel-height="scale" draw:z-index="18"><draw:image xlink:href="Pictures/100000010000030D000001616AFE23EB44C391BB.png" xlink:type="simple" xlink:show="embed" xlink:actuate="onLoad" draw:mime-type="image/png"/></draw:frame>Joonis <text:sequence text:ref-name="refJoonis1" text:name="Joonis" text:formula="ooow:Joonis+1" style:num-format="1">2</text:sequence>: Funktsiooni graafik positiivse argumendi x korral.</text:p></draw:text-box></draw:frame>Jällegi, toimub <text:span text:style-name="T47">sarnane muster</text:span> x-teljest vasakul pool – <text:span text:style-name="T47">mida väiksem on </text:span><text:span text:style-name="T50">abstsiss (</text:span><text:span text:style-name="T47">x</text:span><text:span text:style-name="T50">)</text:span><text:span text:style-name="T47">, seda lähedamal on ordinaadi </text:span><text:span text:style-name="T50">(y) </text:span><text:span text:style-name="T47">väärtus arvule 0. </text:span></text:p>
      <text:p text:style-name="P41"><draw:frame draw:style-name="fr1" draw:name="Frame2" text:anchor-type="char" svg:width="5.9055in" draw:z-index="4"><draw:text-box fo:min-height="2.6689in"><text:p text:style-name="Joonis"><draw:frame draw:style-name="fr4" draw:name="Image2" text:anchor-type="paragraph" svg:width="5.9055in" style:rel-width="100%" svg:height="2.6689in" style:rel-height="scale" draw:z-index="5"><draw:image xlink:href="Pictures/100000010000030D00000161C4C65C9B26ED6EC4.png" xlink:type="simple" xlink:show="embed" xlink:actuate="onLoad" draw:mime-type="image/png"/></draw:frame>Joonis <text:sequence text:ref-name="refJoonis2" text:name="Joonis" text:formula="ooow:Joonis+1" style:num-format="1">3</text:sequence>: Funktsiooni graafik negatiivse argumendi x korral.</text:p></draw:text-box></draw:frame>Funktsiooni graafiku joonised 1-3 <text:span text:style-name="T51">on näha</text:span> funktsiooni määramis- ja muutumispiirkonda, <text:span text:style-name="T48">lõikepunkte x- ja y-telgedega ning absoluute (Ymin ja Ymax).</text:span></text:p>
      <text:list xml:id="list223308864068656" text:continue-list="list223310657111885" text:style-name="WWNum5">
        <text:list-item>
          <text:h text:style-name="P76" text:outline-level="1"><text:bookmark-start text:name="_Toc82609482"/><text:bookmark-start text:name="_Toc143525425"/><text:bookmark-start text:name="__RefHeading___Toc3015_2890390417"/><text:bookmark-start text:name="_Toc143516457"/>Lahenduse kirjeldus<text:bookmark-end text:name="_Toc82609482"/><text:bookmark-end text:name="_Toc143525425"/><text:bookmark-end text:name="__RefHeading___Toc3015_2890390417"/><text:bookmark-end text:name="_Toc143516457"/></text:h>
        </text:list-item>
      </text:list>
      <text:p text:style-name="P38">Programmi eesmärk on leida funktsiooni abstsisse ning ordinaate, <text:span text:style-name="T46">küsides kasutajalt mitut tulemust soovib ta näha, mida käsitletakse ülesandes niinimetatud sammude arvuna. Programm küsib ka esimest abstissi ja viimast abstsissi, ning mis kõige olulisem, programm arvutab nende kolme sisendi põhjal sammi pikkuse. Sammu pikkus on teisisõnu kui mitu punkti tuleb liikuda järgmise abstsissi leidmiseks. Leitud abstissi põhjal leitakse funktsiooni ordinaat. Programm sooritab neid arvutustehti võrdselt sammude arvuga ning kuvab leitud vastuse kasutajale käsureal.</text:span></text:p>
      <text:p text:style-name="P62"><text:span text:style-name="T23">Programm ootab kolme sisendit: </text:span><text:span text:style-name="T24">funktsiooni argumendi x alg- ja lõppväärtust</text:span><text:span text:style-name="T23">, ning sammude arvu nende vahel. Viimane neist on täisarv, ning ülejäänud aga andmetüüp nimega double. Programm väljastab oodatavad tulemused komakohti lubava andmetüübiga double. Programm prindib <text:s/></text:span><text:span text:style-name="T21">ka vastavalt vajadusele </text:span><text:span text:style-name="T23">konsooli veatea</text:span><text:span text:style-name="T21">teid</text:span><text:span text:style-name="T23">, mis on andmetüübilt massiivid üksikutest tähtedest (ing. k.</text:span><text:span text:style-name="T5"> character array)</text:span><text:span text:style-name="T23">. </text:span><text:span text:style-name="T5"><text:s/></text:span><text:span text:style-name="T21">Programm toimib </text:span><text:span text:style-name="T24">abi</text:span><text:span text:style-name="T21">funktsioonide väljakutsete toel.</text:span></text:p>
      <text:list xml:id="list223309516917090" text:continue-numbering="true" text:style-name="WWNum5">
        <text:list-item>
          <text:list>
            <text:list-item>
              <text:h text:style-name="P81" text:outline-level="2"><text:bookmark-start text:name="__RefHeading___Toc3017_2890390417"/><text:bookmark-start text:name="_Toc143525426"/>Programmi töövoog<text:bookmark-end text:name="__RefHeading___Toc3017_2890390417"/><text:bookmark-end text:name="_Toc143525426"/></text:h>
            </text:list-item>
          </text:list>
        </text:list-item>
      </text:list>
      <text:p text:style-name="P57">1. <text:s/>Programm informeerib kasutajat programmi eesmärgist ning kuvab <text:span text:style-name="T54">võrrandit.</text:span></text:p>
      <text:p text:style-name="P57">2. Programm küsib kasutajalt sisendandmeid kuniks sobituvad ülesande tingimustega.</text:p>
      <text:p text:style-name="P57">3. Programm arvutab lähtuvalt sisendandmetest sammu pikkuse tähisega H.</text:p>
      <text:p text:style-name="P57">4. Programm arvutab funktsiooni abstsissi <text:span text:style-name="T45">(x)</text:span> lähtuvalt sisendandmetest ja sammu pikkusest (H), ning talletab leitu abstsisside massiivi.</text:p>
      <text:p text:style-name="P57">5. Programm arvutab funktsiooni ordinaadi y lähtuvalt sisendandmetest ja <text:span text:style-name="T45">abstsissist (x)</text:span>, ning talletab leitud ordinaadite massiivi.</text:p>
      <text:p text:style-name="P58">6. Programm kuvab funktsiooni abstsissid <text:span text:style-name="T45">(x-d) </text:span>ja ordinaadid <text:span text:style-name="T45">(y-d)</text:span> <text:span text:style-name="T45">ning struktureerib </text:span>tabel<text:span text:style-name="T45">isse.</text:span></text:p>
      <text:p text:style-name="Text_20_body"><text:soft-page-break/></text:p>
      <text:list xml:id="list223309068912458" text:continue-numbering="true" text:style-name="WWNum5">
        <text:list-item>
          <text:list>
            <text:list-item>
              <text:h text:style-name="P83" text:outline-level="2"><text:bookmark-start text:name="__RefHeading___Toc3921_2890390417"/>Funktsioonid<text:bookmark-end text:name="__RefHeading___Toc3921_2890390417"/></text:h>
              <text:list>
                <text:list-item>
                  <text:h text:style-name="P84" text:outline-level="3"><text:bookmark-start text:name="__RefHeading___Toc3923_2890390417"/>Põhiprogramm <text:span text:style-name="T2">main()</text:span><text:bookmark-end text:name="__RefHeading___Toc3923_2890390417"/></text:h>
                </text:list-item>
              </text:list>
            </text:list-item>
          </text:list>
        </text:list-item>
      </text:list>
      <text:p text:style-name="P29">Ülesande põhifunktsioon main() võtab sisendiks järgmised argumendid:</text:p>
      <text:list xml:id="list778755565" text:style-name="L2">
        <text:list-item>
          <text:p text:style-name="P91">käsurea argumendite arvu, mis on täisarvu andmetüübiga (ing. k. <text:span text:style-name="T2">integer)</text:span></text:p>
        </text:list-item>
        <text:list-item>
          <text:p text:style-name="P91">käsurea argumendi väärtused, mis on tähestiku sümbolitest koosnev massiiv (ing. k. Character array)</text:p>
        </text:list-item>
      </text:list>
      <text:p text:style-name="P29"><draw:frame draw:style-name="fr1" draw:name="Frame14" text:anchor-type="char" svg:width="5.9055in" draw:z-index="29"><draw:text-box fo:min-height="5.1161in"><text:p text:style-name="Lisa"><draw:frame draw:style-name="fr4" draw:name="Image14" text:anchor-type="paragraph" svg:width="5.9055in" style:rel-width="100%" svg:height="5.1161in" style:rel-height="scale" draw:z-index="30"><draw:image xlink:href="Pictures/1000000100000373000002FDF825FCCE7C23B5F5.png" xlink:type="simple" xlink:show="embed" xlink:actuate="onLoad" draw:mime-type="image/png"/></draw:frame>Lisa <text:sequence text:ref-name="refLisa0" text:name="Lisa" text:formula="ooow:Lisa+1" style:num-format="1">1</text:sequence>: Funktsioon main()</text:p></draw:text-box></draw:frame>Funktsioon main() võimaldab kasutajal valida, kas lahendab <text:span text:style-name="T53">põhi- või lisaülesannet. </text:span></text:p>
      <text:list xml:id="list223309734980311" text:continue-list="list223309068912458" text:style-name="WWNum5">
        <text:list-item>
          <text:list>
            <text:list-item>
              <text:list>
                <text:list-item>
                  <text:h text:style-name="Heading_20_3" text:outline-level="3"><text:bookmark-start text:name="__RefHeading___Toc3925_2890390417"/><text:soft-page-break/>Põhiülesande põhifunktsioon <text:span text:style-name="T2">BaseSolution</text:span><text:bookmark-end text:name="__RefHeading___Toc3925_2890390417"/></text:h>
                </text:list-item>
              </text:list>
            </text:list-item>
          </text:list>
        </text:list-item>
      </text:list>
      <text:p text:style-name="P32">Funktsioon lahendab põhiülesande, initsialiseerides muutujad ja kasutades neid abistavates funktsioonides. Funktsioonil pole argumente ega tagasta väärtust. </text:p>
      <text:list xml:id="list223308798139968" text:continue-numbering="true" text:style-name="WWNum5">
        <text:list-item>
          <text:list>
            <text:list-item>
              <text:list>
                <text:list-item>
                  <text:h text:style-name="P85" text:outline-level="3"><draw:frame draw:style-name="fr2" draw:name="Frame15" text:anchor-type="paragraph" svg:width="5.9055in" style:rel-width="100%" svg:height="5.2362in" style:rel-height="scale-min" draw:z-index="31"><draw:text-box><text:p text:style-name="Lisa"><draw:frame draw:style-name="fr4" draw:name="Image15" text:anchor-type="paragraph" svg:width="5.9055in" style:rel-width="100%" svg:height="5.2362in" style:rel-height="scale" draw:z-index="32"><draw:image xlink:href="Pictures/1000000100000361000002FFE99A7112D9E76806.png" xlink:type="simple" xlink:show="embed" xlink:actuate="onLoad" draw:mime-type="image/png"/></draw:frame>Lisa <text:sequence text:ref-name="refLisa1" text:name="Lisa" text:formula="ooow:Lisa+1" style:num-format="1">2</text:sequence>: Funktsioon BaseSolution()</text:p></draw:text-box></draw:frame><text:bookmark-start text:name="__RefHeading___Toc3927_2890390417"/>Põhiülesande funktsion <text:span text:style-name="T2">PrintGreetMessage</text:span><text:bookmark-end text:name="__RefHeading___Toc3927_2890390417"/></text:h>
                </text:list-item>
              </text:list>
            </text:list-item>
          </text:list>
        </text:list-item>
      </text:list>
      <text:p text:style-name="P31">Funktsioon PrintGreetMessage() ainus ülesanne on tervitada kasutajat programmi käivitamisel. Funktsioon ei tagasta, vaid prindib konsooli. Funktsioonil ei ole ka parameetreid.</text:p>
      <text:p text:style-name="P92"><draw:frame draw:style-name="fr1" draw:name="Frame16" text:anchor-type="char" svg:width="5.9055in" draw:z-index="33"><draw:text-box fo:min-height="1.4957in"><text:p text:style-name="Lisa"><draw:frame draw:style-name="fr4" draw:name="Image16" text:anchor-type="paragraph" svg:width="5.9055in" style:rel-width="100%" svg:height="1.4957in" style:rel-height="scale" draw:z-index="34"><draw:image xlink:href="Pictures/10000001000002F2000000BF99898127ECCC4C58.png" xlink:type="simple" xlink:show="embed" xlink:actuate="onLoad" draw:mime-type="image/png"/></draw:frame>Lisa <text:sequence text:ref-name="refLisa2" text:name="Lisa" text:formula="ooow:Lisa+1" style:num-format="1">3</text:sequence>: Funktsioon PrintGreetMessage()</text:p></draw:text-box></draw:frame><text:soft-page-break/></text:p>
      <text:list xml:id="list223309669768189" text:continue-numbering="true" text:style-name="WWNum5">
        <text:list-item>
          <text:list>
            <text:list-item>
              <text:list>
                <text:list-item>
                  <text:h text:style-name="Heading_20_3" text:outline-level="3"><text:bookmark-start text:name="__RefHeading___Toc3929_2890390417"/>Põhiülesande funktsioon <text:span text:style-name="T2">GetStartInput</text:span><text:bookmark-end text:name="__RefHeading___Toc3929_2890390417"/></text:h>
                </text:list-item>
              </text:list>
            </text:list-item>
          </text:list>
        </text:list-item>
      </text:list>
      <text:p text:style-name="P34">Funktsioon <text:span text:style-name="T2">GetStartInput </text:span>küsib kasutajalt argumendi x algväärtust, ning tagastab selle initisialiseeritud <text:span text:style-name="T7">double </text:span><text:span text:style-name="T55">andmetüübina</text:span>.<draw:frame draw:style-name="fr1" draw:name="Frame19" text:anchor-type="char" svg:width="5.9055in" draw:z-index="35"><draw:text-box fo:min-height="1.9917in"><text:p text:style-name="Lisa"><draw:frame draw:style-name="fr4" draw:name="Image19" text:anchor-type="paragraph" svg:width="5.9055in" style:rel-width="100%" svg:height="1.9917in" style:rel-height="scale" draw:z-index="36"><draw:image xlink:href="Pictures/10000001000002A4000000E4B88ABAE097B1D165.png" xlink:type="simple" xlink:show="embed" xlink:actuate="onLoad" draw:mime-type="image/png"/></draw:frame>Lisa <text:sequence text:ref-name="refLisa3" text:name="Lisa" text:formula="ooow:Lisa+1" style:num-format="1">4</text:sequence>: Funktsioon GetStartInput</text:p></draw:text-box></draw:frame></text:p>
      <text:list xml:id="list223310328834009" text:continue-numbering="true" text:style-name="WWNum5">
        <text:list-item>
          <text:list>
            <text:list-item>
              <text:list>
                <text:list-item>
                  <text:h text:style-name="Heading_20_3" text:outline-level="3"><text:bookmark-start text:name="__RefHeading___Toc3931_2890390417"/>Põhiülesande funktsioon <text:span text:style-name="T2">GetEndInput</text:span><text:bookmark-end text:name="__RefHeading___Toc3931_2890390417"/></text:h>
                </text:list-item>
              </text:list>
            </text:list-item>
          </text:list>
        </text:list-item>
      </text:list>
      <text:p text:style-name="P34">Funktsioon <text:span text:style-name="T2">GetEndInput </text:span>küsib kasutajalt funktsiooni argumendi x lõppväärtust senikaua, kui kasutaja sisestab väärtuse, mis on suurem kui funktsiooni <text:span text:style-name="T2">GetStartInput </text:span>tagastatav väärtus [Lisa 4]. Funktsioon tagastab väärtuse <text:span text:style-name="T2">double </text:span>andmetüübina.</text:p>
      <text:p text:style-name="P33"><draw:frame draw:style-name="fr1" draw:name="Frame20" text:anchor-type="char" svg:width="5.9055in" draw:z-index="37"><draw:text-box fo:min-height="2.8252in"><text:p text:style-name="Lisa"><draw:frame draw:style-name="fr4" draw:name="Image20" text:anchor-type="paragraph" svg:width="5.9055in" style:rel-width="100%" svg:height="2.8252in" style:rel-height="scale" draw:z-index="38"><draw:image xlink:href="Pictures/1000000100000370000001A5114B31F1A3179A3A.png" xlink:type="simple" xlink:show="embed" xlink:actuate="onLoad" draw:mime-type="image/png"/></draw:frame>Lisa <text:sequence text:ref-name="refLisa4" text:name="Lisa" text:formula="ooow:Lisa+1" style:num-format="1">5</text:sequence>: Funktsioon GetEndInput</text:p></draw:text-box></draw:frame><text:soft-page-break/></text:p>
      <text:list xml:id="list223309635106665" text:continue-numbering="true" text:style-name="WWNum5">
        <text:list-item>
          <text:list>
            <text:list-item>
              <text:list>
                <text:list-item>
                  <text:h text:style-name="Heading_20_3" text:outline-level="3"><text:bookmark-start text:name="__RefHeading___Toc3933_2890390417"/>Põhiülesande funktsioon <text:span text:style-name="T2">GetStepInt</text:span><text:bookmark-end text:name="__RefHeading___Toc3933_2890390417"/></text:h>
                </text:list-item>
              </text:list>
            </text:list-item>
          </text:list>
        </text:list-item>
      </text:list>
      <text:p text:style-name="P34">Funktsioon<text:span text:style-name="T2"> GetStepInt </text:span>küsib kasutajalt sammude arvu senikaua, kui see on suurem kui 1. Funktsioon tagastab väärtuse täisarvuna (ing. k. <text:span text:style-name="T2">integer</text:span>)<text:span text:style-name="T2"> </text:span>andmetüübina. </text:p>
      <text:p text:style-name="P34"><draw:frame draw:style-name="fr5" draw:name="Image21" text:anchor-type="char" svg:width="5.9055in" svg:height="3.8161in" draw:z-index="39"><draw:image xlink:href="Pictures/100000010000036F00000238EF7FF7A033724CE2.png" xlink:type="simple" xlink:show="embed" xlink:actuate="onLoad" draw:mime-type="image/png"/></draw:frame></text:p>
      <text:list xml:id="list223310176841489" text:continue-numbering="true" text:style-name="WWNum5">
        <text:list-item>
          <text:list>
            <text:list-item>
              <text:list>
                <text:list-item>
                  <text:h text:style-name="Heading_20_3" text:outline-level="3"><text:bookmark-start text:name="__RefHeading___Toc3935_2890390417"/><text:soft-page-break/>Põhiülesande funktsioon <text:span text:style-name="T2">ModifyStepIntoBound</text:span><text:bookmark-end text:name="__RefHeading___Toc3935_2890390417"/></text:h>
                </text:list-item>
              </text:list>
            </text:list-item>
          </text:list>
        </text:list-item>
      </text:list>
      <text:p text:style-name="P35">Funktsioon <text:span text:style-name="T2">ModifyStepIntoBound</text:span> kirjutab kasutaja sisestatud sammude arvu üle uue väärtusega, mis on võrdne maksimaalselt lubatud sammude arvuga, juhul kui kasutaja on sisestatud sammude arvuks rohkem kui seda on lubatud. Funktsioon tagastab täisarvu (ing. k. <text:span text:style-name="T2">integer</text:span>).</text:p>
      <text:p text:style-name="P95"><draw:frame draw:style-name="fr1" draw:name="Frame21" text:anchor-type="char" svg:width="5.9055in" draw:z-index="40"><draw:text-box fo:min-height="1.5244in"><text:p text:style-name="Lisa"><draw:frame draw:style-name="fr4" draw:name="Image22" text:anchor-type="paragraph" svg:width="5.9055in" style:rel-width="100%" svg:height="1.5244in" style:rel-height="scale" draw:z-index="41"><draw:image xlink:href="Pictures/1000000100000339000000D53D3466644A2A171F.png" xlink:type="simple" xlink:show="embed" xlink:actuate="onLoad" draw:mime-type="image/png"/></draw:frame>Lisa <text:sequence text:ref-name="refLisa5" text:name="Lisa" text:formula="ooow:Lisa+1" style:num-format="1">6</text:sequence>: Funktsioon ModifyStepIntoBound</text:p></draw:text-box></draw:frame></text:p>
      <text:list xml:id="list223308914849907" text:continue-numbering="true" text:style-name="WWNum5">
        <text:list-item>
          <text:list>
            <text:list-item>
              <text:list>
                <text:list-item>
                  <text:h text:style-name="Heading_20_3" text:outline-level="3"><text:bookmark-start text:name="__RefHeading___Toc3937_2890390417"/>Põhiülesande funktsioon CalcH<text:bookmark-end text:name="__RefHeading___Toc3937_2890390417"/></text:h>
                </text:list-item>
              </text:list>
            </text:list-item>
          </text:list>
        </text:list-item>
      </text:list>
      <text:p text:style-name="P35">Funktsioon <text:span text:style-name="T2">CalcH </text:span>võtab argumentideks algväärtuse, lõppväärtuse ja sammude arvu, ning tagastab ühe sammu pikkuse <text:span text:style-name="T2">double </text:span>andmetüübina.</text:p>
      <text:p text:style-name="P35"><draw:frame draw:style-name="fr1" draw:name="Frame22" text:anchor-type="char" svg:width="5.9055in" draw:z-index="42"><draw:text-box fo:min-height="1.9807in"><text:p text:style-name="Lisa"><draw:frame draw:style-name="fr4" draw:name="Image23" text:anchor-type="paragraph" svg:width="5.9055in" style:rel-width="100%" svg:height="1.9807in" style:rel-height="scale" draw:z-index="43"><draw:image xlink:href="Pictures/100000010000030A00000105730D50A8D1591FC9.png" xlink:type="simple" xlink:show="embed" xlink:actuate="onLoad" draw:mime-type="image/png"/></draw:frame>Lisa <text:sequence text:ref-name="refLisa6" text:name="Lisa" text:formula="ooow:Lisa+1" style:num-format="1">7</text:sequence>: Funktsioon CalcH</text:p></draw:text-box></draw:frame></text:p>
      <text:h text:style-name="P86" text:outline-level="3"><text:soft-page-break/></text:h>
      <text:list xml:id="list223309160534792" text:continue-numbering="true" text:style-name="WWNum5">
        <text:list-item>
          <text:list>
            <text:list-item>
              <text:list>
                <text:list-item>
                  <text:h text:style-name="Heading_20_3" text:outline-level="3"><text:bookmark-start text:name="__RefHeading___Toc3939_2890390417"/>Põhiülesande funktsioon <text:span text:style-name="T2">GetArrayX</text:span><text:bookmark-end text:name="__RefHeading___Toc3939_2890390417"/></text:h>
                </text:list-item>
              </text:list>
            </text:list-item>
          </text:list>
        </text:list-item>
      </text:list>
      <text:p text:style-name="P36">Funktsioon <text:span text:style-name="T2">GetArrayX </text:span>võtab argumendiks argumendi x alg- ja lõppväärtuse, sammu pikkuse (H), ning initsialiseeritud massiivi leitavate funktsiooni x argumentide hoiustamiseks. <text:span text:style-name="T56">Funktsioon leiab abstsissid ja lisab need massiivi. </text:span>Funktsioon tagastab arvu abstsisse, mis hoiustatakse massiivis, teisisõnu massiivi pikkuse.</text:p>
      <text:p text:style-name="P35"><draw:frame draw:style-name="fr1" draw:name="Frame23" text:anchor-type="char" svg:width="5.9055in" draw:z-index="44"><draw:text-box fo:min-height="2.1425in"><text:p text:style-name="Lisa"><draw:frame draw:style-name="fr4" draw:name="Image24" text:anchor-type="paragraph" svg:width="5.9055in" style:rel-width="100%" svg:height="2.1425in" style:rel-height="scale" draw:z-index="45"><draw:image xlink:href="Pictures/10000001000002BC000000FE3111D695D577D2CE.png" xlink:type="simple" xlink:show="embed" xlink:actuate="onLoad" draw:mime-type="image/png"/></draw:frame>Lisa <text:sequence text:ref-name="refLisa7" text:name="Lisa" text:formula="ooow:Lisa+1" style:num-format="1">8</text:sequence>: Funktsioon GetArrayX</text:p></draw:text-box></draw:frame></text:p>
      <text:h text:style-name="P86" text:outline-level="3"/>
      <text:list xml:id="list223309936082713" text:continue-numbering="true" text:style-name="WWNum5">
        <text:list-item>
          <text:list>
            <text:list-item>
              <text:list>
                <text:list-item>
                  <text:h text:style-name="P87" text:outline-level="3"><text:bookmark-start text:name="__RefHeading___Toc3941_2890390417"/>Põhiülesande funktsioon <text:span text:style-name="T2">GetArrayY</text:span><text:bookmark-end text:name="__RefHeading___Toc3941_2890390417"/></text:h>
                </text:list-item>
              </text:list>
            </text:list-item>
          </text:list>
        </text:list-item>
      </text:list>
      <text:p text:style-name="P35">Funktsioon <text:span text:style-name="T2">GetArrayX </text:span>võtab argumendik<text:span text:style-name="T56">s massiivi abstsissidest ja selle massiivi pikkuse</text:span>, ning initsialiseeritud massiivi leitavate funktsiooni y argumentide hoiustamiseks. <text:span text:style-name="T56">Funktsioon leiab ordinaadid ja lisab ordinaatide massiivi. </text:span>Funktsioon tagastab arvu ordinaate, mis hoiustatakse massiivis, teisisõnu massiivi pikkuse.</text:p>
      <text:p text:style-name="P35"><draw:frame draw:style-name="fr1" draw:name="Frame24" text:anchor-type="char" svg:width="5.9055in" draw:z-index="46"><draw:text-box fo:min-height="3.5917in"><text:p text:style-name="Lisa"><draw:frame draw:style-name="fr4" draw:name="Image25" text:anchor-type="paragraph" svg:width="5.9055in" style:rel-width="100%" svg:height="3.5917in" style:rel-height="scale" draw:z-index="47"><draw:image xlink:href="Pictures/1000000100000324000001E936B47CF7245B28D0.png" xlink:type="simple" xlink:show="embed" xlink:actuate="onLoad" draw:mime-type="image/png"/></draw:frame>Lisa <text:sequence text:ref-name="refLisa8" text:name="Lisa" text:formula="ooow:Lisa+1" style:num-format="1">9</text:sequence>: Funktsioon GetArrayY</text:p></draw:text-box></draw:frame></text:p>
      <text:h text:style-name="P86" text:outline-level="3"><text:soft-page-break/></text:h>
      <text:h text:style-name="P86" text:outline-level="3"/>
      <text:list xml:id="list223310214385912" text:continue-numbering="true" text:style-name="WWNum5">
        <text:list-item>
          <text:list>
            <text:list-item>
              <text:list>
                <text:list-item>
                  <text:h text:style-name="Heading_20_3" text:outline-level="3"><text:bookmark-start text:name="__RefHeading___Toc3943_2890390417"/>Põhiülesande funktsioon <text:span text:style-name="T2">PrintTable</text:span><text:bookmark-end text:name="__RefHeading___Toc3943_2890390417"/></text:h>
                </text:list-item>
              </text:list>
            </text:list-item>
          </text:list>
        </text:list-item>
      </text:list>
      <text:p text:style-name="P37">Funktsioon <text:span text:style-name="T2">PrintTable </text:span>võtab argumentidega massiivi abstsissidest, massiivi ordinaatidest ja sama ordinaatide massiivi pikkuse, ning sammude arvu. Funktsioon väljastab struktureeritud tabeli lahendustega, ning vajadusel väljastab kasutajale teate, et <text:s/>tema sisestatud liiga suur sammude arv vähendati enim lubatud sammude arvuni. <draw:frame draw:style-name="fr1" draw:name="Frame25" text:anchor-type="char" svg:width="5.9055in" draw:z-index="48"><draw:text-box fo:min-height="3.9008in"><text:p text:style-name="Lisa"><draw:frame draw:style-name="fr4" draw:name="Image26" text:anchor-type="paragraph" svg:width="5.9055in" style:rel-width="100%" svg:height="3.9008in" style:rel-height="scale" draw:z-index="49"><draw:image xlink:href="Pictures/1000000100000371000002465C197E5907C3A943.png" xlink:type="simple" xlink:show="embed" xlink:actuate="onLoad" draw:mime-type="image/png"/></draw:frame>Lisa <text:sequence text:ref-name="refLisa9" text:name="Lisa" text:formula="ooow:Lisa+1" style:num-format="1">10</text:sequence>: Funktsioon PrintTable</text:p></draw:text-box></draw:frame></text:p>
      <text:list xml:id="list223309883556725" text:continue-numbering="true" text:style-name="WWNum5">
        <text:list-item>
          <text:list>
            <text:list-item>
              <text:h text:style-name="P81" text:outline-level="2"><text:bookmark-start text:name="_Toc82609483"/><text:bookmark-start text:name="_Toc143525427"/><text:bookmark-start text:name="__RefHeading___Toc3019_2890390417"/><text:bookmark-start text:name="_Toc143516458"/>Algoritm<text:bookmark-end text:name="_Toc82609483"/><text:bookmark-end text:name="_Toc143525427"/><text:bookmark-end text:name="__RefHeading___Toc3019_2890390417"/><text:bookmark-end text:name="_Toc143516458"/></text:h>
            </text:list-item>
          </text:list>
        </text:list-item>
      </text:list>
      <text:p text:style-name="P54">Ülesande lahendamiseks võeti kasutusele preprotessoreid, muutujaid, funktsioon<text:span text:style-name="T31">e</text:span> ning <text:span text:style-name="T31">t</text:span>ingimuslauseid ja <text:span text:style-name="T31">mitmeid </text:span>tsükkleid <text:span text:style-name="T31">[Joonis 4]. Algoritmiks on UML tegevusdiagramm, mis on jaotatud neljaks niinimetatud vertikaalseks basseiniks [Joonis 4]. Selle meetodiga on esitatud UML tegevusdiagrammis segmenteeritud muutujate defineerimine tsüklitest ja tingimuslausetest. </text:span><text:span text:style-name="T32">Koodis maagiliste arvu likvideerimiseks on toodud sisse hulga konstante ning defineeritud preprotsessoritena, mis on nähtavad ka joonisel vasakpoolseimast vertikaalsest basseinist [Joonis 4]. <text:s/>Koodi saab korrata </text:span><text:soft-page-break/><text:span text:style-name="T32">senikaua kui kasutaja sisestab arvu 0, vastasel juhul </text:span><text:span text:style-name="T33">kordab kood oma </text:span><text:span text:style-name="T43">põhiülesande </text:span><text:span text:style-name="T33">töövoogu [Joonis </text:span><text:span text:style-name="T36">4</text:span><text:span text:style-name="T33">]. </text:span></text:p>
      <text:p text:style-name="P56"><draw:frame draw:style-name="fr3" draw:name="Frame5" text:anchor-type="char" svg:width="5.9055in" draw:z-index="8"><draw:text-box fo:min-height="3.7457in"><text:p text:style-name="Joonis"><draw:frame draw:style-name="fr4" draw:name="Image5" text:anchor-type="paragraph" svg:width="5.9055in" style:rel-width="100%" svg:height="3.7457in" style:rel-height="scale" draw:z-index="9"><draw:image xlink:href="Pictures/10000000000007DD000004FDDAA623EE31635321.png" xlink:type="simple" xlink:show="embed" xlink:actuate="onLoad" draw:mime-type="image/png"/></draw:frame>Joonis <text:sequence text:ref-name="refJoonis3" text:name="Joonis" text:formula="ooow:Joonis+1" style:num-format="1">4</text:sequence>: UML tegevusdiagramm baasüleande lahenduse korral.</text:p></draw:text-box></draw:frame>Põhiülesande koodi lahendamine nõuab kasutajalt sisendandmete küsimist, ning neist lähtuvalt sammu pikkuse (H) ja funktsiooni abst<text:span text:style-name="T44">s</text:span>isside ja ordinanatide arvutamist <text:span text:style-name="T52">[Joonis 4]</text:span>.</text:p>
      <text:p text:style-name="P55"><draw:frame draw:style-name="fr1" draw:name="Frame8" text:anchor-type="char" svg:width="5.9055in" draw:z-index="14"><draw:text-box fo:min-height="5.2362in"><text:p text:style-name="Joonis"><draw:frame draw:style-name="fr2" draw:name="Frame17" text:anchor-type="paragraph" svg:width="5.9055in" style:rel-width="100%" svg:height="5.2362in" style:rel-height="scale-min" draw:z-index="15"><draw:text-box><text:p text:style-name="Lisa"><draw:frame draw:style-name="fr4" draw:name="Image8" text:anchor-type="paragraph" svg:width="5.9055in" style:rel-width="100%" svg:height="5.2362in" style:rel-height="scale" draw:z-index="16"><draw:image xlink:href="Pictures/1000000100000361000002FFE99A7112D9E76806.png" xlink:type="simple" xlink:show="embed" xlink:actuate="onLoad" draw:mime-type="image/png"/></draw:frame>Lisa <text:sequence text:ref-name="refLisa10" text:name="Lisa" text:formula="ooow:Lisa+1" style:num-format="1">11</text:sequence>: Ülesande lahendus abifunktsiooni väljakutsetega</text:p></draw:text-box></draw:frame></text:p></draw:text-box></draw:frame><text:soft-page-break/><text:s/>Ülaltoodud osa koodist lahendab põhiülesan<text:span text:style-name="T44">d</text:span>e, kutsudes välja abifunktsioone, mis on leitavad detailsemalt kodutöö koodifailist. <text:span text:style-name="T44">Lisaülesanne lahendamiseks loodi funktsioone ning eeldefineeritud sisendandmed, mida kirjeldab järgmises peatükis.</text:span></text:p>
      <text:h text:style-name="P80" text:outline-level="1"/>
      <text:list xml:id="list223308962715209" text:continue-numbering="true" text:style-name="WWNum5">
        <text:list-item>
          <text:h text:style-name="P79" text:outline-level="1"><text:bookmark-start text:name="__RefHeading___Toc3021_2890390417"/>Lisaülesanne<text:bookmark-end text:name="__RefHeading___Toc3021_2890390417"/></text:h>
        </text:list-item>
      </text:list>
      <text:p text:style-name="P44"><text:span text:style-name="T32">Lisaülesanne kirjeldus nõudis ülesande täiendamist vähemalt kahe </text:span><text:span text:style-name="T34">eelseadistatud komplekti väärtusi</text:span><text:span text:style-name="T32">, kus programmile antakse ette sisendandmed, mille põhjal leida funktsiooni abstiss x ja ordinant y igal otsitaval sammul. </text:span><text:span text:style-name="T36">Lisaülesande korral tuleb kasutajal valida režiim, mis on algoritmina UML tegevusdiagrammil Joonis </text:span><text:span text:style-name="T43">4</text:span><text:span text:style-name="T36">.</text:span></text:p>
      <text:p text:style-name="P61"><draw:frame draw:style-name="fr1" draw:name="Frame4" text:anchor-type="char" svg:width="5.9055in" draw:z-index="6"><draw:text-box fo:min-height="2.9654in"><text:p text:style-name="Joonis"><draw:frame draw:style-name="fr4" draw:name="Image4" text:anchor-type="paragraph" svg:width="5.9055in" style:rel-width="100%" svg:height="2.9654in" style:rel-height="scale" draw:z-index="7"><draw:image xlink:href="Pictures/100000000000046D000002391E36F4BFB87118FC.png" xlink:type="simple" xlink:show="embed" xlink:actuate="onLoad" draw:mime-type="image/png"/></draw:frame>Joonis <text:sequence text:ref-name="refJoonis4" text:name="Joonis" text:formula="ooow:Joonis+1" style:num-format="1">5</text:sequence>: UML tegevusdiagramm programmi režiimi valimisel</text:p></draw:text-box></draw:frame><text:span text:style-name="T37">Koodi saab korrata senikaua kui kasutaja sisestab arvu 0, vastasel juhul </text:span><text:span text:style-name="T38">kordab kood oma töövoogu algusest [Joonis </text:span><text:span text:style-name="T40">4</text:span><text:span text:style-name="T38">]. </text:span><text:span text:style-name="T39">Režiimist sõltumatult lahendab programm funktsiooni lähtuvalt algori</text:span><text:span text:style-name="T40">t</text:span><text:span text:style-name="T39">mi</text:span><text:span text:style-name="T40">l</text:span><text:span text:style-name="T41">e </text:span><text:span text:style-name="T39"><text:s/>[Joonis </text:span><text:span text:style-name="T42">5</text:span><text:span text:style-name="T39">].</text:span></text:p>
      <text:p text:style-name="P61"><text:span text:style-name="T25">Minu lahendus kätkeb kolme </text:span><text:span text:style-name="T20">eelseadistatud komplekti väärtusi</text:span><text:span text:style-name="T25"> [Joonis </text:span><text:span text:style-name="T26">5</text:span><text:span text:style-name="T25">], </text:span><text:span text:style-name="T20">mis kutsutakse välja põhiprogrammis abifunktsiooniga TestHardcodedValues.</text:span></text:p>
      <text:p text:style-name="P27"><draw:frame draw:style-name="fr1" draw:name="Frame6" text:anchor-type="char" svg:width="5.9055in" draw:z-index="10"><draw:text-box fo:min-height="2.9626in"><text:p text:style-name="Joonis"><draw:frame draw:style-name="fr4" draw:name="Image6" text:anchor-type="paragraph" svg:width="5.9055in" style:rel-width="100%" svg:height="2.9626in" style:rel-height="scale" draw:z-index="11"><draw:image xlink:href="Pictures/1000000100000375000001BCA30AC468353481B7.png" xlink:type="simple" xlink:show="embed" xlink:actuate="onLoad" draw:mime-type="image/png"/></draw:frame>Joonis <text:sequence text:ref-name="refJoonis5" text:name="Joonis" text:formula="ooow:Joonis+1" style:num-format="1">6</text:sequence>: Lisasülesande põhiprogrami osa.</text:p></draw:text-box></draw:frame><text:soft-page-break/>Koodilahenduses tuleb hoiduda maagilistest numbritest, mistõttu sisendandmed on defineeritud preprotsessoritena <text:span text:style-name="T35">[Joonis </text:span><text:span text:style-name="T57">5</text:span><text:span text:style-name="T35">], ning neid kasutatakse f</text:span><text:span text:style-name="T36">u</text:span><text:span text:style-name="T35">nktsiooni väljakutses [Joonis </text:span><text:span text:style-name="T57">6</text:span><text:span text:style-name="T35">]</text:span>. </text:p>
      <text:p text:style-name="P27"><draw:frame draw:style-name="fr1" draw:name="Frame7" text:anchor-type="char" svg:width="5.9055in" draw:z-index="12"><draw:text-box fo:min-height="3.5063in"><text:p text:style-name="Joonis"><draw:frame draw:style-name="fr4" draw:name="Image7" text:anchor-type="paragraph" svg:width="5.9055in" style:rel-width="100%" svg:height="3.5063in" style:rel-height="scale" draw:z-index="13"><draw:image xlink:href="Pictures/10000001000003600000020142413CA2E8EAD63A.png" xlink:type="simple" xlink:show="embed" xlink:actuate="onLoad" draw:mime-type="image/png"/></draw:frame>Joonis <text:sequence text:ref-name="refJoonis6" text:name="Joonis" text:formula="ooow:Joonis+1" style:num-format="1">7</text:sequence>: Lisaülesande abifunktsioon TestHardCodedValues.</text:p></draw:text-box></draw:frame><text:span text:style-name="T43">Ülaltoodud koodijupp </text:span><text:span text:style-name="T44">[Joonis </text:span><text:span text:style-name="T57">7</text:span><text:span text:style-name="T44">]</text:span><text:span text:style-name="T43"> rakendab funktsioonis TestHardcodedValues abifunktsioone, mis on osa baasülesande algoritmist [Joonis 4]. </text:span><text:span text:style-name="T35">Kokkuvõtvalt, lisaülesanne hoidub kasutajalt sisendandmete küsimist, ning kasutab eeldefineeritud väärtusi ülesande lahendamiseks. </text:span></text:p>
      <text:list xml:id="list223308775070884" text:continue-numbering="true" text:style-name="WWNum5">
        <text:list-item>
          <text:list>
            <text:list-item>
              <text:h text:style-name="P81" text:outline-level="2"><text:bookmark-start text:name="__RefHeading___Toc3023_2890390417"/><text:bookmark-start text:name="_Toc143525428"/><text:soft-page-break/>Eriolukordade analüüs<text:bookmark-end text:name="__RefHeading___Toc3023_2890390417"/><text:bookmark-end text:name="_Toc143525428"/></text:h>
            </text:list-item>
          </text:list>
        </text:list-item>
      </text:list>
      <text:p text:style-name="P25"><text:bookmark-start text:name="_Toc143523055"/>Tabel <text:sequence text:ref-name="refTabel0" text:name="Tabel" text:formula="ooow:Tabel+1" style:num-format="1">1</text:sequence>. Eriolukordade analüüs<text:bookmark-end text:name="_Toc143523055"/></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text:p>
          </table:table-cell>
          <table:table-cell table:style-name="Table3.A1" office:value-type="string">
            <text:p text:style-name="P17">Kirjeldus</text:p>
          </table:table-cell>
          <table:table-cell table:style-name="Table3.A1" office:value-type="string">
            <text:p text:style-name="P17">Olek</text:p>
          </table:table-cell>
          <table:table-cell table:style-name="Table3.A1" office:value-type="string">
            <text:p text:style-name="P17">Lahendus </text:p>
          </table:table-cell>
        </table:table-row>
        <table:table-row table:style-name="Table3.1">
          <table:table-cell table:style-name="Table3.A1" office:value-type="string">
            <text:p text:style-name="P18">1</text:p>
          </table:table-cell>
          <table:table-cell table:style-name="Table3.A1" office:value-type="string">
            <text:p text:style-name="P19">Kasutaja sisestatud viimane funktsiooni abstsiss on väiksem või võrdne esimese funktsiooni abstsissiga </text:p>
          </table:table-cell>
          <table:table-cell table:style-name="Table3.A1" office:value-type="string">
            <text:p text:style-name="P19">Lahendatud</text:p>
          </table:table-cell>
          <table:table-cell table:style-name="Table3.A1" office:value-type="string">
            <text:p text:style-name="P20">Programm küsib kasutajalt uut väärtust viimaseks funktsiooni abstsissiks, ja senikaua kui see on suurem kui esimene abstsiss.</text:p>
          </table:table-cell>
        </table:table-row>
        <table:table-row table:style-name="Table3.1">
          <table:table-cell table:style-name="Table3.A3" office:value-type="string">
            <text:p text:style-name="P19">2</text:p>
          </table:table-cell>
          <table:table-cell table:style-name="Table3.A3" office:value-type="string">
            <text:p text:style-name="P19">Kasutaja sisestab sammude arvuks (N) mittepositiivse arvu</text:p>
          </table:table-cell>
          <table:table-cell table:style-name="Table3.A3" office:value-type="string">
            <text:p text:style-name="P19">Lahendatud</text:p>
          </table:table-cell>
          <table:table-cell table:style-name="Table3.A3" office:value-type="string">
            <text:p text:style-name="P20">Programm küsib kasutajalt uut väärtust sammude arvuks, senikaua kui arv on suurem kui 0.</text:p>
          </table:table-cell>
        </table:table-row>
        <table:table-row table:style-name="Table3.1">
          <table:table-cell table:style-name="Table3.A3" office:value-type="string">
            <text:p text:style-name="P19">3</text:p>
          </table:table-cell>
          <table:table-cell table:style-name="Table3.A3" office:value-type="string">
            <text:p text:style-name="P19">Kasutaja esitab sammude arvuks (N) rohkem kui lubatud arv samme</text:p>
          </table:table-cell>
          <table:table-cell table:style-name="Table3.A3" office:value-type="string">
            <text:p text:style-name="P19">Lahendatud</text:p>
          </table:table-cell>
          <table:table-cell table:style-name="Table3.A3" office:value-type="string">
            <text:p text:style-name="P20">Programm kirjutab üle kasutaja sisestatud sammude arvu väärtusega, mis on võrdne maksimaalselt lubatud sammude arvuga. Seejärel programm jätkub. Kasutajat teavitatakse sammude arvu (N) muutmisest.</text:p>
          </table:table-cell>
        </table:table-row>
        <table:table-row table:style-name="Table3.1">
          <table:table-cell table:style-name="Table3.A3" office:value-type="string">
            <text:p text:style-name="P20">4</text:p>
          </table:table-cell>
          <table:table-cell table:style-name="Table3.A3" office:value-type="string">
            <text:p text:style-name="P20">Kasutaja sisestab <text:span text:style-name="T49">ükskõik millisel juhul</text:span> sisendandmeks arvu asemel tähemärgi</text:p>
          </table:table-cell>
          <table:table-cell table:style-name="Table3.A3" office:value-type="string">
            <text:p text:style-name="P20">Lahendamata</text:p>
          </table:table-cell>
          <table:table-cell table:style-name="Table3.A3" office:value-type="string">
            <text:p text:style-name="P20">Programm peaks kätkema endast andmetüübi valideerimist. Vastasel juhul programm sattub lõputusse tsüklisse, risustades konsooli.</text:p>
          </table:table-cell>
        </table:table-row>
        <table:table-row table:style-name="Table3.1">
          <table:table-cell table:style-name="Table3.A3" office:value-type="string">
            <text:p text:style-name="P20">5</text:p>
          </table:table-cell>
          <table:table-cell table:style-name="Table3.A3" office:value-type="string">
            <text:p text:style-name="P20">Kasutaja sisestab <text:span text:style-name="T49">sammude arvuks on komakohaga arvu</text:span></text:p>
          </table:table-cell>
          <table:table-cell table:style-name="Table3.A3" office:value-type="string">
            <text:p text:style-name="P20">Lahendamata</text:p>
          </table:table-cell>
          <table:table-cell table:style-name="Table3.A3" office:value-type="string">
            <text:p text:style-name="P20">Programm peaks kätkema endast andmetüübi valideerimist. Vastasel juhul programm sattub lõputusse tsüklisse, risustades konsooli.</text:p>
          </table:table-cell>
        </table:table-row>
        <table:table-row table:style-name="Table3.1">
          <table:table-cell table:style-name="Table3.A7" table:number-columns-spanned="4" office:value-type="string">
            <text:p text:style-name="P23">Lisaülesanne</text:p>
          </table:table-cell>
          <table:covered-table-cell/>
          <table:covered-table-cell/>
          <table:covered-table-cell/>
        </table:table-row>
        <table:table-row table:style-name="Table3.1">
          <table:table-cell table:style-name="Table3.A3" office:value-type="string">
            <text:p text:style-name="P22">6</text:p>
          </table:table-cell>
          <table:table-cell table:style-name="Table3.A3" office:value-type="string">
            <text:p text:style-name="P22">Kasutaja sisestab ebakorrektse käsurea argumendi lisaülesande käivitamiseks</text:p>
          </table:table-cell>
          <table:table-cell table:style-name="Table3.A3" office:value-type="string">
            <text:p text:style-name="P22">Lahendatud</text:p>
          </table:table-cell>
          <table:table-cell table:style-name="Table3.A3" office:value-type="string">
            <text:p text:style-name="P22">Programm teavitab kasutajat vale käsurea argumend esitamise pärast ning väljub programmist.</text:p>
          </table:table-cell>
        </table:table-row>
        <table:table-row table:style-name="Table3.1">
          <table:table-cell table:style-name="Table3.A3" office:value-type="string">
            <text:p text:style-name="P22">7</text:p>
          </table:table-cell>
          <table:table-cell table:style-name="Table3.A3" office:value-type="string">
            <text:p text:style-name="P22">Lisaülesandes eelseadistatud sisendandmed on arvude asemel tähemärgid</text:p>
          </table:table-cell>
          <table:table-cell table:style-name="Table3.A3" office:value-type="string">
            <text:p text:style-name="P22">Lahendamata</text:p>
          </table:table-cell>
          <table:table-cell table:style-name="Table3.A3" office:value-type="string">
            <text:p text:style-name="P20">Programm peaks kätkema endast andmetüübi valideerimist. Vastasel juhul programm sattub lõputusse tsüklisse, risustades konsooli.</text:p>
          </table:table-cell>
        </table:table-row>
        <table:table-row table:style-name="Table3.1">
          <table:table-cell table:style-name="Table3.A3" office:value-type="string">
            <text:p text:style-name="P22">8</text:p>
          </table:table-cell>
          <table:table-cell table:style-name="Table3.A3" office:value-type="string">
            <text:p text:style-name="P21"><text:span text:style-name="T49">Eelseadistatud</text:span> <text:span text:style-name="T49">sammude arvuks </text:span><text:soft-page-break/><text:span text:style-name="T49">on komakohaga arvu</text:span></text:p>
          </table:table-cell>
          <table:table-cell table:style-name="Table3.A3" office:value-type="string">
            <text:p text:style-name="P22">Lahendamata</text:p>
          </table:table-cell>
          <table:table-cell table:style-name="Table3.A3" office:value-type="string">
            <text:p text:style-name="P21">Programm peaks kätkema endast andmetüübi valideerimist. Vastasel juhul programm sattub <text:soft-page-break/>lõputusse tsüklisse, risustades konsooli.</text:p>
          </table:table-cell>
        </table:table-row>
        <table:table-row table:style-name="Table3.1">
          <table:table-cell table:style-name="Table3.A3" office:value-type="string">
            <text:p text:style-name="P22">9</text:p>
          </table:table-cell>
          <table:table-cell table:style-name="Table3.A3" office:value-type="string">
            <text:p text:style-name="P21"><text:span text:style-name="T49">Eelseadistatud</text:span> <text:span text:style-name="T49">viimane abstsiss on väiksem kui esimene abstsiss</text:span></text:p>
          </table:table-cell>
          <table:table-cell table:style-name="Table3.A3" office:value-type="string">
            <text:p text:style-name="P22">Lahendamata</text:p>
          </table:table-cell>
          <table:table-cell table:style-name="Table3.A3" office:value-type="string">
            <text:p text:style-name="P22">Programm jõuab lõpplahenduseni, kuid ei võta arvesse tingimust, et viimane abstsiss ei tohi olla väiksem kui esimene abstsiss.</text:p>
          </table:table-cell>
        </table:table-row>
        <table:table-row table:style-name="Table3.1">
          <table:table-cell table:style-name="Table3.A3" office:value-type="string">
            <text:p text:style-name="P24">10</text:p>
          </table:table-cell>
          <table:table-cell table:style-name="Table3.A3" office:value-type="string">
            <text:p text:style-name="P24">Eelseadistatud sammude arv on suurem kui enim lubatud arv samme</text:p>
          </table:table-cell>
          <table:table-cell table:style-name="Table3.A3" office:value-type="string">
            <text:p text:style-name="P24">Lahendatud</text:p>
          </table:table-cell>
          <table:table-cell table:style-name="Table3.A3" office:value-type="string">
            <text:p text:style-name="P20">Programm kirjutab üle kasutaja sisestatud sammude arvu väärtusega, mis on võrdne maksimaalselt lubatud sammude arvuga. Seejärel programm jätkub. Kasutajat teavitatakse sammude arvu (N) muutmisest.</text:p>
          </table:table-cell>
        </table:table-row>
      </table:table>
      <text:p text:style-name="P12"/>
      <text:p text:style-name="Text_20_body"/>
      <text:list xml:id="list223310814738272" text:continue-numbering="true" text:style-name="WWNum5">
        <text:list-item>
          <text:h text:style-name="P77" text:outline-level="1"><text:bookmark-start text:name="_Toc82609484"/><text:bookmark-start text:name="_Toc143525429"/><text:bookmark-start text:name="__RefHeading___Toc3025_2890390417"/><text:bookmark-start text:name="_Toc143516459"/>Kokkuvõte<text:bookmark-end text:name="_Toc82609484"/><text:bookmark-end text:name="_Toc143525429"/><text:bookmark-end text:name="__RefHeading___Toc3025_2890390417"/><text:bookmark-end text:name="_Toc143516459"/></text:h>
        </text:list-item>
      </text:list>
      <text:p text:style-name="P94"><text:span text:style-name="T30">Ül</text:span><text:span text:style-name="T32">e</text:span><text:span text:style-name="T30">san</text:span><text:span text:style-name="T32">d</text:span><text:span text:style-name="T30">e koodi lahendami</text:span><text:span text:style-name="T32">sega alustasin</text:span><text:span text:style-name="T30"> 3. oktoobri</text:span><text:span text:style-name="T32">l,</text:span><text:span text:style-name="T30"> ning </text:span><text:span text:style-name="T32">töö kulges kuni</text:span><text:span text:style-name="T30"> 17. oktoobrini. Ülesande lahendasin mitme abi funktsiooniga, et lihtsustada koodiloetavust. Konsultatsioonides saadud tagasiside põhjal võtsin kasutusele </text:span><text:span text:style-name="T13">massiivid</text:span><text:span text:style-name="T58">, kuhu </text:span><text:span text:style-name="T59">tõin</text:span><text:span text:style-name="T58"> <text:s text:c="2"/>funktsiooni a</text:span><text:span text:style-name="T59">bstsiss</text:span><text:span text:style-name="T58"> x ja ordinante y </text:span><text:span text:style-name="T59">väärtused. Ülesanne oli lahendatavad ka massiivideta, kuid ülesande kirjeldus nõudis massiivide kasutamist. </text:span></text:p>
      <text:p text:style-name="P59"><text:span text:style-name="T16">Ülesande keerukuseks hindan 9 punkti 10 punkti skaalal. Ülesande lahendamine nõudis <text:s/>õppeaines „IAX0583 Programmeerimine I” käsitletud varasemaid teemasid, mis oli ootuspärane. Keerukust lisas </text:span><text:span text:style-name="T17">ülesande püstituses napisõnaliselt kirjeldatud muutujad tähisega H ja N. Ingliskeelses ülesande kirjelduses ei olnud mainitud, et H tähistab „sammu pikkust”</text:span><text:span text:style-name="T15"> (ing. k </text:span><text:span text:style-name="T3">size/length of a step</text:span><text:span text:style-name="T15">) </text:span><text:span text:style-name="T3">. </text:span><text:span text:style-name="T17">Keeruliseks tegi ka ülesande puhul asjaolu, et ei olnud täpsustatud kas programmis järgmine juhtum – kui kasutaja sisestab rohkem kui lubatud arvu samme. Nõutav tingimus programmile oli mitmeti tõlgendatav, mistõttu oli raske mõista, kas programm peab vähendama kasutaja sisestatud sammude arvu numbrini, mis ühtib enim lubatud sammude arvuga. Näiteks, kui enim lubatud sammude arv on 20, ent kasutaja sisestab </text:span><text:span text:style-name="T18">arvu</text:span><text:span text:style-name="T17"> 30. Kas seljuhul programm vähendab sammude arvu 20ni, ning lahendab funktsiooni, või programm peab küsima kasutajalt </text:span><text:span text:style-name="T18">uue </text:span><text:span text:style-name="T17">sobivama sammude arvu, mis oleks väiksem kui 20.</text:span></text:p>
      <text:p text:style-name="P93">Ülesande lahendamisele kulus oodatust rohkem aega. Alustasin ülesande lahendamist 3. oktoobril, ning väga umbkaudselt kulus ülesande lahendamisele 40h-50h.</text:p>
      <text:p text:style-name="P60"><text:span text:style-name="T17">Soovitan edasiste ebaselguste vältimiseks </text:span><text:span text:style-name="T18">ümbersõnastada ingliskeelses ülesandekirjelduses kaks mõistet.</text:span><text:span text:style-name="T17"> </text:span><text:span text:style-name="T18">Minu ettepanek on kirjeldada kaks tähistatud muutujat, H ja N. Tähise H korral soovitan anda ingliskeelseks mõisteks „</text:span><text:span text:style-name="T3">size of </text:span><text:span text:style-name="T6">a </text:span><text:span text:style-name="T3">step”</text:span><text:span text:style-name="T17"> </text:span><text:span text:style-name="T18">või</text:span><text:span text:style-name="T17"> „</text:span><text:span text:style-name="T3">length of </text:span><text:span text:style-name="T6">a</text:span><text:span text:style-name="T3"> step”.</text:span><text:span text:style-name="T17"> </text:span><text:span text:style-name="T18">Tähi</text:span><text:span text:style-name="T4">s</text:span><text:span text:style-name="T17"> </text:span><text:span text:style-name="T4">N </text:span><text:span text:style-name="T18">korral soovitan kasutada ingliskeelset vastet <text:s/></text:span><text:span text:style-name="T4">„count of steps”</text:span><text:span text:style-name="T18"> või </text:span><text:span text:style-name="T4">„number of steps”</text:span><text:span text:style-name="T18">. </text:span><text:span text:style-name="T19">Kirjelduses oli mainitud vabatahtlik lisaülesanne imaginaararve leida, ning neid kuvada lõplikus lahenduses. Kahjuks imaginaararvu mõisteselgitus ja näited ülesande kirjeldusest puudusid. See raskendas imaginaararvude leidmise meetodi </text:span><text:span text:style-name="T22">mõistmist.</text:span></text:p>
      <text:h text:style-name="P65" text:outline-level="1"><text:bookmark-start text:name="_Toc227485540"/><text:bookmark-start text:name="_Toc143525431"/><text:bookmark-start text:name="_Toc143516461"/><text:bookmark-start text:name="_Toc82609486"/><text:bookmark-start text:name="_Toc437856796"/><text:bookmark-start text:name="_Toc437263091"/><text:bookmark-start text:name="__RefHeading___Toc3029_2890390417"/><text:bookmark-start text:name="_Toc371596370"/>Lisa 1<text:bookmark-end text:name="_Toc227485540"/><text:bookmark-end text:name="_Toc437856796"/><text:bookmark-end text:name="_Toc437263091"/><text:bookmark-end text:name="_Toc371596370"/> – <text:span text:style-name="T8">Kuvatõmmised</text:span><text:bookmark-end text:name="_Toc143525431"/><text:bookmark-end text:name="_Toc143516461"/><text:bookmark-end text:name="_Toc82609486"/><text:bookmark-end text:name="__RefHeading___Toc3029_2890390417"/></text:h>
      <text:p text:style-name="P64"><draw:frame draw:style-name="fr1" draw:name="Frame13" text:anchor-type="char" svg:width="5.9055in" draw:z-index="27"><draw:text-box fo:min-height="5.5874in"><text:p text:style-name="Lisa"><draw:frame draw:style-name="fr4" draw:name="Image13" text:anchor-type="paragraph" svg:width="5.9055in" style:rel-width="100%" svg:height="5.5874in" style:rel-height="scale" draw:z-index="28"><draw:image xlink:href="Pictures/10000001000002C30000029DD94AF33A4B487B25.png" xlink:type="simple" xlink:show="embed" xlink:actuate="onLoad" draw:mime-type="image/png"/></draw:frame>Lisa <text:sequence text:ref-name="refLisa11" text:name="Lisa" text:formula="ooow:Lisa+1" style:num-format="1">12</text:sequence>: Põhiülesanne sisendväärtustega</text:p></draw:text-box></draw:frame></text:p>
      <text:p text:style-name="P64"><draw:frame draw:style-name="fr1" draw:name="Frame12" text:anchor-type="char" svg:width="5.9055in" draw:z-index="25"><draw:text-box fo:min-height="7.9717in"><text:p text:style-name="Lisa"><draw:frame draw:style-name="fr4" draw:name="Image12" text:anchor-type="paragraph" svg:width="5.9055in" style:rel-width="100%" svg:height="7.9717in" style:rel-height="scale" draw:z-index="26"><draw:image xlink:href="Pictures/10000001000002C2000003B9B9F816663A1E1CA2.png" xlink:type="simple" xlink:show="embed" xlink:actuate="onLoad" draw:mime-type="image/png"/></draw:frame>Lisa <text:sequence text:ref-name="refLisa12" text:name="Lisa" text:formula="ooow:Lisa+1" style:num-format="1">13</text:sequence>: Põhiülesanne ebasobivate sisendväärtustega</text:p></draw:text-box></draw:frame><text:soft-page-break/></text:p>
      <text:p text:style-name="P64"><draw:frame draw:style-name="fr1" draw:name="Frame11" text:anchor-type="char" svg:width="5.9055in" draw:z-index="23"><draw:text-box fo:min-height="6.6571in"><text:p text:style-name="Lisa"><draw:frame draw:style-name="fr4" draw:name="Image11" text:anchor-type="paragraph" svg:width="5.9055in" style:rel-width="100%" svg:height="6.6571in" style:rel-height="scale" draw:z-index="24"><draw:image xlink:href="Pictures/10000001000002C30000031D49665AB49531967E.png" xlink:type="simple" xlink:show="embed" xlink:actuate="onLoad" draw:mime-type="image/png"/></draw:frame>Lisa <text:sequence text:ref-name="refLisa13" text:name="Lisa" text:formula="ooow:Lisa+1" style:num-format="1">14</text:sequence>: Lisaülesanne 1. eelseadistatud väärtuste komplektiga</text:p></draw:text-box></draw:frame><text:soft-page-break/></text:p>
      <text:p text:style-name="P64"><draw:frame draw:style-name="fr1" draw:name="Frame10" text:anchor-type="char" svg:width="5.9055in" draw:z-index="19"><draw:text-box fo:min-height="4.7425in"><text:p text:style-name="Lisa"><draw:frame draw:style-name="fr4" draw:name="Image9" text:anchor-type="paragraph" svg:width="5.9055in" style:rel-width="100%" svg:height="4.7425in" style:rel-height="scale" draw:z-index="20"><draw:image xlink:href="Pictures/10000001000002BD00000233BFF20E96A412E46A.png" xlink:type="simple" xlink:show="embed" xlink:actuate="onLoad" draw:mime-type="image/png"/></draw:frame>Lisa <text:sequence text:ref-name="refLisa14" text:name="Lisa" text:formula="ooow:Lisa+1" style:num-format="1">15</text:sequence>: Lisaülesanne 2. eelseadistatud väärtuste komplektiga</text:p></draw:text-box></draw:frame><text:soft-page-break/></text:p>
      <text:p text:style-name="P64"><draw:frame draw:style-name="fr1" draw:name="Frame9" text:anchor-type="char" svg:width="5.9055in" draw:z-index="21"><draw:text-box fo:min-height="4.7256in"><text:p text:style-name="Lisa"><draw:frame draw:style-name="fr4" draw:name="Image10" text:anchor-type="paragraph" svg:width="5.9055in" style:rel-width="100%" svg:height="4.7256in" style:rel-height="scale" draw:z-index="22"><draw:image xlink:href="Pictures/10000001000002BD0000023135FA95D918C3E236.png" xlink:type="simple" xlink:show="embed" xlink:actuate="onLoad" draw:mime-type="image/png"/></draw:frame>Lisa <text:sequence text:ref-name="refLisa15" text:name="Lisa" text:formula="ooow:Lisa+1" style:num-format="1">16</text:sequence>: Lisaülesanne 3. eelseadistatud väärtuste komplektiga</text:p></draw:text-box></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t" fo:country="EE" style:letter-kerning="false" style:font-name-asian="Times New Roman1" style:font-size-asian="10pt" style:language-asian="et" style:country-asian="E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t" fo:country="EE" style:letter-kerning="false" style:font-name-asian="Times New Roman1" style:font-size-asian="10pt" style:language-asian="et" style:country-asian="E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officeooo:rsid="002f6eda"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1665in" style:contextual-spacing="false" fo:line-height="150%" fo:text-align="justify" style:justify-single-word="false"/>
      <style:text-properties fo:font-style="italic" officeooo:rsid="003b9ab9" style:font-style-asian="italic"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ext_20_body" style:next-style-name="Text_20_body" loext:linked-style-name="Heading_20_1_20_Char" style:default-outline-level="1" style:list-style-name="WWNum5" style:class="text">
      <style:paragraph-properties fo:margin-top="0.8335in" fo:margin-bottom="0.25in" style:contextual-spacing="false" fo:text-align="start" style:justify-single-word="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5" style:list-level="2" style:class="text">
      <style:paragraph-properties fo:margin-top="0.3335in" fo:margin-bottom="0.0835in" style:contextual-spacing="false" fo:line-height="150%" fo:keep-with-next="always"/>
      <style:text-properties fo:font-size="14pt" fo:font-weight="bold" style:font-size-asian="14pt" style:font-weight-asian="bold" style:font-size-complex="10pt"/>
    </style:style>
    <style:style style:name="Heading_20_3" style:display-name="Heading 3" style:family="paragraph" style:parent-style-name="Standard" style:next-style-name="Text_20_body" style:default-outline-level="3" style:list-style-name="WWNum5" style:list-level="3" style:class="text">
      <style:paragraph-properties fo:margin-top="0.1665in" fo:margin-bottom="0.0835in" style:contextual-spacing="false" fo:line-height="150%" fo:keep-with-next="always"/>
      <style:text-properties fo:font-weight="bold" style:font-weight-asian="bold"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list-style-name="WWNum5" style:list-level="4" style:class="text">
      <style:paragraph-properties fo:line-height="150%" fo:text-align="center" style:justify-single-word="false" fo:keep-with-next="always"/>
      <style:text-properties fo:language="en" fo:country="GB" fo:font-weight="bold" style:font-weight-asian="bold" style:font-size-complex="10pt"/>
    </style:style>
    <style:style style:name="Heading_20_5" style:display-name="Heading 5" style:family="paragraph" style:parent-style-name="Standard" style:next-style-name="Standard" style:default-outline-level="5" style:list-style-name="WWNum5" style:list-level="5" style:class="text">
      <style:paragraph-properties fo:text-align="center" style:justify-single-word="false" fo:keep-with-next="always"/>
      <style:text-properties fo:font-weight="bold" style:font-weight-asian="bold" style:font-size-complex="10pt"/>
    </style:style>
    <style:style style:name="Heading_20_6" style:display-name="Heading 6" style:family="paragraph" style:parent-style-name="Standard" style:next-style-name="Standard" style:default-outline-level="6" style:list-style-name="WWNum5" style:list-level="6" style:class="text">
      <style:paragraph-properties fo:text-align="center" style:justify-single-word="false" fo:keep-with-next="always"/>
      <style:text-properties fo:language="en" fo:country="GB" fo:font-weight="bold" style:font-weight-asian="bold" style:font-size-complex="10pt"/>
    </style:style>
    <style:style style:name="Heading_20_7" style:display-name="Heading 7" style:family="paragraph" style:parent-style-name="Standard" style:next-style-name="Standard" style:default-outline-level="7" style:list-style-name="WWNum5" style:list-level="7" style:class="text">
      <style:paragraph-properties fo:text-align="center" style:justify-single-word="false" fo:keep-with-next="always"/>
      <style:text-properties fo:font-weight="bold" style:font-weight-asian="bold" style:font-size-complex="10pt"/>
    </style:style>
    <style:style style:name="Heading_20_8" style:display-name="Heading 8" style:family="paragraph" style:parent-style-name="Standard" style:next-style-name="Standard" style:default-outline-level="8" style:list-style-name="WWNum5" style:list-level="8" style:class="text">
      <style:paragraph-properties fo:keep-with-next="always"/>
      <style:text-properties fo:font-style="italic" fo:font-weight="bold" style:font-style-asian="italic" style:font-weight-asian="bold" style:font-size-complex="10pt"/>
    </style:style>
    <style:style style:name="Heading_20_9" style:display-name="Heading 9" style:family="paragraph" style:parent-style-name="Standard" style:next-style-name="Standard" loext:linked-style-name="Heading_20_9_20_Char" style:default-outline-level="9" style:list-style-name="WWNum5" style:list-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size-asian="10.5pt" style:font-style-asian="italic" style:font-size-complex="10.5pt" style:font-style-complex="italic"/>
    </style:style>
    <style:style style:name="Style_20_Right" style:display-name="Style Right" style:family="paragraph" style:parent-style-name="Standard">
      <style:paragraph-properties fo:text-align="end" style:justify-single-word="false"/>
      <style:text-properties style:font-size-complex="10pt"/>
    </style:style>
    <style:style style:name="List_20_Bullet_20_2" style:display-name="List Bullet 2" style:family="paragraph" style:parent-style-name="Standard" style:auto-update="true" style:list-style-name="WWNum1"/>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2" style:display-name="List Number 2" style:family="paragraph" style:parent-style-name="Standard" style:list-style-name="WWNum2"/>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class="index">
      <style:paragraph-properties fo:line-height="150%"/>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style>
    <style:style style:name="Equation" style:family="paragraph" style:parent-style-name="Standard">
      <style:paragraph-properties fo:margin-top="0in" fo:margin-bottom="0.1665in" style:contextual-spacing="false">
        <style:tab-stops>
          <style:tab-stop style:position="5.828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346in" fo:margin-right="0in" fo:line-height="150%" fo:text-indent="0in" style:auto-text-indent="false"/>
    </style:style>
    <style:style style:name="caption" style:family="paragraph" style:parent-style-name="Standard" style:next-style-name="Standard">
      <style:paragraph-properties fo:margin-top="0.0835in" fo:margin-bottom="0.0835in" style:contextual-spacing="false" fo:line-height="115%" fo:text-align="center" style:justify-single-word="false"/>
      <style:text-properties fo:font-size="10pt" style:font-size-asian="10pt" style:font-size-complex="10pt" style:font-weight-complex="bold"/>
    </style:style>
    <style:style style:name="Tabel" style:family="paragraph" style:parent-style-name="Text_20_body">
      <style:paragraph-properties fo:margin-top="0in" fo:margin-bottom="0in" style:contextual-spacing="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line-height="150%"/>
    </style:style>
    <style:style style:name="toa_20_heading" style:display-name="toa heading" style:family="paragraph" style:parent-style-name="Standard" style:next-style-name="Standard">
      <style:paragraph-properties fo:margin-top="0.0835in" fo:margin-bottom="0in" style:contextual-spacing="false" fo:line-height="150%"/>
      <style:text-properties fo:font-weight="bold" style:font-weight-asian="bold" style:font-name-complex="Arial" style:font-family-complex="Arial" style:font-family-generic-complex="system" style:font-pitch-complex="variable" style:font-weight-complex="bold"/>
    </style:style>
    <style:style style:name="List_20_Number" style:display-name="List Number" style:family="paragraph" style:parent-style-name="Standard" style:list-style-name="WWNum3">
      <style:paragraph-properties fo:margin-left="0.248in" fo:margin-right="0in" fo:margin-top="0in" fo:margin-bottom="0.1665in" style:contextual-spacing="true" fo:line-height="150%" fo:text-align="justify" style:justify-single-word="false" fo:text-indent="-0.248in" style:auto-text-indent="false"/>
    </style:style>
    <style:style style:name="Bibliography" style:family="paragraph" style:parent-style-name="Standard" style:next-style-name="Standard"/>
    <style:style style:name="Heading_5f_unnumber" style:display-name="Heading_unnumber" style:family="paragraph" style:parent-style-name="Heading_20_1" style:next-style-name="Text_20_body" style:default-outline-level="1" style:list-style-name=""/>
    <style:style style:name="List_20_Bullet" style:display-name="List Bullet" style:family="paragraph" style:parent-style-name="Standard" style:list-style-name="WWNum6">
      <style:paragraph-properties fo:margin-left="0.4957in" fo:margin-right="0in" fo:margin-top="0in" fo:margin-bottom="0.1665in" style:contextual-spacing="true" fo:line-height="150%" fo:text-align="justify" style:justify-single-word="false" fo:text-indent="-0.248in" style:auto-text-indent="false"/>
      <style:text-properties style:font-name-asian="Calibri" style:font-family-asian="Calibri" style:font-family-generic-asian="system" style:font-pitch-asian="variable" style:font-size-complex="11pt"/>
    </style:style>
    <style:style style:name="Footnote" style:family="paragraph" style:parent-style-name="Standard" loext:linked-style-name="Footnote_20_Text_20_Char" style:class="extra">
      <style:paragraph-properties fo:margin-top="0.0835in" fo:margin-bottom="0in" style:contextual-spacing="false" fo:line-height="115%"/>
      <style:text-properties fo:font-size="10pt" style:font-size-asian="10pt" style:font-size-complex="10pt"/>
    </style:style>
    <style:style style:name="Table_5f_head" style:display-name="Table_head" style:family="paragraph" style:parent-style-name="Standard">
      <style:paragraph-properties fo:margin-top="0.0417in" fo:margin-bottom="0.0417in" style:contextual-spacing="false" fo:line-height="115%"/>
      <style:text-properties fo:font-size="11pt" fo:font-weight="bold" style:font-size-asian="11pt" style:font-weight-asian="bold"/>
    </style:style>
    <style:style style:name="Table_5f_text" style:display-name="Table_text" style:family="paragraph" style:parent-style-name="Standard">
      <style:paragraph-properties fo:margin-top="0.0417in" fo:margin-bottom="0.0417in" style:contextual-spacing="false" fo:line-height="115%"/>
      <style:text-properties fo:font-size="11pt" style:font-size-asian="11pt"/>
    </style:style>
    <style:style style:name="Program_5f_code" style:display-name="Program_code" style:family="paragraph" style:parent-style-name="Standard">
      <style:paragraph-properties fo:margin-top="0.028in" fo:margin-bottom="0.028in" style:contextual-spacing="false" fo:keep-together="always" fo:keep-with-next="always"/>
      <style:text-properties style:font-name="Consolas" fo:font-family="Consolas" style:font-family-generic="roman" style:font-pitch="variable" fo:font-size="10pt" style:font-size-asian="10pt"/>
    </style:style>
    <style:style style:name="List_5f_bibliogr" style:display-name="List_bibliogr" style:family="paragraph" style:parent-style-name="Table_5f_text" style:list-style-name="WWNum7">
      <style:paragraph-properties fo:margin-left="0.3154in" fo:margin-right="0in" fo:margin-top="0.028in" fo:margin-bottom="0.028in" style:contextual-spacing="false" fo:text-indent="-0.3154in" style:auto-text-indent="false"/>
      <style:text-properties fo:language="en" fo:country="GB"/>
    </style:style>
    <style:style style:name="Figure" style:family="paragraph" style:parent-style-name="Standard" style:class="extra">
      <style:paragraph-properties fo:margin-top="0in" fo:margin-bottom="0.0835in" style:contextual-spacing="false" fo:line-height="115%" fo:text-align="center" style:justify-single-word="false"/>
      <style:text-properties fo:font-size="11pt" style:font-name-asian="Calibri"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ing_5f_center" style:display-name="Heading_center" style:family="paragraph" style:parent-style-name="Heading_20_1" style:next-style-name="Text_20_body" style:default-outline-level="1" style:list-style-name="">
      <style:paragraph-properties fo:text-align="center" style:justify-single-word="false"/>
    </style:style>
    <style:style style:name="Heading_5f_title" style:display-name="Heading_title" style:family="paragraph" style:parent-style-name="Standard">
      <style:paragraph-properties fo:text-align="center" style:justify-single-word="false"/>
      <style:text-properties fo:text-transform="uppercase" fo:font-size="20pt" fo:font-weight="bold" style:font-size-asian="20pt" style:font-weight-asian="bold" style:font-weight-complex="bold"/>
    </style:style>
    <style:style style:name="University" style:family="paragraph" style:parent-style-name="Text_20_body">
      <style:paragraph-properties fo:margin-top="0in" fo:margin-bottom="0.0555in" style:contextual-spacing="false" fo:line-height="100%" fo:text-align="center" style:justify-single-word="false"/>
      <style:text-properties fo:text-transform="uppercase"/>
    </style:style>
    <style:style style:name="Caption_5f_multiline" style:display-name="Caption_multiline" style:family="paragraph" style:parent-style-name="caption">
      <style:paragraph-properties fo:text-align="justify" style:justify-single-word="false"/>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justify" style:justify-single-word="false" fo:text-indent="0in" style:auto-text-indent="false"/>
      <style:text-properties fo:language="en" fo:country="US" style:font-name-asian="Calibri" style:font-family-asian="Calibri" style:font-family-generic-asian="system" style:font-pitch-asian="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keep-together="always"/>
      <style:text-properties fo:color="#2e74b5" loext:opacity="100%" style:font-name="Calibri Light" fo:font-family="'Calibri Light'" style:font-family-generic="roman" style:font-pitch="variable" fo:language="en" fo:country="US" fo:font-weight="normal" style:letter-kerning="false"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Joonis"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Lis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loext:linked-style-name="Heading_20_9">
      <style:text-properties fo:color="#272727" loext:opacity="100%" style:font-name="Cambria" fo:font-family="Cambria" style:font-family-generic="roman" style:font-pitch="variable" fo:font-size="10.5pt" fo:font-style="italic" style:font-size-asian="10.5pt" style:language-asian="en" style:country-asian="US" style:font-style-asian="italic" style:font-size-complex="10.5pt" style:font-style-complex="italic"/>
    </style:style>
    <style:style style:name="Footer_20_Char" style:display-name="Footer Char" style:family="text" loext:linked-style-name="Footer">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Internet_20_link" style:display-name="Internet link" style:family="text">
      <style:text-properties style:use-window-font-color="true" loext:opacity="0%"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style:language-asian="en" style:country-asian="US"/>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Heading_20_1_20_Char" style:display-name="Heading 1 Char" style:family="text" style:parent-style-name="Default_20_Paragraph_20_Font" loext:linked-style-name="Heading_20_1">
      <style:text-properties fo:font-size="16pt" fo:font-weight="bold" style:letter-kerning="true" style:font-size-asian="16pt" style:language-asian="en" style:country-asian="US" style:font-weight-asian="bold" style:font-size-complex="16pt" style:font-weight-complex="bold"/>
    </style:style>
    <style:style style:name="ListLabel_20_1" style:display-name="ListLabel 1" style:family="text">
      <style:text-properties fo:font-size="10pt" style:font-size-asian="10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2" loext:num-list-format="%1%" style:num-format="1">
        <style:list-level-properties text:list-level-position-and-space-mode="label-alignment">
          <style:list-level-label-alignment text:label-followed-by="space"/>
        </style:list-level-properties>
      </text:outline-level-style>
      <text:outline-level-style text:level="2" text:style-name="ListLabel_20_13"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4"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5"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6"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7"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8"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9"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0"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48in" fo:margin-left="0.248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1" loext:num-list-format="%1%" style:num-format="1">
        <style:list-level-properties text:list-level-position-and-space-mode="label-alignment">
          <style:list-level-label-alignment text:label-followed-by="space"/>
        </style:list-level-properties>
      </text:list-level-style-number>
      <text:list-level-style-number text:level="2" text:style-name="ListLabel_20_2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9" loext:num-list-format="[%1%] " style:num-prefix="["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style style:name="MT1" style:family="text">
      <style:text-properties fo:font-size="14pt" style:font-size-asian="14pt" style:font-size-complex="14pt"/>
    </style:style>
    <style:style style:name="MT2" style:family="text"/>
    <style:page-layout style:name="Mpm1">
      <style:page-layout-properties fo:page-width="8.2681in" fo:page-height="11.6929in" style:num-format="1" style:print-orientation="portrait" fo:margin-top="0.9846in" fo:margin-bottom="0.7874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style:page-layout style:name="Mpm2">
      <style:page-layout-properties fo:page-width="8.2681in" fo:page-height="11.6929in" style:num-format="1" style:print-orientation="portrait" fo:margin-top="0.9846in" fo:margin-bottom="0.9846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allinn<text:span text:style-name="MT1"> </text:span>2023</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text:page-number text:select-page="current">2</text:page-number></text:p>
      </style:footer>
    </style:master-page>
    <style:master-page style:name="Converted2" style:page-layout-name="Mpm3" draw:style-name="Mdp1">
      <style:footer>
        <text:p text:style-name="MP2"><text:page-number text:select-page="current">3</text:page-number></text:p>
      </style:footer>
    </style:master-page>
    <style:master-page style:name="Converted3" style:page-layout-name="Mpm3" draw:style-name="Mdp1">
      <style:footer>
        <text:p text:style-name="MP2"><text:page-number text:select-page="current">5</text:page-number></text:p>
      </style:footer>
    </style:master-page>
    <style:master-page style:name="Converted4" style:page-layout-name="Mpm3" draw:style-name="Mdp1">
      <style:footer>
        <text:p text:style-name="MP1"><text:span text:style-name="page_20_number"><text:page-number text:select-page="current">6</text:page-number></text:span></text:p>
      </style:footer>
    </style:master-page>
    <style:master-page style:name="Converted5" style:page-layout-name="Mpm3" draw:style-name="Mdp1">
      <style:footer>
        <text:p text:style-name="MP1"><text:span text:style-name="page_20_number"><text:page-number text:select-page="current">7</text:page-number></text:span></text:p>
      </style:footer>
    </style:master-page>
    <style:master-page style:name="Converted6" style:page-layout-name="Mpm3" draw:style-name="Mdp1">
      <style:footer>
        <text:p text:style-name="MP1"><text:span text:style-name="page_20_number"><text:page-number text:select-page="current">8</text:page-number></text:span></text:p>
      </style:footer>
    </style:master-page>
    <style:master-page style:name="Converted7" style:page-layout-name="Mpm3" draw:style-name="Mdp1">
      <style:footer>
        <text:p text:style-name="MP1"><text:span text:style-name="page_20_number"><text:page-number text:select-page="current">10</text:page-number></text:span></text:p>
      </style:footer>
    </style:master-page>
    <style:master-page style:name="Converted8" style:page-layout-name="Mpm3" draw:style-name="Mdp1">
      <style:footer>
        <text:p text:style-name="MP1"><text:span text:style-name="page_20_number"><text:page-number text:select-page="current">25</text:page-number></text:span></text:p>
      </style:footer>
    </style:master-page>
    <style:master-page style:name="Converted9" style:page-layout-name="Mpm3" draw:style-name="Mdp1">
      <style:footer>
        <text:p text:style-name="MP1"><text:span text:style-name="page_20_number"><text:page-number text:select-page="current">26</text:page-number></text:span></text:p>
      </style:footer>
    </style:master-page>
    <style:master-page style:name="Converted10" style:page-layout-name="Mpm3" draw:style-name="Mdp1">
      <style:footer>
        <text:p text:style-name="MP1"><text:span text:style-name="page_20_number"><text:page-number text:select-page="current">0</text:page-number></text:span></text:p>
      </style:footer>
    </style:master-page>
    <style:master-page style:name="Converted11" style:page-layout-name="Mpm3" draw:style-name="Mdp1">
      <style:footer>
        <text:p text:style-name="MP1"><text:span text:style-name="page_20_number"><text:page-number text:select-page="current">3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meta:creation-date>2023-10-29T15:10:43.173027682</meta:creation-date>
    <dc:date>2023-10-29T22:33:08.573221090</dc:date>
    <meta:editing-duration>PT31M40S</meta:editing-duration>
    <meta:generator>LibreOffice/7.3.7.2$Linux_X86_64 LibreOffice_project/30$Build-2</meta:generator>
    <meta:document-statistic meta:table-count="3" meta:image-count="24" meta:object-count="2" meta:page-count="31" meta:paragraph-count="222" meta:word-count="2065" meta:character-count="16586" meta:non-whitespace-character-count="14727"/>
    <meta:user-defined meta:name="AppVersion">16.0000</meta:user-defined>
  </office:meta>
</office:document-meta>
</file>

<file path=Object 3/content.xml><?xml version="1.0" encoding="utf-8"?>
<math xmlns="http://www.w3.org/1998/Math/MathML" display="block">
  <semantics>
    <mrow>
      <mrow>
        <mi>y</mi>
        <mo stretchy="false">=</mo>
        <mi>f</mi>
      </mrow>
      <mrow>
        <mo fence="true" form="prefix" stretchy="false">(</mo>
        <mrow>
          <mi>x</mi>
        </mrow>
        <mo fence="true" form="postfix" stretchy="false">)</mo>
      </mrow>
    </mrow>
    <annotation encoding="StarMath 5.0">y=f(x)</annotation>
  </semantics>
</math>
</file>

<file path=Object 4/content.xml><?xml version="1.0" encoding="utf-8"?>
<math xmlns="http://www.w3.org/1998/Math/MathML" display="block">
  <semantics>
    <mrow>
      <mrow>
        <mi>y</mi>
        <mo stretchy="false">=</mo>
        <mi>f</mi>
      </mrow>
      <mrow>
        <mo fence="true" form="prefix" stretchy="false">(</mo>
        <mrow>
          <mi>x</mi>
        </mrow>
        <mo fence="true" form="postfix" stretchy="false">)</mo>
      </mrow>
    </mrow>
    <annotation encoding="StarMath 5.0">y=f(x)</annotation>
  </semantics>
</math>
</file>